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9000000224A9B561C60B07188.png" manifest:media-type="image/png"/>
  <manifest:file-entry manifest:full-path="Pictures/100002010000005500000022B1EF8A7E7394610F.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left="0.125in" fo:padding-right="0.125in" fo:padding-top="0.0833in" fo:padding-bottom="0.0833in" fo:border="0.75pt solid #c4c7c5"/>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left="0.125in" fo:padding-right="0.125in" fo:padding-top="0.0833in" fo:padding-bottom="0.0833in" fo:border="0.75pt solid #c4c7c5"/>
    </style:style>
    <style:style style:name="P1" style:family="paragraph" style:parent-style-name="Standard">
      <style:paragraph-properties fo:line-height="114%" fo:padding="0in" fo:border="none"/>
    </style:style>
    <style:style style:name="P2" style:family="paragraph" style:parent-style-name="Standard">
      <style:paragraph-properties fo:margin-top="0.0835in" fo:margin-bottom="0.0835in" loext:contextual-spacing="false" fo:line-height="114%" fo:padding="0in" fo:border="none"/>
    </style:style>
    <style:style style:name="P3" style:family="paragraph" style:parent-style-name="Standard">
      <style:paragraph-properties fo:margin-top="0.3335in" fo:margin-bottom="0in" loext:contextual-spacing="false" fo:line-height="114%" fo:padding="0in" fo:border="none"/>
    </style:style>
    <style:style style:name="P4" style:family="paragraph" style:parent-style-name="Standard" style:list-style-name="WWNum1">
      <style:paragraph-properties fo:margin-left="0.4165in" fo:margin-right="0in" fo:line-height="114%" fo:text-indent="-0.25in" style:auto-text-indent="false" fo:padding="0in" fo:border="none"/>
    </style:style>
    <style:style style:name="P5" style:family="paragraph" style:parent-style-name="Standard" style:list-style-name="WWNum2">
      <style:paragraph-properties fo:margin-left="0.4165in" fo:margin-right="0in" fo:text-indent="-0.25in" style:auto-text-indent="false" fo:padding="0in" fo:border="none"/>
    </style:style>
    <style:style style:name="P6" style:family="paragraph" style:parent-style-name="Standard">
      <style:paragraph-properties fo:margin-top="0in" fo:margin-bottom="0.1772in" loext:contextual-spacing="false" fo:line-height="114%" fo:padding="0in" fo:border="none"/>
    </style:style>
    <style:style style:name="P7" style:family="paragraph" style:parent-style-name="Heading_20_1" style:master-page-name="Standard">
      <style:paragraph-properties fo:margin-top="0in" fo:margin-bottom="0.0835in" loext:contextual-spacing="false" fo:line-height="114%" style:page-number="1" fo:padding="0in" fo:border="none"/>
    </style:style>
    <style:style style:name="P8" style:family="paragraph" style:parent-style-name="Heading_20_4">
      <style:paragraph-properties fo:margin-top="0in" fo:margin-bottom="0.1772in" loext:contextual-spacing="false" fo:line-height="100%" fo:padding="0in" fo:border="none"/>
    </style:style>
    <style:style style:name="P9" style:family="paragraph" style:parent-style-name="Heading_20_3">
      <style:paragraph-properties fo:margin-top="0in" fo:margin-bottom="0.0835in" loext:contextual-spacing="false" fo:line-height="114%" fo:padding="0in" fo:border="none"/>
    </style:style>
    <style:style style:name="P10" style:family="paragraph" style:parent-style-name="Heading_20_3">
      <style:paragraph-properties fo:margin-top="0.3335in" fo:margin-bottom="0.0835in" loext:contextual-spacing="false" fo:line-height="114%" fo:padding="0in" fo:border="none"/>
    </style:style>
    <style:style style:name="P11" style:family="paragraph" style:parent-style-name="Heading_20_2">
      <style:paragraph-properties fo:margin-top="0in" fo:margin-bottom="0.0835in" loext:contextual-spacing="false" fo:line-height="114%"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style="italic" style:font-name-asian="Google Sans1" style:font-style-asian="italic" style:font-name-complex="Google Sans1" style:font-style-complex="italic"/>
    </style:style>
    <style:style style:name="T3" style:family="text">
      <style:text-properties fo:color="#1f1f1f" style:font-name="Google Sans" fo:font-style="italic" fo:font-weight="bold" style:font-name-asian="Google Sans1" style:font-style-asian="italic" style:font-weight-asian="bold" style:font-name-complex="Google Sans1" style:font-style-complex="italic" style:font-weight-complex="bold"/>
    </style:style>
    <style:style style:name="T4" style:family="text">
      <style:text-properties fo:color="#1f1f1f" style:font-name="Google Sans" fo:font-size="18pt" fo:font-style="italic" fo:font-weight="bold" style:font-name-asian="Google Sans1" style:font-size-asian="18pt" style:font-style-asian="italic" style:font-weight-asian="bold" style:font-name-complex="Google Sans1" style:font-size-complex="18pt" style:font-style-complex="italic" style:font-weight-complex="bold"/>
    </style:style>
    <style:style style:name="T5" style:family="text">
      <style:text-properties fo:color="#1f1f1f" style:font-name="Google Sans" fo:font-weight="bold" style:font-name-asian="Google Sans1" style:font-weight-asian="bold" style:font-name-complex="Google Sans1" style:font-weight-complex="bold"/>
    </style:style>
    <style:style style:name="T6" style:family="text">
      <style:text-properties fo:color="#1f1f1f" style:font-name="Google Sans" fo:font-size="14pt" fo:font-style="italic" fo:font-weight="bold" style:font-name-asian="Google Sans1" style:font-size-asian="14pt" style:font-style-asian="italic" style:font-weight-asian="bold" style:font-name-complex="Google Sans1" style:font-size-complex="14pt" style:font-style-complex="italic" style:font-weight-complex="bold"/>
    </style:style>
    <style:style style:name="T7" style:family="text">
      <style:text-properties fo:color="#444746" style:text-position="super 58%" style:font-name="Google Sans" fo:font-size="12pt" style:font-name-asian="Google Sans1" style:font-size-asian="12pt" style:font-name-complex="Google Sans1" style:font-size-complex="12pt"/>
    </style:style>
    <style:style style:name="T8" style:family="text">
      <style:text-properties style:font-name="Google Sans" style:font-name-asian="Google Sans1" style:font-name-complex="Google Sans1"/>
    </style:style>
    <style:style style:name="T9" style:family="text">
      <style:text-properties style:font-name="Google Sans" fo:font-size="12pt" style:font-name-asian="Google Sans1" style:font-size-asian="12pt" style:font-name-complex="Google Sans1" style:font-size-complex="12pt"/>
    </style:style>
    <style:style style:name="T10"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Engenharia de Alta Performance em Aplicações Tier-1: Simbiose entre TypeScript, Motor V8 e Micro-Renderização no Ecossistema React</text:span></text:p>
      <text:p text:style-name="P11"><text:span text:style-name="T1">1. O Paradigma de Escopo Restrito e a Empatia Mecânica em Ecossistemas Tier-1</text:span></text:p>
      <text:p text:style-name="P1"><text:span text:style-name="T1">A engenharia de aplicações web contemporâneas alcançou um patamar de complexidade técnica onde a fronteira entre o desenvolvimento de interfaces gráficas tridimensionais, motores de renderização em tempo real e aplicações tradicionais baseadas em documentos tornou-se indistinguível. Em ecossistemas classificados estritamente como aplicações de hiperescala ou </text:span><text:span text:style-name="T2">Tier-1</text:span><text:span text:style-name="T1"> — um panteão que engloba plataformas de comunicação massiva como Discord e Slack, ferramentas de design vetorial colaborativo como o Figma, e a infraestrutura crítica corporativa da Meta —, o navegador web deixa de ser um mero cliente passivo e interpretador de marcação de texto.</text:span><text:span text:style-name="T7">1</text:span><text:span text:style-name="T1"> Nestes ambientes de missão crítica, o navegador é subvertido para atuar como um sistema operacional em miniatura, hospedando motores gráficos complexos, encarregando-se da decodificação contínua de feixes de áudio e vídeo sob protocolos WebRTC, e gerenciando simultaneamente a conciliação de milhares de eventos de rede assíncronos a cada segundo.</text:span><text:span text:style-name="T7">1</text:span></text:p>
      <text:p text:style-name="P1"><text:span text:style-name="T1">A complexidade central que rege o desenvolvimento destas arquiteturas não reside estritamente na ausência de hardware potente nas máquinas dos usuários finais, mas sim nos rigores implacáveis do orçamento de processamento de tempo real imposto pela física dos monitores modernos.</text:span><text:span text:style-name="T7">1</text:span><text:span text:style-name="T1"> Para manter a ilusão cognitiva de fluidez perfeita a uma taxa de atualização padrão de sessenta quadros por segundo (60fps), toda a esteira operacional de uma aplicação — compreendendo a execução de rotinas JavaScript, o cálculo algorítmico de novas árvores de estado, a reconciliação de componentes, o recálculo de leiaute do documento e a transposição gráfica (pintura) para a tela nativa — deve ser invariavelmente concluída em um intervalo exíguo de aproximadamente dezesseis vírgula seis milissegundos (</text:span><draw:frame draw:style-name="fr1" draw:name="image1.png" text:anchor-type="as-char" svg:width="0.6693in" svg:height="0.2681in" draw:z-index="0"><draw:image xlink:href="Pictures/100002010000005500000022B1EF8A7E7394610F.png" xlink:type="simple" xlink:show="embed" xlink:actuate="onLoad" loext:mime-type="image/png"/></draw:frame><text:span text:style-name="T1">).</text:span><text:span text:style-name="T7">1</text:span><text:span text:style-name="T1"> Ultrapassar esse limite termodinâmico e orçamentário resulta na perda imediata de quadros (</text:span><text:span text:style-name="T2">frame drops</text:span><text:span text:style-name="T1"> ou </text:span><text:span text:style-name="T2">stuttering</text:span><text:span text:style-name="T1">), o que se traduz em engasgos visuais severos, latência perceptível de entrada (</text:span><text:span text:style-name="T2">input lag</text:span><text:span text:style-name="T1">), degradação exponencial da experiência do usuário e gargalos térmicos em dispositivos móveis que esgotam rapidamente as baterias.</text:span><text:span text:style-name="T7">1</text:span></text:p>
      <text:p text:style-name="P1"><text:span text:style-name="T1">Neste panorama de extrema exigência computacional, o paradigma de que abstrações de alto nível oferecidas pelo JavaScript moderno e bibliotecas declarativas como o React não possuem custo (</text:span><text:span text:style-name="T2">zero-cost abstractions</text:span><text:span text:style-name="T1">) revela-se uma falácia arquitetural.</text:span><text:span text:style-name="T7">1</text:span><text:span text:style-name="T1"> A utilização ingênua de estruturas dinâmicas transforma-se rapidamente em um passivo intransponível. A superação destas barreiras físicas exige a adoção daquilo que a engenharia de software de baixo nível denomina de "Empatia Mecânica" (</text:span><text:span text:style-name="T2">Mechanical Empathy</text:span><text:span text:style-name="T1">) — a prática de arquitetar o código de alto nível de modo a colaborar sinergicamente com o funcionamento interno e as heurísticas do hardware e das máquinas virtuais subjacentes.</text:span><text:span text:style-name="T7">1</text:span></text:p>
      <text:p text:style-name="P1"><text:span text:style-name="T1">Dentro desta filosofia imperativa, a linguagem TypeScript transcende completamente sua função original e mercadológica de ser um mero verificador estático de tipos focado na experiência do desenvolvedor (DX). Em projetos Tier-1, o TypeScript é empunhado como um mecanismo coercitivo de normalização topológica e estrutural. Ele atua como uma barreira de contenção que força os engenheiros de software a alinhar as intenções declarativas da interface visual com as heurísticas de otimização de baixo nível do motor de compilação Just-In-Time (JIT) e do complexo sistema de alocação de memória C++ inerente aos navegadores.</text:span><text:span text:style-name="T7">1</text:span><text:span text:style-name="T1"> A presente investigação dedica-se a dissecar e analisar exaustivamente os vetores técnicos pelos quais estas plataformas atingem o limite teórico máximo de performance no ecossistema web, percorrendo as mitigações de estrangulamento da Árvore de Sintaxe Abstrata (AST) no tempo de compilação, o alinhamento forçado das estruturas de memória (</text:span><text:span text:style-name="T2">Hidden Classes</text:span><text:span text:style-name="T1">) no motor V8, a adoção limítrofe de protocolos binários nativos sobre WebSockets para aniquilação do custo de cópia (</text:span><text:span text:style-name="T2">Zero-Copy</text:span><text:span text:style-name="T1">), e culminando nas técnicas transgressivas de desvio estrutural do Modelo de Objeto de Documento Virtual (</text:span><text:span text:style-name="T2">Bypass</text:span><text:span text:style-name="T1"> do VDOM) através das Atualizações Transitórias e da Micro-Renderização.</text:span><text:span text:style-name="T7">1</text:span></text:p>
      <text:p text:style-name="P11"><text:span text:style-name="T1">2. A Arquitetura Interna do Motor V8 e o </text:span><text:span text:style-name="T4">Pipeline</text:span><text:span text:style-name="T1"> de Compilação JIT</text:span></text:p>
      <text:p text:style-name="P1"><text:span text:style-name="T1">A compreensão profunda de como as definições estáticas do TypeScript impulsionam organicamente a velocidade de execução da camada gráfica requer a dissecação minuciosa da máquina virtual que hospeda o código: o motor Google V8 (o núcleo de execução do Google Chrome, Microsoft Edge e do ambiente de servidor Node.js) e seus congêneres de mercado, como o JavaScriptCore (Apple Safari) e o SpiderMonkey (Mozilla Firefox).</text:span><text:span text:style-name="T7">1</text:span><text:span text:style-name="T1"> Historicamente, o JavaScript foi concebido no final da década de noventa como uma linguagem de </text:span><text:span text:style-name="T2">script</text:span><text:span text:style-name="T1"> interpretada, pautada primariamente na tipagem dinâmica e na mutabilidade estrutural.</text:span><text:span text:style-name="T7">1</text:span><text:span text:style-name="T1"> Embora essa hiper-flexibilidade tipológica permita uma prototipagem veloz no tempo de desenvolvimento, ela impõe um desafio de engenharia ciclópico no tempo de execução (</text:span><text:span text:style-name="T2">runtime</text:span><text:span text:style-name="T1">), uma vez que a disposição física dos objetos na memória (</text:span><text:span text:style-name="T2">memory layout</text:span><text:span text:style-name="T1">) é opaca antes da execução e pode mutar de forma caótica e imprevisível ao longo do ciclo de vida da aplicação.</text:span><text:span text:style-name="T7">1</text:span></text:p>
      <text:p text:style-name="P1"><text:span text:style-name="T1">O motor V8 contemporâneo não atua como um interpretador linear simples de código-fonte. Pelo contrário, ele emprega uma arquitetura monumental construída em C++ que opera um duto de compilação Just-In-Time (JIT) de múltiplas camadas e extrema sofisticação.</text:span><text:span text:style-name="T7">1</text:span><text:span text:style-name="T1"> O objetivo central deste duto é converter, em tempo real, um código altamente abstrato e dinâmico em instruções de máquina nativas e otimizadas que rivalizem em velocidade com binários compilados previamente.</text:span><text:span text:style-name="T7">1</text:span></text:p>
      <text:p text:style-name="P1"><text:span text:style-name="T1">Para atingir essa aceleração, o ciclo de vida do código dentro do motor V8 atravessa quatro estágios evolutivos de compilação distintos, cada qual balançando a equação entre tempo de inicialização rápido e velocidade máxima de execução em regime contínuo </text:span><text:span text:style-name="T7">1</text:span><text:span text:style-name="T1">:</text:span></text:p>
      <table:table table:name="Table1" table:style-name="Table1">
        <table:table-column table:style-name="Table1.A" table:number-columns-repeated="3"/>
        <table:table-row table:style-name="Table1.1">
          <table:table-cell table:style-name="Table1.A1" office:value-type="string">
            <text:p text:style-name="P2"><text:span text:style-name="T5">Estágio de Execução no V8</text:span></text:p>
          </table:table-cell>
          <table:table-cell table:style-name="Table1.A1" office:value-type="string">
            <text:p text:style-name="P2"><text:span text:style-name="T5">Componente Responsável</text:span></text:p>
          </table:table-cell>
          <table:table-cell table:style-name="Table1.A1" office:value-type="string">
            <text:p text:style-name="P2"><text:span text:style-name="T5">Comportamento e Impacto Arquitetural</text:span></text:p>
          </table:table-cell>
        </table:table-row>
        <table:table-row table:style-name="Table1.1">
          <table:table-cell table:style-name="Table1.A1" office:value-type="string">
            <text:p text:style-name="P2"><text:span text:style-name="T5">Interpretação Basal</text:span></text:p>
          </table:table-cell>
          <table:table-cell table:style-name="Table1.A1" office:value-type="string">
            <text:p text:style-name="P2"><text:span text:style-name="T1">Ignition</text:span></text:p>
          </table:table-cell>
          <table:table-cell table:style-name="Table1.A1" office:value-type="string">
            <text:p text:style-name="P2"><text:span text:style-name="T1">O analisador converte a Árvore de Sintaxe Abstrata (AST) em </text:span><text:span text:style-name="T2">bytecode</text:span><text:span text:style-name="T1"> e o executa instantaneamente para garantir um tempo de inicialização veloz. Crucialmente, o Ignition atua como um rastreador heurístico, coletando metadados dinâmicos sobre os tipos e as formas dos objetos que fluem pelas funções.</text:span></text:p>
          </table:table-cell>
        </table:table-row>
        <table:table-row table:style-name="Table1.1">
          <table:table-cell table:style-name="Table1.A1" office:value-type="string">
            <text:p text:style-name="P2"><text:span text:style-name="T5">Compilação </text:span><text:span text:style-name="T3">Baseline</text:span></text:p>
          </table:table-cell>
          <table:table-cell table:style-name="Table1.A1" office:value-type="string">
            <text:p text:style-name="P2"><text:span text:style-name="T1">Sparkplug</text:span></text:p>
          </table:table-cell>
          <table:table-cell table:style-name="Table1.A1" office:value-type="string">
            <text:p text:style-name="P2"><text:span text:style-name="T1">Compila o </text:span><text:span text:style-name="T2">bytecode</text:span><text:span text:style-name="T1"> gerado pelo Ignition diretamente para código de máquina nativo, mas sem aplicar otimizações preditivas complexas. Serve para preencher a vasta lacuna de performance entre o interpretador basal e os compiladores otimizadores avançados.</text:span></text:p>
          </table:table-cell>
        </table:table-row>
        <table:table-row table:style-name="Table1.1">
          <table:table-cell table:style-name="Table1.A1" office:value-type="string">
            <text:p text:style-name="P2"><text:span text:style-name="T5">Compilação Intermediária</text:span></text:p>
          </table:table-cell>
          <table:table-cell table:style-name="Table1.A1" office:value-type="string">
            <text:p text:style-name="P2"><text:span text:style-name="T1">Maglev</text:span></text:p>
          </table:table-cell>
          <table:table-cell table:style-name="Table1.A1" office:value-type="string">
            <text:p text:style-name="P2"><text:span text:style-name="T1">Compilador JIT de nível médio recentemente introduzido na arquitetura. Emprega as especulações de tipo preliminares observadas pelo Ignition para fornecer ganhos substanciais (historicamente entre 8% a 10% adicionais de velocidade global em </text:span><text:span text:style-name="T2">benchmarks</text:span><text:span text:style-name="T1"> como JetStream) antes da compilação de nível extremo.</text:span></text:p>
          </table:table-cell>
        </table:table-row>
        <table:table-row table:style-name="Table1.1">
          <table:table-cell table:style-name="Table1.A1" office:value-type="string">
            <text:p text:style-name="P2"><text:span text:style-name="T5">Otimização de Topo Extreme</text:span></text:p>
          </table:table-cell>
          <table:table-cell table:style-name="Table1.A1" office:value-type="string">
            <text:p text:style-name="P2"><text:span text:style-name="T1">TurboFan</text:span></text:p>
          </table:table-cell>
          <table:table-cell table:style-name="Table1.A1" office:value-type="string">
            <text:p text:style-name="P2"><text:span text:style-name="T1">Funções classificadas como "quentes" (</text:span><text:span text:style-name="T2">hot paths</text:span><text:span text:style-name="T1">, invocadas repetidamente em ciclos intensos) são promovidas a esta esteira. O TurboFan abandona a verificação de segurança, aposta fortemente nas estatísticas monomórficas recolhidas e gera código C++ de máquina absurdamente especializado e veloz, assumindo que os tipos de entrada nunca variarão.</text:span></text:p>
          </table:table-cell>
        </table:table-row>
      </table:table>
      <text:p text:style-name="P3"><text:span text:style-name="T1">A vulnerabilidade intrínseca desta arquitetura especulativa reside na fragilidade de suas suposições.</text:span><text:span text:style-name="T7">1</text:span><text:span text:style-name="T1"> Se o código JavaScript alterar dinamicamente a estrutura de um objeto (por exemplo, injetando uma propriedade tardia ou alterando o tipo de uma variável de número para </text:span><text:span text:style-name="T2">string</text:span><text:span text:style-name="T1">) dentro de uma função que já havia sido hiper-otimizada pelo TurboFan, o motor sofre uma falha preditiva violenta e onerosa denominada </text:span><text:span text:style-name="T2">Bailout</text:span><text:span text:style-name="T1"> ou Evento de Desotimização.</text:span><text:span text:style-name="T7">1</text:span></text:p>
      <text:p text:style-name="P1"><text:span text:style-name="T1">No milissegundo exato dessa quebra de expectativa, o TurboFan interrompe subitamente toda a execução veloz do código de máquina, descarta o bloco otimizado da memória física, restaura os mapeamentos dos registradores da CPU hospedeira para o estado original da chamada e retrocede permanentemente a função para a execução lenta do interpretador basal Ignition.</text:span><text:span text:style-name="T7">1</text:span><text:span text:style-name="T1"> A penalidade computacional associada a ciclos repetitivos de otimização e desotimização destrói implacavelmente a taxa de quadros e o orçamento de 16.6ms exigido para manter a interface de aplicações Web fluída.</text:span><text:span text:style-name="T7">1</text:span></text:p>
      <text:p text:style-name="P11"><text:span text:style-name="T1">3. A Morfologia Topológica da Memória: </text:span><text:span text:style-name="T4">Hidden Classes</text:span><text:span text:style-name="T1"> e a Ciência do Caching em Linha</text:span></text:p>
      <text:p text:style-name="P1"><text:span text:style-name="T1">O alicerce material que possibilita a velocidade do compilador TurboFan reside na eliminação compulsória da necessidade de realizar buscas lentas em dicionários virtuais para encontrar propriedades de objetos durante o trânsito da aplicação.</text:span><text:span text:style-name="T7">1</text:span><text:span text:style-name="T1"> Em linguagens fortemente tipadas e compiladas diretamente para a máquina (como C++ e Rust), o endereçamento físico das variáveis é deduzido antes mesmo do </text:span><text:span text:style-name="T2">software</text:span><text:span text:style-name="T1"> rodar.</text:span><text:span text:style-name="T7">1</text:span><text:span text:style-name="T1"> Consequentemente, o acesso a um campo como usuario.idade é convertido pelo compilador numa mera operação aritmética de ponteiro (basicamente, somar um </text:span><text:span text:style-name="T2">offset</text:span><text:span text:style-name="T1"> em </text:span><text:span text:style-name="T2">bytes</text:span><text:span text:style-name="T1"> fixo ao endereço hexadecimal base de onde a estrutura reside na RAM).</text:span><text:span text:style-name="T7">1</text:span></text:p>
      <text:p text:style-name="P1"><text:span text:style-name="T1">O JavaScript original não possui estruturas de classes imutáveis; ele se comporta conceitualmente como coleções dispersas de pares chave-valor (</text:span><text:span text:style-name="T2">Hash Tables</text:span><text:span text:style-name="T1">) acopladas.</text:span><text:span text:style-name="T7">1</text:span><text:span text:style-name="T1"> Para emular a velocidade teórica das estruturas (</text:span><text:span text:style-name="T2">structs</text:span><text:span text:style-name="T1">) em C++, os arquitetos do motor V8 inventaram sistemas internos ocultos documentados como </text:span><text:span text:style-name="T2">Hidden Classes</text:span><text:span text:style-name="T1">, também referenciados como </text:span><text:span text:style-name="T2">Maps</text:span><text:span text:style-name="T1"> ou </text:span><text:span text:style-name="T2">Shapes</text:span><text:span text:style-name="T1"> no código-fonte.</text:span><text:span text:style-name="T7">1</text:span><text:span text:style-name="T1"> Sempre que um novo objeto é instanciado no sistema, o V8 associa a ele uma </text:span><text:span text:style-name="T2">Hidden Class</text:span><text:span text:style-name="T1"> basal vazia.</text:span><text:span text:style-name="T7">1</text:span><text:span text:style-name="T1"> A cada nova propriedade adicionada sequencialmente pelo desenvolvedor, o motor deriva uma nova ramificação arquitetônica, elaborando uma Árvore de Transição Contínua (</text:span><text:span text:style-name="T2">Transition Chain</text:span><text:span text:style-name="T1">).</text:span><text:span text:style-name="T7">1</text:span></text:p>
      <text:p text:style-name="P1"><text:soft-page-break/><text:span text:style-name="T1">A ordem de inicialização dita o percurso: se uma classe oculta HC0 recebe a propriedade x, ela gera uma transição para a ramificação HC1. Se recebe y, transita para HC2.</text:span><text:span text:style-name="T7">1</text:span><text:span text:style-name="T1"> A genialidade estrutural reside na tentativa do motor de partilhar a mesma cadeia topológica de transição entre múltiplos objetos para que eles apontem para os mesmos descritores de deslocamento de memória (</text:span><text:span text:style-name="T2">offsets</text:span><text:span text:style-name="T1">) estáticos no C++ nativo.</text:span><text:span text:style-name="T7">1</text:span><text:span text:style-name="T1"> Contudo, práticas nocivas em JavaScript puro esmagam esta otimização. A injeção de propriedades fora de ordem cronológica, ou a utilização do catastrófico operador léxico delete, fratura e estilhaça irremediavelmente a malha da árvore de classes ocultas.</text:span><text:span text:style-name="T7">1</text:span><text:span text:style-name="T1"> Nessas condições degeneradas, o motor V8 desiste da abstração C-like e afunda o objeto no estado conhecido como "Modo de Dicionário" (</text:span><text:span text:style-name="T2">Dictionary Mode</text:span><text:span text:style-name="T1">), onde cada requisição de propriedade impõe uma decodificação densa baseada em algoritmos de espalhamento (</text:span><text:span text:style-name="T2">hash lookup</text:span><text:span text:style-name="T1">), deteriorando o desempenho geral em taxas colossais.</text:span><text:span text:style-name="T7">1</text:span></text:p>
      <text:p text:style-name="P9"><text:span text:style-name="T1">3.1. A Dinâmica do </text:span><text:span text:style-name="T6">Inline Caching</text:span><text:span text:style-name="T1"> (IC)</text:span></text:p>
      <text:p text:style-name="P1"><text:span text:style-name="T1">As diretrizes morfológicas das </text:span><text:span text:style-name="T2">Hidden Classes</text:span><text:span text:style-name="T1"> servem de alimento basilar para o componente de otimização de execução batizado de </text:span><text:span text:style-name="T2">Inline Caching</text:span><text:span text:style-name="T1"> (Armazenamento em Linha, ou IC).</text:span><text:span text:style-name="T7">1</text:span><text:span text:style-name="T1"> O IC opera especulando empiricamente o comportamento dos fluxos sistêmicos. Quando uma instrução léxica densa (como a leitura da chave num ciclo iterativo) é executada diversas vezes, o V8 captura o deslocamento na memória subjacente atrelado à </text:span><text:span text:style-name="T2">Hidden Class</text:span><text:span text:style-name="T1"> observada e arquiva um atalho.</text:span><text:span text:style-name="T7">1</text:span><text:span text:style-name="T1"> Na passagem seguinte pelo mesmo bloco, o V8 realiza apenas uma verificação barata do ponteiro da classe oculta entrante; se houver um pareamento, o motor salta todas as lógicas complexas e recolhe o valor via busca referencial direta em memória.</text:span><text:span text:style-name="T7">1</text:span></text:p>
      <text:p text:style-name="P1"><text:span text:style-name="T1">A viabilidade de sustentação destas acelerações varia de forma drástica com base na constância ou inconstância dos formatos (a morfologia dos objetos) nas extremidades funcionais.</text:span><text:span text:style-name="T7">1</text:span><text:span text:style-name="T1"> O ecossistema V8 codifica três estágios fundamentais:</text:span></text:p>
      <table:table table:name="Table2" table:style-name="Table2">
        <table:table-column table:style-name="Table2.A" table:number-columns-repeated="3"/>
        <table:table-row table:style-name="Table2.1">
          <table:table-cell table:style-name="Table2.A1" office:value-type="string">
            <text:p text:style-name="P2"><text:span text:style-name="T5">Estado do Armazenamento em Linha (IC)</text:span></text:p>
          </table:table-cell>
          <table:table-cell table:style-name="Table2.A1" office:value-type="string">
            <text:p text:style-name="P2"><text:span text:style-name="T5">Comportamento Heurístico da Assinatura</text:span></text:p>
          </table:table-cell>
          <table:table-cell table:style-name="Table2.A1" office:value-type="string">
            <text:p text:style-name="P2"><text:span text:style-name="T5">Impacto Arquitetural no Código Executado</text:span></text:p>
          </table:table-cell>
        </table:table-row>
        <table:table-row table:style-name="Table2.1">
          <table:table-cell table:style-name="Table2.A1" office:value-type="string">
            <text:p text:style-name="P2"><text:span text:style-name="T5">Estado Monomórfico</text:span></text:p>
          </table:table-cell>
          <table:table-cell table:style-name="Table2.A1" office:value-type="string">
            <text:p text:style-name="P2"><text:span text:style-name="T1">O sistema interroga o fluxo e observa estritamente uma única e inflexível </text:span><text:span text:style-name="T2">Hidden Class</text:span><text:span text:style-name="T1">.</text:span></text:p>
          </table:table-cell>
          <table:table-cell table:style-name="Table2.A1" office:value-type="string">
            <text:p text:style-name="P2"><text:span text:style-name="T1">Desempenho Supremo O(1). O compilador descarta lógicas de avaliação condicional e substitui a leitura de propriedade por um acesso direto de matriz de ponteiro. É o Santo Graal das aplicações Tier-1.</text:span></text:p>
          </table:table-cell>
        </table:table-row>
        <table:table-row table:style-name="Table2.1">
          <table:table-cell table:style-name="Table2.A1" office:value-type="string">
            <text:p text:style-name="P2"><text:span text:style-name="T5">Estado Polimórfico</text:span></text:p>
          </table:table-cell>
          <table:table-cell table:style-name="Table2.A1" office:value-type="string">
            <text:p text:style-name="P2"><text:span text:style-name="T1">O código enfrenta um espectro contendo entre duas até quatro estruturas (</text:span><text:span text:style-name="T2">shapes</text:span><text:span text:style-name="T1">) estruturais divergentes.</text:span></text:p>
          </table:table-cell>
          <table:table-cell table:style-name="Table2.A1" office:value-type="string">
            <text:p text:style-name="P2"><text:span text:style-name="T1">Desempenho moderado com penalizações pontuais. O processador embute pequenas checagens binárias de segurança ocultas no assembly (if-else nativos) para discernir qual dos formatos conhecidos deve ser operado.</text:span></text:p>
          </table:table-cell>
        </table:table-row>
        <table:table-row table:style-name="Table2.1">
          <table:table-cell table:style-name="Table2.A1" office:value-type="string">
            <text:p text:style-name="P2"><text:span text:style-name="T5">Estado Megamórfico</text:span></text:p>
          </table:table-cell>
          <table:table-cell table:style-name="Table2.A1" office:value-type="string">
            <text:p text:style-name="P2"><text:span text:style-name="T1">Inundação caótica de cinco ou mais </text:span><text:span text:style-name="T2">Hidden Classes</text:span><text:span text:style-name="T1"> distintas bombardeando o mesmo espaço de processamento.</text:span></text:p>
          </table:table-cell>
          <table:table-cell table:style-name="Table2.A1" office:value-type="string">
            <text:p text:style-name="P2"><text:span text:style-name="T1">Paralisação Computacional. O TurboFan depõe suas apostas algorítmicas, abandona o </text:span><text:span text:style-name="T2">cache</text:span><text:span text:style-name="T1"> veloz, e condena a avaliação universal para tabelas de Hash genéricas de acesso lento, dizimando os tempos processuais do componente.</text:span></text:p>
          </table:table-cell>
        </table:table-row>
      </table:table>
      <text:p text:style-name="P10"><text:span text:style-name="T1">3.2. Vetores Nativos e as Transições de Estado Holey vs Packed</text:span></text:p>
      <text:p text:style-name="P1"><text:span text:style-name="T1">A rigidez morfológica não se aplica unicamente a objetos, mas dita os ritmos vitais das matrizes (Arrays) na infraestrutura JIT.</text:span><text:span text:style-name="T7">16</text:span><text:span text:style-name="T1"> No motor V8, as matrizes declaradas transitam por taxonomias específicas baseadas no tipo de conteúdo subjacente.</text:span><text:span text:style-name="T7">16</text:span><text:span text:style-name="T1"> Um vetor provido estritamente de dados homogêneos (como números inteiros ininterruptos) recebe a classificação computacional suprema de PACKED_SMI_ELEMENTS (Small Integers).</text:span><text:span text:style-name="T7">16</text:span><text:span text:style-name="T1"> A ausência de buracos lógicos no vetor (matrizes contíguas) faculta ao motor V8 abstrair operações em bloco diretas à CPU, removendo salvaguardas iterativas.</text:span><text:span text:style-name="T7">16</text:span></text:p>
      <text:p text:style-name="P1"><text:span text:style-name="T1">Se um elemento de ponto flutuante (</text:span><text:span text:style-name="T2">float/double</text:span><text:span text:style-name="T1">) é inserido acidentalmente, o array transita inexoravelmente para PACKED_DOUBLE_ELEMENTS.</text:span><text:span text:style-name="T7">5</text:span><text:span text:style-name="T1"> Mais grave, caso um elemento disperso seja instanciado fora dos limites preenchidos (por exemplo, preenchendo a chave 20 de um vetor de tamanho 5) ou caso ocorra deleção interna forçada, o bloco fratura e recebe a temida estampa topológica de HOLEY_ELEMENTS.</text:span><text:span text:style-name="T7">16</text:span><text:span text:style-name="T1"> O trânsito de um vetor contínuo para o formato esburacado (</text:span><text:span text:style-name="T2">holey</text:span><text:span text:style-name="T1">) embute perdas colossais, pois obriga o JIT a injetar instruções adicionais custosas de limite (</text:span><text:span text:style-name="T2">Bounds Checking</text:span><text:span text:style-name="T1">) e verificações transversais caras em toda a Cadeia de Protótipos (</text:span><text:span text:style-name="T2">Prototype Chain</text:span><text:span text:style-name="T1">) subjacente a cada ciclo executado de métodos funcionais da linguagem (como map, reduce ou forEach), retardando a malha iterativa maciçamente.</text:span><text:span text:style-name="T7">16</text:span></text:p>
      <text:p text:style-name="P11"><text:span text:style-name="T1">4. O TypeScript como Mecanismo de Coerção Termodinâmica em </text:span><text:span text:style-name="T4">Runtime</text:span></text:p>
      <text:p text:style-name="P1"><text:span text:style-name="T1">Uma premissa nociva e amplamente difundida no tecido educacional da engenharia de interface postula que, como o TypeScript atua sob a mecânica de apagamento de tipo (</text:span><text:span text:style-name="T2">Type Erasure</text:span><text:span text:style-name="T1">), todas as anotações se dissolvem vaporosamente durante o empacotamento transpilatório, resultando na ausência total de benefícios tangíveis ao código final em regime de produção.</text:span><text:span text:style-name="T7">1</text:span><text:span text:style-name="T1"> Sob o escrutínio implacável de aplicações que exigem renderização hiperdinâmica, tal postulado é categoricamente classificado como uma falácia arquitetural.</text:span><text:span text:style-name="T7">1</text:span><text:span text:style-name="T1"> A superioridade inconteste do TypeScript fundamenta-se nos vetores coercitivos comportamentais indissociáveis da sua adoção estrita.</text:span></text:p>
      <text:p text:style-name="P1"><text:span text:style-name="T1">Ao forçar os engenheiros a redigir manifestos rígidos, formalizados universalmente pela sintaxe central de Interfaces e Types, o TypeScript impede estruturalmente a promiscuidade de injeções tardias condicionais nas matrizes de estado (por exemplo, bloqueando que dados instáveis sejam acoplados organicamente durante as re-renderizações React).</text:span><text:span text:style-name="T7">1</text:span><text:span text:style-name="T1"> Consequentemente, o código emitido, desprovido de abstrações caóticas, converte a flutuação polimórfica caótica em desfiles processuais uniformes de instanciações contínuas, moldando e forçando as instâncias ao rigor demandado pelo V8. Ao injetar na esteira de </text:span><text:span text:style-name="T2">runtime</text:span><text:span text:style-name="T1"> objetos de geometria congelada e previsível, garante-se matematicamente que os avaliadores subjacentes estabilizem os nós no desejado estado </text:span><text:span text:style-name="T5">Monomórfico</text:span><text:span text:style-name="T1">.</text:span><text:span text:style-name="T7">1</text:span><text:span text:style-name="T1"> É a estática disciplinar prévia assegurando o apogeu cinético termodinâmico contínuo exigido para operar nos patamares dos processos TurboFan, sem a intervenção de desotimizações abruptas (</text:span><text:span text:style-name="T2">Bailouts</text:span><text:span text:style-name="T1">).</text:span><text:span text:style-name="T7">1</text:span></text:p>
      <text:p text:style-name="P9"><text:span text:style-name="T1">4.1. Visualização Empírica: </text:span><text:span text:style-name="T6">Deopt Explorer</text:span><text:span text:style-name="T1"> e a Reformulação do Compilador Microsoft</text:span></text:p>
      <text:p text:style-name="P1"><text:span text:style-name="T1">O impacto da adoção cega de matrizes monomórficas foi materialmente rastreado e internalizado não apenas nos navegadores, mas na estrutura fundacional do próprio compilador analítico oficial do TypeScript, elaborado pela engenharia de núcleo da Microsoft.</text:span><text:span text:style-name="T7">15</text:span><text:span text:style-name="T1"> Munidos da extensão VS Code chamada </text:span><text:span text:style-name="T2">Deopt Explorer</text:span><text:span text:style-name="T1"> — uma ferramenta forense que expõe logs brutos do rastreador V8 demonstrando o instante visual preciso onde cada linha transita para as valas do Megamorfismo </text:span><text:span text:style-name="T7">15</text:span><text:span text:style-name="T1"> —, os criadores da linguagem auditaram o interpretador.</text:span></text:p>
      <text:p text:style-name="P1"><text:span text:style-name="T1">Descobriu-se que os mecanismos internos de avaliação transitavam livremente em construções polimórficas pesadas que fraturavam os acessos à classe Symbol subjacente e às tipologias primitivas dos nós gramaticais.</text:span><text:span text:style-name="T7">15</text:span><text:span text:style-name="T1"> Na colossal iniciativa (PR #59198 e relacionados), a refatoração maciça focada em banir o comportamento e acoplar a árvore sintática (AST) estritamente na homogeneidade monomórfica cristalina forneceu taxas extremas de velocidade imediata: os avaliadores constataram globalmente uma supressão monumental oscilando de 10% a 26% de diminuição temporal no escopo total do compilador (trocando um custo aceitável de mero acréscimo isolado em 2% de preenchimento orçamentário da memória alocativa associada).</text:span><text:span text:style-name="T7">19</text:span><text:span text:style-name="T1"> A aplicação direta de empatia mecânica ao próprio código matriz demonstra incontestavelmente que a adoção monomórfica não é capricho, mas exigência de performance real.</text:span></text:p>
      <text:p text:style-name="P11"><text:span text:style-name="T1">5. Abstrações de Custo Zero (</text:span><text:span text:style-name="T4">Zero-Cost</text:span><text:span text:style-name="T1">) e Mitigações Estáticas na CI/CD</text:span></text:p>
      <text:p text:style-name="P1"><text:span text:style-name="T1">O tempo computacional é exaurido nos cenários de hiperescala antes mesmo da compilação do pacote atingir as redes de fornecimento de conteúdo (CDNs). Avaliar centenas de milhares de arquivos contendo milhões de correlações dependentes simultâneas nas esteiras multithreads de Integração Contínua e Entrega Contínua (CI/CD) asfixia a interface de desenvolvimento dos engenheiros e estilhaça os orçamentos de RAM operacionais do Node.js.</text:span><text:span text:style-name="T7">1</text:span></text:p>
      <text:p text:style-name="P9"><text:span text:style-name="T1">5.1. A Supressão de Análises AST e a Crise da Hiper-Expansão de Tipos</text:span></text:p>
      <text:p text:style-name="P1"><text:span text:style-name="T1">Nos monorepos Tier-1, o orquestramento passivo do compilador padrão (tsc) é inadmissível, pois a sua sanha heurística busca inferir integralmente as dependências contidas na abissal ramificação modular dos diretórios de base (node_modules). Para impedir OOM (</text:span><text:span text:style-name="T2">Out Of Memory</text:span><text:span text:style-name="T1">), acionam-se contingências arquitetônicas rigorosas, como o parâmetro vitalício skipLibCheck: true.</text:span><text:span text:style-name="T7">1</text:span><text:span text:style-name="T1"> Essa exclusão direcionada interrompe abruptamente o </text:span><text:span text:style-name="T2">parsing</text:span><text:span text:style-name="T1"> gramatical complexo de terceiros, forçando a varredura restrita puramente às margens vitais de interseção e poupando gigabytes cruciais nos servidores de validação de </text:span><text:span text:style-name="T2">Pull Requests</text:span><text:span text:style-name="T1">.</text:span><text:span text:style-name="T7">1</text:span><text:span text:style-name="T1"> Além disso, a opção isolatedModules: true torna-se obrigatória para que a arquitetura se submeta livremente ao processo transpílatório assíncrono hiperacelerado em empacotadores nativos (esbuild em Go ou SWC em Rust) imunes à poluição do escopo global da linguagem.</text:span><text:span text:style-name="T7">1</text:span></text:p>
      <text:p text:style-name="P1"><text:soft-page-break/><text:span text:style-name="T1">Um aspecto endêmico deste processamento paralisante emerge na malha das bibliotecas de Mapeamento Objeto-Relacional (ORMs), especificamente os esquemas relacionais de densa profundidade do Prisma ORM.</text:span><text:span text:style-name="T7">1</text:span><text:span text:style-name="T1"> A expansão de tipificações genéricas geradas para dezenas de tabelas de banco de dados infere condicionais massivamente expansíveis.</text:span><text:span text:style-name="T7">1</text:span><text:span text:style-name="T1"> Ao injetar essa estrutura nos parâmetros primários do fluxo React, o analisador TypeScript expande algoritmicamente bilhões de nós semânticos virtuais iterativos repetidamente, afundando os servidores de IntelliSense do VS Code em latências de até trinta segundos, inviabilizando o desenvolvimento produtivo local.</text:span><text:span text:style-name="T7">1</text:span></text:p>
      <text:p text:style-name="P1"><text:span text:style-name="T1">A adoção de uma inversão gramatical baseada no marcador léxico typeof (por exemplo, typeof clienteInstanciadoPrisma ou inferências seletivas localizadas typeof postSelect) erradica sumariamente este gargalo estático formidável.</text:span><text:span text:style-name="T7">1</text:span><text:span text:style-name="T1"> Esta estratégia absorve a estrutura semântica exata ampliada (</text:span><text:span text:style-name="T2">widened type</text:span><text:span text:style-name="T1">) da expressão pontual de identificador previamente compilada, poupando a AST de re-interpretar integralmente a rede hierárquica latente do banco.</text:span><text:span text:style-name="T7">1</text:span><text:span text:style-name="T1"> Dados de rastreio subjacentes compilados pela arquitetura constatam que essa sutil realocação de referências resulta matematicamente na mitigação de espantosos 99.9% de todas as instanciações abstratas na árvore do sistema de compilação, diminuindo em paralelo a volumetria de RAM gasta em mais de 62%, resultando num sistema estritamente leve e robusto.</text:span><text:span text:style-name="T7">1</text:span></text:p>
      <text:p text:style-name="P9"><text:span text:style-name="T1">5.2. O Antipadrão Topológico dos Enums e a Excelência dos Branded Types</text:span></text:p>
      <text:p text:style-name="P1"><text:span text:style-name="T1">No escopo vital da arquitetura </text:span><text:span text:style-name="T2">Zero-Cost</text:span><text:span text:style-name="T1"> (abstrações que devem transpirar com carga estrita de zero </text:span><text:span text:style-name="T2">bytes</text:span><text:span text:style-name="T1"> no código JIT executado), a manutenção cega das estruturas base clássicas destrói a coesão sistêmica. As declarações comuns vinculadas a enumerações clássicas (enum) constituem um vetor severo e rechaçado em engenharia de fronteira.</text:span><text:span text:style-name="T7">1</text:span><text:span text:style-name="T1"> O transpilador TypeScript acopla a estrutura enum numa Expressão de Função Invocada Imediatamente (IIFE) no ecossistema legado, criando matrizes bidirecionais físicas imperativas geradoras de vetores iterativos na </text:span><text:span text:style-name="T2">heap</text:span><text:span text:style-name="T1"> mutável.</text:span><text:span text:style-name="T7">1</text:span></text:p>
      <text:p text:style-name="P1"><text:span text:style-name="T1">A gravidade destas IIFEs manifesta-se nos processos de extirpação de código morto (</text:span><text:span text:style-name="T2">Tree-Shaking</text:span><text:span text:style-name="T1">) guiados por empacotadores como Webpack.</text:span><text:span text:style-name="T7">1</text:span><text:span text:style-name="T1"> A análise algorítmica destas ferramentas é conservadora; dada a incapacidade técnica de atestar garantias absolutas sobre fechamentos léxicos isolados de efeitos colaterais silenciados, a arquitetura mantém as IIFEs intocadas integralmente atadas ao pacote transmitido na infraestrutura de rede, punindo a renderização inicial mesmo que somente um fragmento diminuto estéril fosse efetivamente acionado.</text:span><text:span text:style-name="T7">1</text:span><text:span text:style-name="T1"> O paradigma Tier-1 demanda a substituição por uniões literais exatas de strings atômicas ou a instrumentalização do selo nativo de imutabilidade provido por objetos cimentados com a marcação as const, cuja transparência analítica assegura o descarte inconteste nos feixes e feixes gerados finais a custos nulos.</text:span><text:span text:style-name="T7">1</text:span></text:p>
      <text:p text:style-name="P1"><text:span text:style-name="T1">Do mesmo modo, resguardar fronteiras semânticas inquebráveis sem alocação — garantindo, por exemplo, que a sequência alfanumérica indicadora do IdentificadorUsuario não transponha indevidamente para fluxos sistêmicos de faturamento esperando um IdentificadorProduto, visto que ambas resolvem-se em camadas primárias apenas como vetores atômicos de </text:span><text:span text:style-name="T2">strings</text:span><text:span text:style-name="T1"> básicas — não pode incorrer na criação custosa de classes de envolvimento (</text:span><text:span text:style-name="T2">Wrappers</text:span><text:span text:style-name="T1">) de instâncias que sobrecarregam as limpezas ativas da RAM.</text:span><text:span text:style-name="T7">1</text:span><text:span text:style-name="T1"> Aplica-se compulsoriamente a tipagem nominal baseada em </text:span><text:span text:style-name="T2">Branded Types</text:span><text:span text:style-name="T1"> (Tipos Fantasmas ou Marcações de Interseção Sintética). O desenvolvedor apensa descrições inertes (ex. string &amp; { readonly _marca: "IdUsuario" }).</text:span><text:span text:style-name="T7">1</text:span><text:span text:style-name="T1"> O motor acusa falha formidável cruzada em compilação, contudo as marcações espectrais dissolvem-se silenciosamente antes da avaliação, garantindo imunidade operacional de custo inteiramente nulo na esfera termodinâmica da CPU.</text:span><text:span text:style-name="T7">1</text:span></text:p>
      <text:p text:style-name="P11"><text:span text:style-name="T1">6. Dinâmicas de Limpeza Sistêmica e Termodinâmica do Garbage Collector</text:span></text:p>
      <text:p text:style-name="P1"><text:span text:style-name="T1">O entendimento pormenorizado do esgotamento contínuo das latências e perdas severas de taxas gráficas orbitam essencialmente o comportamento invasivo e inevitável de manuseios alocativos no rastreador do Coletor de Lixo (</text:span><text:span text:style-name="T2">Garbage Collector</text:span><text:span text:style-name="T1"> - GC) de navegadores modernos.</text:span><text:span text:style-name="T7">1</text:span><text:span text:style-name="T1"> A gestão da memória do V8 apoia-se num arcabouço lógico documentado rigorosamente em fundamentos computacionais designado de "Hipótese Geracional".</text:span><text:span text:style-name="T7">1</text:span></text:p>
      <text:p text:style-name="P1"><text:span text:style-name="T1">Este postulado deduz organicamente que a esmagadora e absoluta maioria dos vetores informacionais recém-alocados são sumariamente instanciados para desempenhar atribuições rápidas de intercâmbio, sofrendo eliminação súbita do ecossistema lógico antes do encerramento perene dos laços de </text:span><text:span text:style-name="T2">looping</text:span><text:span text:style-name="T1"> transicionais de interfaces ativas (eles nascem e perecem na juventude sistêmica imediata).</text:span><text:span text:style-name="T7">1</text:span><text:span text:style-name="T1"> Para explorar materialmente esse postulado e evitar varreduras penosas profundas exaustivas, o mecanismo de C++ isola o espectro de </text:span><text:span text:style-name="T2">Heap</text:span><text:span text:style-name="T1"> (Alocação Dinâmica) dividindo a infraestrutura vital em enclaves temporais: a Geração Jovem (</text:span><text:span text:style-name="T2">New Space</text:span><text:span text:style-name="T1">) e a Geração Antiga (</text:span><text:span text:style-name="T2">Old Space</text:span><text:span text:style-name="T1"> ou </text:span><text:span text:style-name="T2">Tenured Space</text:span><text:span text:style-name="T1">).</text:span><text:span text:style-name="T7">1</text:span></text:p>
      <text:p text:style-name="P9"><text:span text:style-name="T1">6.1. Scavenger GC e Mark-Sweep-Compact</text:span></text:p>
      <text:p text:style-name="P1"><text:span text:style-name="T1">Toda alocação inicial — como as estruturas efêmeras criadas por desestruturações sintáticas puras imperativas de resposta e de passagem de estados de variáveis transitórias aninhadas no React — habita o enclave efêmero (</text:span><text:span text:style-name="T2">New Space</text:span><text:span text:style-name="T1">).</text:span><text:span text:style-name="T7">1</text:span><text:span text:style-name="T1"> Ao colidir nos tetos limites volumétricos destas áreas minúsculas, um algoritmo altamente calibrado e de curto laço batizado de </text:span><text:span text:style-name="T2">Scavenger</text:span><text:span text:style-name="T1"> é instigado a purgar e compactar estilhaços irrelevantes sem reter dependências.</text:span><text:span text:style-name="T7">1</text:span></text:p>
      <text:p text:style-name="P1"><text:span text:style-name="T1">As entidades semânticas persistentes ligadas a janelas que sobrevivem sequencialmente, evadindo-se das varreduras seguidas, progridem inexoravelmente às camadas perenes associadas na Geração Antiga (</text:span><text:span text:style-name="T2">Old Space</text:span><text:span text:style-name="T1">).</text:span><text:span text:style-name="T7">1</text:span><text:span text:style-name="T1"> O esgotamento crônico desta camada força inevitavelmente paralisias colossais destrutivas sob as instâncias dos algoritmos profundos e transversais denominados </text:span><text:span text:style-name="T2">Mark-Sweep-Compact</text:span><text:span text:style-name="T1"> (Marcação, Varredura e Compactação).</text:span><text:span text:style-name="T7">1</text:span><text:span text:style-name="T1"> Quando uma plataforma assíncrona absorve e reescreve desenfreadamente objetos parciais derivados de dados volumétricos da rede convertidos via desestruturação ingênua de pacotes padronizados como JSON, milhares de pequenos construtos inundam exponencialmente a memória </text:span><text:span text:style-name="T2">New Space</text:span><text:span text:style-name="T1"> a cada milissegundo.</text:span></text:p>
      <text:p text:style-name="P1"><text:span text:style-name="T1">Estas instâncias predatórias acionam disparos frequentes, erráticos e obstrutivos do </text:span><text:span text:style-name="T2">Scavenger</text:span><text:span text:style-name="T1"> (congelando interrupções sistêmicas atreladas diretamente aos ritmos sagrados das animações que dependem da esteira em trânsito) ou, pior, estouram limiares na camada superior impondo os temíveis eventos bloqueadores totais (</text:span><text:span text:style-name="T2">Stop-The-World</text:span><text:span text:style-name="T1"> pauses), desferindo solavancos paralisantes à totalidade do navegador e esvaziando categoricamente as promessas originais da resiliência arquitetural fluida em 60fps.</text:span><text:span text:style-name="T7">1</text:span></text:p>
      <text:p text:style-name="P11"><text:span text:style-name="T1">7. O Gargalo da Reconciliação React e a Dualidade Física C++</text:span></text:p>
      <text:p text:style-name="P1"><text:span text:style-name="T1">Tendo estabelecido as mitigações no ecossistema nativo abstrato, a colisão fatal e derradeira entre a eficácia teórica do cálculo invisível e o desenho manifesto nas interfaces do usuário repousa nos paradigmas do ecossistema de renderização subjacente às hierarquias das janelas de navegadores (Blink e WebKit).</text:span><text:span text:style-name="T7">1</text:span></text:p>
      <text:p text:style-name="P9"><text:span text:style-name="T1">7.1. A Penalidade Indissociável da Travessia (</text:span><text:span text:style-name="T6">Crossing Penalty</text:span><text:span text:style-name="T1">) do DOM</text:span></text:p>
      <text:p text:style-name="P1"><text:span text:style-name="T1">O Modelo de Objeto de Documento (DOM) é fundamentalmente abstraído e erradamente interpretado por leigos como componente integral inerente inato do JavaScript.</text:span><text:span text:style-name="T7">1</text:span><text:span text:style-name="T1"> Conceitualmente, os vetores primários que moldam cada aresta, </text:span><text:span text:style-name="T2">div</text:span><text:span text:style-name="T1">, painel ou caixa delimitadora de ecrã consistem num conglomerado maciço estrito forjado por dados C++ alocados em processos confinados renderizadores exteriores hermeticamente alheios aos limites interpretativos isolados englobados pelos muros de execução (sandbox) da máquina virtual V8.</text:span><text:span text:style-name="T7">1</text:span></text:p>
      <text:p text:style-name="P1"><text:span text:style-name="T1">Para incitar a flutuação ou reposicionamento dinâmico visual tangível em resposta a solicitações assíncronas do front-end, o mecanismo requer instigar fluxos comunicacionais pautados através de amarras sintéticas (</text:span><text:span text:style-name="T2">Bindings</text:span><text:span text:style-name="T1">).</text:span><text:span text:style-name="T7">1</text:span><text:span text:style-name="T1"> A travessia instiga inevitavelmente o estrangulamento da camada C++ denominado de Penalidade da Travessia (</text:span><text:span text:style-name="T2">Crossing Penalty</text:span><text:span text:style-name="T1">): o motor JS serializa a requisição, comuta os contextos sistêmicos abismais de sistema operacional, penetra a fronteira física transacional, transpõe dados flutuantes flexíveis para alicerces rigorosos estáticos do DOM de renderização vetorial e obriga as máquinas a despenderem forças colossais no processo.</text:span><text:span text:style-name="T7">1</text:span></text:p>
      <text:p text:style-name="P1"><text:span text:style-name="T1">Mutações hiperfrequentes originadas das cascatas sistêmicas unidirecionais das bibliotecas declarativas (inundação de rastros sísmicos impulsionadas por dezenas de useStates flutuando numa base de hierarquia de pais para filhos) saturam a conexão, destroem a malha gráfica contínua iterativa de reconciliação nativa em forma de cachoeiras predatórias algorítmicas (</text:span><text:span text:style-name="T2">waterfalls</text:span><text:span text:style-name="T1">) e asfixiam completamente as taxas operacionais macroscópicas fluidas do software local.</text:span><text:span text:style-name="T7">1</text:span></text:p>
      <text:p text:style-name="P9"><text:span text:style-name="T1">7.2. Segregação Sintática, </text:span><text:span text:style-name="T6">Tearing</text:span><text:span text:style-name="T1"> Concorrencial e o Mecanismo de Bypass VDOM</text:span></text:p>
      <text:p text:style-name="P1"><text:span text:style-name="T1">A invenção basilar universal oriunda da biblioteca React consubstanciou-se no apaziguamento dessa malha sistêmica pelo isolamento algorítmico suportado pelo Modelo Documental Virtual (VDOM).</text:span><text:span text:style-name="T7">1</text:span><text:span text:style-name="T1"> Ao simular a árvore integral visual recorrendo meramente às características topológicas baratas clonadas e alojadas na própria memória residente V8 submetida ao </text:span><text:span text:style-name="T2">Inline Caching</text:span><text:span text:style-name="T1"> (estado onde ler as posições geométricas do nó é meramente iterar sobre matrizes de dados C-like velozes sem cruzar fronteiras), evitou-se a latência maciça das intervenções nativas no percurso reativo contínuo.</text:span><text:span text:style-name="T7">1</text:span></text:p>
      <text:p text:style-name="P1"><text:soft-page-break/><text:span text:style-name="T1">Entretanto, as restrições dogmáticas à reconciliação declarativa clássica entram em colapso nas arquiteturas submetidas a injetores assíncronos e densidades em microescala.</text:span><text:span text:style-name="T7">1</text:span><text:span text:style-name="T1"> Projetos modernos migraram de topologias locais (baseadas em </text:span><text:span text:style-name="T2">Context API</text:span><text:span text:style-name="T1">) — onde a mera atualização de um ponto profundo incitava surtos generalizados de "Context Thrashing" e recálculos custosos desnecessários em 99% das sub-árvores inertes anexadas aos ramos superiores — em prol do gerenciamento descentralizado imutável externo capitaneado por bibliotecas </text:span><text:span text:style-name="T2">Flux</text:span><text:span text:style-name="T1"> avançadas (primordialmente as instâncias do núcleo </text:span><text:span text:style-name="T2">Zustand</text:span><text:span text:style-name="T1">).</text:span><text:span text:style-name="T7">1</text:span></text:p>
      <text:p text:style-name="P1"><text:span text:style-name="T1">Nesta adoção, emerge o risco de corrupções geradas pelas intersecções com as renderizações suspensas atreladas às "Características Concorrentes" (</text:span><text:span text:style-name="T2">Concurrent Features</text:span><text:span text:style-name="T1">) oriundas da iteração React 18 e derivadas. Se o motor </text:span><text:span text:style-name="T2">React Fiber</text:span><text:span text:style-name="T1"> é voluntariamente pausado a meio caminho transacional para acolher interações de eventos mais urgentes, uma atualização tardia do </text:span><text:span text:style-name="T2">Zustand</text:span><text:span text:style-name="T1"> injetada a partir da rede pode induzir metadados fragmentados onde a tela transita partes visuais em tempos destoantes — um lapso caótico desfigurativo vulgarmente intitulado </text:span><text:span text:style-name="T2">Tearing</text:span><text:span text:style-name="T1"> (Rasgo Visual).</text:span><text:span text:style-name="T7">1</text:span></text:p>
      <text:p text:style-name="P1"><text:span text:style-name="T1">A imunidade requer a invocação da primitiva síncrona determinista, incorporada nos seletores de estado, batizada de useSyncExternalStore (uSES).</text:span><text:span text:style-name="T7">1</text:span><text:span text:style-name="T1"> Quando os seletores (state =&gt; state.valorEspecifico) são cravados via uSES associando a cláusula lógica de retenção a um gatilho, a biblioteca submete a flutuação reativa não ao rastreador cego da árvore global, mas à ferramenta nativa em javascript subjacente de comparação crua de memória e matrizes do V8 invocando unicamente a verificação matemática imperativa Object.is.</text:span><text:span text:style-name="T7">1</text:span><text:span text:style-name="T1"> Ao aferir a falsidade absoluta do ponteiro do objeto exato de modificação visual, o sistema paralisa instintivamente todo o resto do processamento das entidades irrelevantes sem cruzar o processo — interrompendo instâncias através da cessação de varreduras secundárias (fenômeno técnico de </text:span><text:span text:style-name="T2">bailing out</text:span><text:span text:style-name="T1"> absoluto).</text:span><text:span text:style-name="T7">1</text:span><text:span text:style-name="T1"> Consequentemente, o React compele micro-instruções unicamente ao elemento específico afetado sem desencadear difusões em nós correlacionados.</text:span></text:p>
      <text:p text:style-name="P9"><text:span text:style-name="T1">7.3. Micro-Renderizações e as Atualizações Transitórias (Transient Updates)</text:span></text:p>
      <text:p text:style-name="P1"><text:span text:style-name="T1">Mesmo o uso do </text:span><text:span text:style-name="T2">Zustand</text:span><text:span text:style-name="T1"> ancorado ao </text:span><text:span text:style-name="T2">VDOM</text:span><text:span text:style-name="T1"> não é rápido o suficiente quando os estresses das exigências tangenciam rastreadores dinâmicos vinculados à fluidez atrelada às interatividades contínuas oscilatórias originadas das redes remotas sem interface humana. Quando os estrangulamentos proíbem repinturas sistêmicas ociosas ditadas por estruturas abstratas iterativas, as camadas operacionais abandonam a reconciliação algorítmica declarativa e abraçam o bypass (desvio transgressivo imperativo) utilizando Micro-Renderizações, popularmente cunhadas como Atualizações Transitórias (</text:span><text:span text:style-name="T2">Transient Updates</text:span><text:span text:style-name="T1">).</text:span><text:span text:style-name="T7">1</text:span></text:p>
      <text:p text:style-name="P1"><text:span text:style-name="T1">As diretrizes forçam uma cisão categórica:</text:span></text:p>
      <text:list xml:id="list1843529018" text:style-name="WWNum1">
        <text:list-item>
          <text:p text:style-name="P4"><text:span text:style-name="T5">Âncoras Inertiais via useRef</text:span><text:span text:style-name="T1">: O alvo físico que suportará agressões dinâmicas cessa as instâncias geradas através do ciclo unidirecional e amarra seu construto unicamente em reservas passivas fixas instanciadas pelo useRef. Essa estratégia bane a propriedade do rastreador sistêmico difuso, protegendo as variações no repositório oculto fora dos olhos da máquina matriz.</text:span><text:span text:style-name="T7">1</text:span></text:p>
        </text:list-item>
        <text:list-item>
          <text:p text:style-name="P4"><text:span text:style-name="T5">Desacoplamento de </text:span><text:span text:style-name="T3">Closures</text:span><text:span text:style-name="T1">: As chamadas da rede (por exemplo, informações sobre volume transladado das matrizes de som) são encapsuladas numa clausura (</text:span><text:span text:style-name="T2">closure</text:span><text:span text:style-name="T1">) e ligadas diretamente às camadas locais sem dependências ou invocações reativas sistêmicas.</text:span><text:span text:style-name="T7">1</text:span></text:p>
        </text:list-item>
        <text:list-item>
          <text:p text:style-name="P4"><text:span text:style-name="T5">Mutações Cruzadas Nativas em </text:span><draw:frame draw:style-name="fr1" draw:name="image2.png" text:anchor-type="as-char" svg:width="0.4429in" svg:height="0.2646in" draw:z-index="0"><draw:image xlink:href="Pictures/1000020100000039000000224A9B561C60B07188.png" xlink:type="simple" xlink:show="embed" xlink:actuate="onLoad" loext:mime-type="image/png"/></draw:frame><text:span text:style-name="T1">: Quando os dados se atualizam em repetições exaustivas a cada microssegundo, a função acoplada ao gatilho bypass expropria o invólucro do DOM nativo subjacente (e.g., ref.current.style.transform = interpolacaoDinamica). Ela interpola instruções C++ no tecido interativo cru de nível básico em complexidade de tempo constante, escapando perfeitamente imaculada da conciliação abstrata do ambiente declarativo sem impor desgastes de interrupções de travessia maciça a nenhuma matriz de renderização.</text:span><text:span text:style-name="T7">1</text:span><text:span text:style-name="T1"> A escalabilidade infinita de interfaces hiperdensas funda-se nesta subversão física controlada e rigorosamente planejada.</text:span></text:p>
        </text:list-item>
      </text:list>
      <text:p text:style-name="P11"><text:span text:style-name="T1">8. Abstenção do JSON e a Vanguarda da Injeção Binária Assíncrona</text:span></text:p>
      <text:p text:style-name="P1"><text:span text:style-name="T1">Alimentar painéis operativos complexos ou ferramentas interativas tridimensionais iterando </text:span><text:span text:style-name="T2">WebSockets</text:span><text:span text:style-name="T1"> utilizando o empacotamento legado de formatação de notação textual restritiva baseada no formato objeto (JSON) desestabiliza a estabilidade mecânica sistêmica da aplicação e atiça fatalmente os engarrafamentos de memória e Coletor de Lixo do motor.</text:span><text:span text:style-name="T7">1</text:span><text:span text:style-name="T1"> As transformações sintáticas de análise onerosas baseadas em </text:span><text:span text:style-name="T2">strings</text:span><text:span text:style-name="T1"> primitivas impõem decodificações longas na base alfanumérica.</text:span><text:span text:style-name="T7">1</text:span></text:p>
      <text:p text:style-name="P9"><text:span text:style-name="T1">8.1. O Protocolo ETF (Erlang Term Format) e os Feixes Compactados</text:span></text:p>
      <text:p text:style-name="P1"><text:span text:style-name="T1">A mitigação implementada em infraestruturas Tier-1 pressupõe adoção inabalável de codificações estruturadas contíguas baseadas em semântica binária compressiva. Em aplicações que interligam massivas instâncias de transmissões simultâneas operadas via bases cruciais </text:span><text:span text:style-name="T2">WebRTC</text:span><text:span text:style-name="T1"> integradas assiduamente, o formato binário originário das fundações da linguagem Elixir/Erlang (Erlang Term Format - ETF) acarreta compactações e encurtamentos estritos aos pacotes transitados sobre redes WebSocket.</text:span><text:span text:style-name="T7">32</text:span><text:span text:style-name="T1"> Diferentemente da serialização repetitiva onerosa inerente às tags literais associadas a JSON, a transposição compacta via ETF (ou </text:span><text:span text:style-name="T2">Protocol Buffers</text:span><text:span text:style-name="T1"> avançados) envia matrizes contíguas previsíveis que embutem descritores purificados numéticos isentos do peso morfológico denso, salvando substancial largura de banda e poupando a máquina V8 de purgar strings temporárias supérfluas.</text:span><text:span text:style-name="T7">1</text:span></text:p>
      <text:p text:style-name="P9"><text:span text:style-name="T1">8.2. O Protocolo Kiwi e o Ambiente Gráfico WASM</text:span></text:p>
      <text:p text:style-name="P1"><text:span text:style-name="T1">Nas áreas tangenciais do design vetorial imersivo de colaboração massiva (Figma), abandonam-se totalmente as abstrações descritivas usuais da API REST e das atualizações longas. Todas as malhas iterativas comunicacionais repousam num projeto binário proprietário elaborado por Evan Wallace designado </text:span><text:span text:style-name="T2">Protocolo Kiwi</text:span><text:span text:style-name="T1">.</text:span><text:span text:style-name="T7">35</text:span><text:span text:style-name="T1"> Em um esforço extremo para reduzir a redundância analítica estática e alavancar escalabilidade algorítmica, o Kiwi é caracterizado pela ausência da injeção do descritor de esquemas e da semântica intrínseca dentro do fluxo das extremidades; pressupõe-se que a aplicação web frontal já retém e entende os mapeamentos estritos (</text:span><text:span text:style-name="T2">non-self-describing schema format</text:span><text:span text:style-name="T1">).</text:span></text:p>
      <text:p text:style-name="P1"><text:span text:style-name="T1">Este binário de serialização comprimida despacha diretamente propriedades numéricas exíguas por soquetes.</text:span><text:span text:style-name="T7">35</text:span><text:span text:style-name="T1"> Transpondo os feixes vetoriais não documentados (</text:span><text:span text:style-name="T2">vectorNetworkBlob</text:span><text:span text:style-name="T1"> e </text:span><text:span text:style-name="T2">commandsBlob</text:span><text:span text:style-name="T1">) oriundos diretamente para a matriz do motor isolado e empacotado internamente nos </text:span><text:span text:style-name="T2">WebAssembly</text:span><text:span text:style-name="T1"> (WASM) rodando simultâneos na prancheta interativa, evita-se atravessar as intersecções lentas do Javascript principal.</text:span><text:span text:style-name="T7">37</text:span><text:span text:style-name="T1"> As operações ocorrem diretamente no alicerce nativo e renderizador paralelo via WebGL, transcrevendo complexidade O(n) garantida sem oscilações pesadas ou colapsos generalizados no coletor.</text:span><text:span text:style-name="T7">28</text:span></text:p>
      <text:p text:style-name="P9"><text:span text:style-name="T1">8.3. Mecânica do </text:span><text:span text:style-name="T6">ArrayBuffer</text:span><text:span text:style-name="T1">, </text:span><text:span text:style-name="T6">BackingStore</text:span><text:span text:style-name="T1"> C++ e Transferência Zero-Copy</text:span></text:p>
      <text:p text:style-name="P1"><text:span text:style-name="T1">A ingestão destas transmissões no motor V8 de última geração prescinde do colapso de memória via abordagens conhecidas por alocação limpa de ponteiros referenciados (</text:span><text:span text:style-name="T2">Zero-Copy</text:span><text:span text:style-name="T1">) operada na conjunção do uso de bibliotecas de altíssima octanagem, a exemplo das amarras da uWebSockets.js.</text:span><text:span text:style-name="T7">1</text:span><text:span text:style-name="T1"> Quando os fluxos hiperdinâmicos transitam, instrui-se na base cliente e servidora a diretriz exata para abstração purificada de recepção (ws.binaryType = "arraybuffer").</text:span><text:span text:style-name="T7">1</text:span></text:p>
      <text:p text:style-name="P1"><text:span text:style-name="T1">Sob esta arquitetura implacável, o recebedor nativo residente em C++ (Blink) reserva uma cadeia de </text:span><text:span text:style-name="T2">bytes</text:span><text:span text:style-name="T1"> primários da RAM alocada diretamente no sistema operacional nativo desprovido das engrenagens lentas do JS, identificada arquiteturalmente nos confins nativos pela nomenclatura BackingStore.</text:span><text:span text:style-name="T7">1</text:span><text:span text:style-name="T1"> Em lugar de clonar intensivamente milhares de pacotes e descarregá-los num espelho dentro da frágil zona jovem do </text:span><text:span text:style-name="T2">Garbage Collector</text:span><text:span text:style-name="T1"> da máquina V8 — uma cópia pesada (</text:span><text:span text:style-name="T2">deep clone</text:span><text:span text:style-name="T1">) letal para as métricas da GPU —, o mecanismo C++ sinaliza unicamente a geração de um inofensivo cabeçalho envelopado, estruturando no JavaScript global um minúsculo objeto referencial intitulado </text:span><text:span text:style-name="T2">ArrayBuffer</text:span><text:span text:style-name="T1">.</text:span><text:span text:style-name="T7">1</text:span></text:p>
      <text:p text:style-name="P1"><text:span text:style-name="T1">Este constructo repassa puramente um ponteiro referenciado indireto que acena ao endereço físico subjacente atado rigidamente ao BackingStore retido livre das perturbações e exaustivas operações C++.</text:span><text:span text:style-name="T7">1</text:span><text:span text:style-name="T1"> Aliando esta transferência estrita de descritores passivos dentro do limite dos </text:span><text:span text:style-name="T2">workers</text:span><text:span text:style-name="T1">, as bibliotecas </text:span><text:span text:style-name="T2">backend</text:span><text:span text:style-name="T1"> despacham eventos para a aplicação onde as cláusulas captam os dados por índices vetoriais (Uint8Array) sem desencadear repetições de varreduras na alocação volátil.</text:span><text:span text:style-name="T7">1</text:span><text:span text:style-name="T1"> A memória subjacente não instiga nenhuma perturbação nos coletores GC, viabilizando injetores de altíssima concorrência para repasses pontuais.</text:span><text:span text:style-name="T7">1</text:span></text:p>
      <text:p text:style-name="P11"><text:span text:style-name="T1">9. Integração e Evidência Empírica nos Monólitos Tier-1</text:span></text:p>
      <text:p text:style-name="P1"><text:soft-page-break/><text:span text:style-name="T1">A eficácia do arcabouço tecnológico analisado ratifica-se sumariamente ao invocar as aplicações submetidas de mercado operando nas barreiras dos limites escalares onde o fracasso no manuseio das heurísticas do navegador resulta em paralisias fatais.</text:span><text:span text:style-name="T7">1</text:span></text:p>
      <text:p text:style-name="P1"><text:span text:style-name="T1">O </text:span><text:span text:style-name="T2">Discord</text:span><text:span text:style-name="T1">, pilar fundacional da difusão síncrona hiper-densa, sustenta milhões de assinaturas sobre canais WebRTC concorrentes. A carga de estresse manifesta-se criticamente nas silhuetas oscilatórias indicativas incrustadas no anel esmeraldino que envolve o emblema de usuários falantes no interior de malhas densamente povoadas de interlocutores. Mapear as dinâmicas hiper-flutuantes desses </text:span><text:span text:style-name="T2">faders</text:span><text:span text:style-name="T1"> rítmicos associando-os organicamente às raízes massivas dos diretórios de componentes iterativos de React causaria a aniquilação completa de desempenho por conta das reavaliações cascateadas da conciliação Universal a cada flutuação vocal rítmica no </text:span><text:span text:style-name="T2">frame</text:span><text:span text:style-name="T1">.</text:span><text:span text:style-name="T7">1</text:span><text:span text:style-name="T1"> Desviando-se agressivamente do modelo dogmático, suas engenheiras incorporam inscrições de </text:span><text:span text:style-name="T2">Transient Updates</text:span><text:span text:style-name="T1"> assíncronas paralelas ao núcleo. Injeções diretas orientam a retransmissão e interpolação transitória sobre âncoras suspensas isoladas das dependências de raiz, atestando a primazia das micro-renderizações contornando impecavelmente a penalidade imposta pela difusão do </text:span><text:span text:style-name="T2">Virtual DOM</text:span><text:span text:style-name="T1"> para preservar interatividade na presença de intensa mutabilidade de rede sem sacrificar estabilidade monomórfica cristalina provida pelos restritivos fluxos </text:span><text:span text:style-name="T2">Typescript</text:span><text:span text:style-name="T1"> originais.</text:span><text:span text:style-name="T7">1</text:span></text:p>
      <text:p text:style-name="P1"><text:span text:style-name="T1">Na trajetória evolutiva paralela consubstanciada nos motores da malha comunicacional central de ambiente laborativo em </text:span><text:span text:style-name="T2">Slack Desktop</text:span><text:span text:style-name="T1">, as frentes primordiais deflagraram o resgate de antigas fundações de empacotadores legados jQuery atrelados à carcaça do </text:span><text:span text:style-name="T2">Electron</text:span><text:span text:style-name="T1">. Estas fundações operavam abismos sistêmicos irrefreáveis nas máquinas usuárias em razão das alocações diretas contínuas desenfreadas ao longo do fluxo manipulativo bruto.</text:span><text:span text:style-name="T7">1</text:span><text:span text:style-name="T1"> O enveredar aos blocos construtivos modulares da arquitetura composicional VDOM do React equalizou, numa escala global ampla, os surtos predatórios das alocações ramificadas inconstantes.</text:span><text:span text:style-name="T7">1</text:span><text:span text:style-name="T1"> Não obstante a coesão garantida pelo React na estática e orquestração preditiva basal, os desenvolvedores de ponta deliberadamente abandonam a algema do fluxo universal em redutos especializados dotados de interatividade transeunte. Nas micro-interações subalternas, contornos híbridos impõem bypasses independentes que acionam manipulações estritas injetando atualizações cruas atreladas às fronteiras da interface vetorial sem engarrafar as ramificações de conciliação.</text:span><text:span text:style-name="T7">1</text:span></text:p>
      <text:p text:style-name="P6"><text:span text:style-name="T1">A simbiose alcança sua epítome ao confrontar a termodinâmica intransigente imposta pelo tempo.</text:span><text:span text:style-name="T7">1</text:span><text:span text:style-name="T1"> Nos monólitos providos de orçamentos marginais de latência e processamento exíguo (o estrangulamento inescapável do teto orçamentário dos </text:span><draw:frame draw:style-name="fr1" draw:name="Image1" text:anchor-type="as-char" svg:width="0.6693in" svg:height="0.2681in" draw:z-index="0"><draw:image xlink:href="Pictures/100002010000005500000022B1EF8A7E7394610F.png" xlink:type="simple" xlink:show="embed" xlink:actuate="onLoad" loext:mime-type="image/png"/></draw:frame><text:span text:style-name="T1"><text:s/>limitantes para garantir as exibições cinéticas isentas de perdas estéticas na cadência dos 60 </text:span><text:span text:style-name="T2">frames</text:span><text:span text:style-name="T1"> visuais fluidos por segundo) </text:span><text:span text:style-name="T7">1</text:span><text:span text:style-name="T1">, os desenvolvedores transcendem a superfície instrumental. Compreendendo visceralmente a fisicalidade basal residente nos porões das compilações de máquina provida das infraestruturas de TurboFan em Motores V8 em ambientes navegadores, atrelando as morfologias dos dados rigorosamente a restrições gramaticais de Caching Monomórfico orientados pelas amarras das interfaces predatórias controladas das matrizes em TypeScript puro, e suplantando dogmas ao aniquilar conciliações por meio de injetores subversivos imperativos transitórios </text:span><text:span text:style-name="T2">Zero-Copy</text:span><text:span text:style-name="T1"> nos eixos de conexão, os engenheiros destas plataformas dominam as heurísticas, materializando a vanguarda e o limite performático derradeiro absoluto de interatividade massiva e resiliência das aplicações baseadas no escopo mundial provido pela rede </text:span><text:span text:style-name="T2">Web</text:span><text:span text:style-name="T1"> na atualidade contemporânea.</text:span></text:p>
      <text:p text:style-name="P8"><text:span text:style-name="T8">Referências citadas</text:span></text:p>
      <text:list xml:id="list1709639989" text:style-name="WWNum2">
        <text:list-item>
          <text:p text:style-name="P5"><text:span text:style-name="T9">Otimização TypeScript em Projetos React.pdf</text:span></text:p>
        </text:list-item>
        <text:list-item>
          <text:p text:style-name="P5"><text:span text:style-name="T9">How TypeScript Makes Your JavaScript Faster | by 0xfurai, acessado em junho 26, 2026, </text:span><text:a xlink:type="simple" xlink:href="https://javascript.plainenglish.io/how-typescript-makes-your-javascript-faster-without-you-knowing-it-359ce45bec2c" text:style-name="ListLabel_20_19" text:visited-style-name="ListLabel_20_19"><text:span text:style-name="T10">https://javascript.plainenglish.io/how-typescript-makes-your-javascript-faster-without-you-knowing-it-359ce45bec2c</text:span></text:a></text:p>
        </text:list-item>
        <text:list-item>
          <text:p text:style-name="P5"><text:span text:style-name="T9">What's up with monomorphism?, acessado em junho 26, 2026, </text:span><text:a xlink:type="simple" xlink:href="https://mrale.ph/blog/2015/01/11/whats-up-with-monomorphism.html" text:style-name="ListLabel_20_19" text:visited-style-name="ListLabel_20_19"><text:span text:style-name="T10">https://mrale.ph/blog/2015/01/11/whats-up-with-monomorphism.html</text:span></text:a></text:p>
        </text:list-item>
        <text:list-item>
          <text:p text:style-name="P5"><text:span text:style-name="T9">V8 JavaScript Engine in Node.js: Architecture, Tiers, Shapes, and Deoptimization, acessado em junho 26, 2026, </text:span><text:a xlink:type="simple" xlink:href="https://www.thenodebook.com/node-arch/v8-engine-intro" text:style-name="ListLabel_20_19" text:visited-style-name="ListLabel_20_19"><text:span text:style-name="T10">https://www.thenodebook.com/node-arch/v8-engine-intro</text:span></text:a></text:p>
        </text:list-item>
        <text:list-item>
          <text:p text:style-name="P5"><text:span text:style-name="T9">Performance tips for JavaScript in V8 | Articles - web.dev, acessado em junho 26, 2026, </text:span><text:a xlink:type="simple" xlink:href="https://web.dev/articles/speed-v8" text:style-name="ListLabel_20_19" text:visited-style-name="ListLabel_20_19"><text:span text:style-name="T10">https://web.dev/articles/speed-v8</text:span></text:a></text:p>
        </text:list-item>
        <text:list-item>
          <text:p text:style-name="P5"><text:span text:style-name="T9">V8 Deopts: 9 Silent Hot-Path Killers | by Thinking Loop | Medium, acessado em junho 26, 2026, </text:span><text:a xlink:type="simple" xlink:href="https://medium.com/@ThinkingLoop/v8-deopts-9-silent-hot-path-killers-df40aabd0209" text:style-name="ListLabel_20_19" text:visited-style-name="ListLabel_20_19"><text:span text:style-name="T10">https://medium.com/@ThinkingLoop/v8-deopts-9-silent-hot-path-killers-df40aabd0209</text:span></text:a></text:p>
        </text:list-item>
        <text:list-item>
          <text:p text:style-name="P5"><text:span text:style-name="T9">V8 function optimization - Blog by Kemal Erdem, acessado em junho 26, 2026, </text:span><text:a xlink:type="simple" xlink:href="https://erdem.pl/2019/08/v-8-function-optimization/" text:style-name="ListLabel_20_19" text:visited-style-name="ListLabel_20_19"><text:span text:style-name="T10">https://erdem.pl/2019/08/v-8-function-optimization/</text:span></text:a></text:p>
        </text:list-item>
        <text:list-item>
          <text:p text:style-name="P5"><text:span text:style-name="T9">Performance through Elegant JavaScript | by Jan Pöschko | Wolfram Developers - Medium, acessado em junho 26, 2026, </text:span><text:a xlink:type="simple" xlink:href="https://medium.com/wolfram-developers/performance-through-elegant-javascript-15b98f0904de" text:style-name="ListLabel_20_19" text:visited-style-name="ListLabel_20_19"><text:span text:style-name="T10">https://medium.com/wolfram-developers/performance-through-elegant-javascript-15b98f0904de</text:span></text:a></text:p>
        </text:list-item>
        <text:list-item>
          <text:p text:style-name="P5"><text:span text:style-name="T9">Hidden Classes: The JavaScript performance secret that changed everything, acessado em junho 26, 2026, </text:span><text:a xlink:type="simple" xlink:href="https://dev.to/maxprilutskiy/hidden-classes-the-javascript-performance-secret-that-changed-everything-3p6c" text:style-name="ListLabel_20_19" text:visited-style-name="ListLabel_20_19"><text:span text:style-name="T10">https://dev.to/maxprilutskiy/hidden-classes-the-javascript-performance-secret-that-changed-everything-3p6c</text:span></text:a></text:p>
        </text:list-item>
        <text:list-item>
          <text:p text:style-name="P5"><text:span text:style-name="T9">The Hidden JavaScript Engine Optimization That Makes Your Code 40% Slower, acessado em junho 26, 2026, </text:span><text:a xlink:type="simple" xlink:href="https://javascript.plainenglish.io/the-hidden-javascript-engine-optimization-that-makes-your-code-40-slower-26994e837830" text:style-name="ListLabel_20_19" text:visited-style-name="ListLabel_20_19"><text:span text:style-name="T10">https://javascript.plainenglish.io/the-hidden-javascript-engine-optimization-that-makes-your-code-40-slower-26994e837830</text:span></text:a></text:p>
        </text:list-item>
        <text:list-item>
          <text:p text:style-name="P5"><text:span text:style-name="T9">JavaScript Object Internals-From Hidden Classes to Hash Maps | by Berkay ÇIRAK, acessado em junho 26, 2026, </text:span><text:a xlink:type="simple" xlink:href="https://medium.com/@berkaycrk/javascript-object-internals-from-hidden-classes-to-hash-maps-7d96e07feb1b" text:style-name="ListLabel_20_19" text:visited-style-name="ListLabel_20_19"><text:span text:style-name="T10">https://medium.com/@berkaycrk/javascript-object-internals-from-hidden-classes-to-hash-maps-7d96e07feb1b</text:span></text:a></text:p>
        </text:list-item>
        <text:list-item>
          <text:p text:style-name="P5"><text:span text:style-name="T9">The V8 Engine Series III: Inline Caching — Unlocking JavaScript Performance, acessado em junho 26, 2026, </text:span><text:a xlink:type="simple" xlink:href="https://braineanear.medium.com/the-v8-engine-series-iii-inline-caching-unlocking-javascript-performance-51cf09a64cc3" text:style-name="ListLabel_20_19" text:visited-style-name="ListLabel_20_19"><text:span text:style-name="T10">https://braineanear.medium.com/the-v8-engine-series-iii-inline-caching-unlocking-javascript-performance-51cf09a64cc3</text:span></text:a></text:p>
        </text:list-item>
        <text:list-item>
          <text:p text:style-name="P5"><text:span text:style-name="T9">Understanding Monomorphism to Improve Your JS Performance up to 60x - Builder.io, acessado em junho 26, 2026, </text:span><text:a xlink:type="simple" xlink:href="https://www.builder.io/blog/monomorphic-javascript" text:style-name="ListLabel_20_19" text:visited-style-name="ListLabel_20_19"><text:span text:style-name="T10">https://www.builder.io/blog/monomorphic-javascript</text:span></text:a></text:p>
        </text:list-item>
        <text:list-item>
          <text:p text:style-name="P5"><text:span text:style-name="T9">The TypeScript Performance Lie: How V8 Actually Runs Your Code - DEV Community, acessado em junho 26, 2026, </text:span><text:a xlink:type="simple" xlink:href="https://dev.to/krendmx/the-typescript-performance-lie-how-v8-actually-runs-your-code-48gd" text:style-name="ListLabel_20_19" text:visited-style-name="ListLabel_20_19"><text:span text:style-name="T10">https://dev.to/krendmx/the-typescript-performance-lie-how-v8-actually-runs-your-code-48gd</text:span></text:a></text:p>
        </text:list-item>
        <text:list-item>
          <text:p text:style-name="P5"><text:span text:style-name="T9">Introducing Deopt Explorer - TypeScript - Microsoft Developer Blogs, acessado em junho 26, 2026, </text:span><text:a xlink:type="simple" xlink:href="https://devblogs.microsoft.com/typescript/introducing-deopt-explorer/" text:style-name="ListLabel_20_19" text:visited-style-name="ListLabel_20_19"><text:span text:style-name="T10">https://devblogs.microsoft.com/typescript/introducing-deopt-explorer/</text:span></text:a></text:p>
        </text:list-item>
        <text:list-item>
          <text:p text:style-name="P5"><text:span text:style-name="T9">Be aware of Arrays - V8 engine advice - DEV Community, acessado em junho 26, 2026, </text:span><text:a xlink:type="simple" xlink:href="https://dev.to/alirezaebrahimkhani/be-careful-about-arrays-v8-engine-advice-1pmk" text:style-name="ListLabel_20_19" text:visited-style-name="ListLabel_20_19"><text:span text:style-name="T10">https://dev.to/alirezaebrahimkhani/be-careful-about-arrays-v8-engine-advice-1pmk</text:span></text:a></text:p>
        </text:list-item>
        <text:list-item>
          <text:p text:style-name="P5"><text:soft-page-break/><text:span text:style-name="T9">Elements kinds in V8 - V8 JavaScript engine, acessado em junho 26, 2026, </text:span><text:a xlink:type="simple" xlink:href="https://v8.dev/blog/elements-kinds" text:style-name="ListLabel_20_19" text:visited-style-name="ListLabel_20_19"><text:span text:style-name="T10">https://v8.dev/blog/elements-kinds</text:span></text:a></text:p>
        </text:list-item>
        <text:list-item>
          <text:p text:style-name="P5"><text:span text:style-name="T9">How TypeScript Improves JavaScript Performance Through JIT Optimization - Medium, acessado em junho 26, 2026, </text:span><text:a xlink:type="simple" xlink:href="https://medium.com/@tharunbalaji110/how-typescript-improves-javascript-performance-through-jit-optimization-99e53a3b0535" text:style-name="ListLabel_20_19" text:visited-style-name="ListLabel_20_19"><text:span text:style-name="T10">https://medium.com/@tharunbalaji110/how-typescript-improves-javascript-performance-through-jit-optimization-99e53a3b0535</text:span></text:a></text:p>
        </text:list-item>
        <text:list-item>
          <text:p text:style-name="P5"><text:span text:style-name="T9">Performance: Monomorphic AST Nodes · Issue #59198 · microsoft/TypeScript - GitHub, acessado em junho 26, 2026, </text:span><text:a xlink:type="simple" xlink:href="https://github.com/microsoft/TypeScript/issues/59198" text:style-name="ListLabel_20_19" text:visited-style-name="ListLabel_20_19"><text:span text:style-name="T10">https://github.com/microsoft/TypeScript/issues/59198</text:span></text:a></text:p>
        </text:list-item>
        <text:list-item>
          <text:p text:style-name="P5"><text:span text:style-name="T9">GitHub - microsoft/deoptexplorer-vscode: A VS Code extension to visualize deoptimizations in your JavaScript and TypeScript code running in V8 (i.e., NodeJS, Edge, Chrome, etc.)., acessado em junho 26, 2026, </text:span><text:a xlink:type="simple" xlink:href="https://github.com/microsoft/deoptexplorer-vscode" text:style-name="ListLabel_20_19" text:visited-style-name="ListLabel_20_19"><text:span text:style-name="T10">https://github.com/microsoft/deoptexplorer-vscode</text:span></text:a></text:p>
        </text:list-item>
        <text:list-item>
          <text:p text:style-name="P5"><text:span text:style-name="T9">Writing Efficient Memory Cache Algorithms [part 1] - Andrei Marchenko, acessado em junho 26, 2026, </text:span><text:a xlink:type="simple" xlink:href="https://amarchenko.dev/blog/2023-10-12-memory-cache/" text:style-name="ListLabel_20_19" text:visited-style-name="ListLabel_20_19"><text:span text:style-name="T10">https://amarchenko.dev/blog/2023-10-12-memory-cache/</text:span></text:a></text:p>
        </text:list-item>
        <text:list-item>
          <text:p text:style-name="P5"><text:span text:style-name="T9">Calling typeof on extended PrismaClient is extremely slow · Issue #19605 - GitHub, acessado em junho 26, 2026, </text:span><text:a xlink:type="simple" xlink:href="https://github.com/prisma/prisma/issues/19605" text:style-name="ListLabel_20_19" text:visited-style-name="ListLabel_20_19"><text:span text:style-name="T10">https://github.com/prisma/prisma/issues/19605</text:span></text:a></text:p>
        </text:list-item>
        <text:list-item>
          <text:p text:style-name="P5"><text:span text:style-name="T9">My VSCode is painfully slow in this one TS project - Is Zod killing the performance or something else? Please help review my settings : r/typescript - Reddit, acessado em junho 26, 2026, </text:span><text:a xlink:type="simple" xlink:href="https://www.reddit.com/r/typescript/comments/1m74ap9/my_vscode_is_painfully_slow_in_this_one_ts/" text:style-name="ListLabel_20_19" text:visited-style-name="ListLabel_20_19"><text:span text:style-name="T10">https://www.reddit.com/r/typescript/comments/1m74ap9/my_vscode_is_painfully_slow_in_this_one_ts/</text:span></text:a></text:p>
        </text:list-item>
        <text:list-item>
          <text:p text:style-name="P5"><text:span text:style-name="T9">Optimizing TypeScript performance with large Prisma schemas, acessado em junho 26, 2026, </text:span><text:a xlink:type="simple" xlink:href="https://www.prisma.io/docs/orm/more/troubleshooting/typescript-performance" text:style-name="ListLabel_20_19" text:visited-style-name="ListLabel_20_19"><text:span text:style-name="T10">https://www.prisma.io/docs/orm/more/troubleshooting/typescript-performance</text:span></text:a></text:p>
        </text:list-item>
        <text:list-item>
          <text:p text:style-name="P5"><text:span text:style-name="T9">Handling Java Out of Memory Issues in Websocket Application | by V Ramya - Medium, acessado em junho 26, 2026, </text:span><text:a xlink:type="simple" xlink:href="https://ramyav.medium.com/handling-java-out-of-memory-issues-in-websocket-application-90ee33e936e3" text:style-name="ListLabel_20_19" text:visited-style-name="ListLabel_20_19"><text:span text:style-name="T10">https://ramyav.medium.com/handling-java-out-of-memory-issues-in-websocket-application-90ee33e936e3</text:span></text:a></text:p>
        </text:list-item>
        <text:list-item>
          <text:p text:style-name="P5"><text:span text:style-name="T9">Understanding garbage collection: A developer's guide to memory management - Aerospike, acessado em junho 26, 2026, </text:span><text:a xlink:type="simple" xlink:href="https://aerospike.com/blog/understanding-garbage-collection/" text:style-name="ListLabel_20_19" text:visited-style-name="ListLabel_20_19"><text:span text:style-name="T10">https://aerospike.com/blog/understanding-garbage-collection/</text:span></text:a></text:p>
        </text:list-item>
        <text:list-item>
          <text:p text:style-name="P5"><text:span text:style-name="T9">Garbage collection in V8, an illustrated guide | by Irina Shestak | Medium, acessado em junho 26, 2026, </text:span><text:a xlink:type="simple" xlink:href="https://medium.com/@_lrlna/garbage-collection-in-v8-an-illustrated-guide-d24a952ee3b8" text:style-name="ListLabel_20_19" text:visited-style-name="ListLabel_20_19"><text:span text:style-name="T10">https://medium.com/@_lrlna/garbage-collection-in-v8-an-illustrated-guide-d24a952ee3b8</text:span></text:a></text:p>
        </text:list-item>
        <text:list-item>
          <text:p text:style-name="P5"><text:span text:style-name="T9">Exploring garbage collection in V8 with WebGL | William Henderson, acessado em junho 26, 2026, </text:span><text:a xlink:type="simple" xlink:href="https://whenderson.dev/blog/webgl-garbage-collection/" text:style-name="ListLabel_20_19" text:visited-style-name="ListLabel_20_19"><text:span text:style-name="T10">https://whenderson.dev/blog/webgl-garbage-collection/</text:span></text:a></text:p>
        </text:list-item>
        <text:list-item>
          <text:p text:style-name="P5"><text:span text:style-name="T9">Optimization of Cross-Language Invocation - Cocos Creator, acessado em junho 26, 2026, </text:span><text:a xlink:type="simple" xlink:href="https://docs.cocos.com/creator/3.8/manual/en/advanced-topics/jsb-optimizations.html" text:style-name="ListLabel_20_19" text:visited-style-name="ListLabel_20_19"><text:span text:style-name="T10">https://docs.cocos.com/creator/3.8/manual/en/advanced-topics/jsb-optimizations.html</text:span></text:a></text:p>
        </text:list-item>
        <text:list-item>
          <text:p text:style-name="P5"><text:span text:style-name="T9">Web Sockets are not efficient and hard to scale, change my view. - Reddit, acessado em junho 26, 2026, </text:span><text:a xlink:type="simple" xlink:href="https://www.reddit.com/r/reactjs/comments/18ogc0o/web_sockets_are_not_efficient_and_hard_to_scale/" text:style-name="ListLabel_20_19" text:visited-style-name="ListLabel_20_19"><text:span text:style-name="T10">https://www.reddit.com/r/reactjs/comments/18ogc0o/web_sockets_are_not_efficient_and_hard_to_scale/</text:span></text:a></text:p>
        </text:list-item>
        <text:list-item>
          <text:p text:style-name="P5"><text:span text:style-name="T9">Improving Facebook's performance on Android with FlatBuffers - Engineering at Meta, acessado em junho 26, 2026, </text:span><text:a xlink:type="simple" xlink:href="https://engineering.fb.com/2015/07/31/android/improving-facebook-s-performance-on-android-with-flatbuffers/" text:style-name="ListLabel_20_19" text:visited-style-name="ListLabel_20_19"><text:span text:style-name="T10">https://engineering.fb.com/2015/07/31/android/improving-facebook-s-performance-on-android-with-flatbuffers/</text:span></text:a></text:p>
        </text:list-item>
        <text:list-item>
          <text:p text:style-name="P5"><text:span text:style-name="T9">Discord Reduced WebSocket Traffic by 40% | Hacker News, acessado em junho 26, 2026, </text:span><text:a xlink:type="simple" xlink:href="https://news.ycombinator.com/item?id=41604267" text:style-name="ListLabel_20_19" text:visited-style-name="ListLabel_20_19"><text:span text:style-name="T10">https://news.ycombinator.com/item?id=41604267</text:span></text:a></text:p>
        </text:list-item>
        <text:list-item>
          <text:p text:style-name="P5"><text:span text:style-name="T9">dpp Namespace Reference - D++ - The lightweight C++ Discord API Library, acessado em junho 26, 2026, </text:span><text:a xlink:type="simple" xlink:href="https://dpp.dev/namespacedpp.html" text:style-name="ListLabel_20_19" text:visited-style-name="ListLabel_20_19"><text:span text:style-name="T10">https://dpp.dev/namespacedpp.html</text:span></text:a></text:p>
        </text:list-item>
        <text:list-item>
          <text:p text:style-name="P5"><text:span text:style-name="T9">How to Handle WebSocket Binary Messages - OneUptime, acessado em junho 26, 2026, </text:span><text:a xlink:type="simple" xlink:href="https://oneuptime.com/blog/post/2026-01-24-websocket-binary-messages/view" text:style-name="ListLabel_20_19" text:visited-style-name="ListLabel_20_19"><text:span text:style-name="T10">https://oneuptime.com/blog/post/2026-01-24-websocket-binary-messages/view</text:span></text:a></text:p>
        </text:list-item>
        <text:list-item>
          <text:p text:style-name="P5"><text:span text:style-name="T9">GitHub - zfedoran/brine-kiwi: Kiwi is a schema-based binary format for efficiently encoding trees of data., acessado em junho 26, 2026, </text:span><text:a xlink:type="simple" xlink:href="https://github.com/zfedoran/brine-kiwi" text:style-name="ListLabel_20_19" text:visited-style-name="ListLabel_20_19"><text:span text:style-name="T10">https://github.com/zfedoran/brine-kiwi</text:span></text:a></text:p>
        </text:list-item>
        <text:list-item>
          <text:p text:style-name="P5"><text:span text:style-name="T9">Figma - Made by Evan, acessado em junho 26, 2026, </text:span><text:a xlink:type="simple" xlink:href="https://madebyevan.com/figma/" text:style-name="ListLabel_20_19" text:visited-style-name="ListLabel_20_19"><text:span text:style-name="T10">https://madebyevan.com/figma/</text:span></text:a></text:p>
        </text:list-item>
        <text:list-item>
          <text:p text:style-name="P5"><text:span text:style-name="T9">MCP/Skills/CLI/libs to Decode Figma's binary Kiwi wire protocol: extract scenegraph, SVGs, and CSS from WebSocket frames, bypassing REST API rate limits. - GitHub, acessado em junho 26, 2026, </text:span><text:a xlink:type="simple" xlink:href="https://github.com/allan-simon/figma-kiwi-protocol" text:style-name="ListLabel_20_19" text:visited-style-name="ListLabel_20_19"><text:span text:style-name="T10">https://github.com/allan-simon/figma-kiwi-protocol</text:span></text:a></text:p>
        </text:list-item>
        <text:list-item>
          <text:p text:style-name="P5"><text:soft-page-break/><text:span text:style-name="T9">note4yaoo/lib-editor-app-blog-stars.md at main - GitHub, acessado em junho 26, 2026, </text:span><text:a xlink:type="simple" xlink:href="https://github.com/uptonking/note4yaoo/blob/main/lib-editor-app-blog-stars.md" text:style-name="ListLabel_20_19" text:visited-style-name="ListLabel_20_19"><text:span text:style-name="T10">https://github.com/uptonking/note4yaoo/blob/main/lib-editor-app-blog-stars.md</text:span></text:a></text:p>
        </text:list-item>
        <text:list-item>
          <text:p text:style-name="P5"><text:span text:style-name="T9">GitHub - spool-labs/tcs: A high-performance, schema-based binary serialization format for Tapedrive, acessado em junho 26, 2026, </text:span><text:a xlink:type="simple" xlink:href="https://github.com/spool-labs/tcs" text:style-name="ListLabel_20_19" text:visited-style-name="ListLabel_20_19"><text:span text:style-name="T10">https://github.com/spool-labs/tcs</text:span></text:a></text:p>
        </text:list-item>
        <text:list-item>
          <text:p text:style-name="P5"><text:span text:style-name="T9">Show HN: I/Claude reverse-engineered Figma's binary WebSocket protocol | Hacker News, acessado em junho 26, 2026, </text:span><text:a xlink:type="simple" xlink:href="https://news.ycombinator.com/item?id=47607324" text:style-name="ListLabel_20_19" text:visited-style-name="ListLabel_20_19"><text:span text:style-name="T10">https://news.ycombinator.com/item?id=47607324</text:span></text:a></text:p>
        </text:list-item>
        <text:list-item>
          <text:p text:style-name="P5"><text:span text:style-name="T9">Evan Wallace: "Made a little parser for Figma…" - Hachyderm.io, acessado em junho 26, 2026, </text:span><text:a xlink:type="simple" xlink:href="https://hachyderm.io/@evanw/111673873116437343" text:style-name="ListLabel_20_19" text:visited-style-name="ListLabel_20_19"><text:span text:style-name="T10">https://hachyderm.io/@evanw/111673873116437343</text:span></text:a></text:p>
        </text:list-item>
        <text:list-item>
          <text:p text:style-name="P5"><text:span text:style-name="T9">v20.61.0 potentially introduced issue with internal backpressure tracking? #1260 - GitHub, acessado em junho 26, 2026, </text:span><text:a xlink:type="simple" xlink:href="https://github.com/uNetworking/uWebSockets.js/issues/1260" text:style-name="ListLabel_20_19" text:visited-style-name="ListLabel_20_19"><text:span text:style-name="T10">https://github.com/uNetworking/uWebSockets.js/issues/1260</text:span></text:a></text:p>
        </text:list-item>
        <text:list-item>
          <text:p text:style-name="P5"><text:span text:style-name="T9">Static buffer for onData #605 - uNetworking/uWebSockets.js - GitHub, acessado em junho 26, 2026, </text:span><text:a xlink:type="simple" xlink:href="https://github.com/uNetworking/uWebSockets.js/issues/605" text:style-name="ListLabel_20_19" text:visited-style-name="ListLabel_20_19"><text:span text:style-name="T10">https://github.com/uNetworking/uWebSockets.js/issues/605</text:span></text:a></text:p>
        </text:list-item>
        <text:list-item>
          <text:p text:style-name="P5"><text:span text:style-name="T9">FATAL ERROR: Reached heap limit Allocation failed - JavaScript heap out of memory, acessado em junho 26, 2026, </text:span><text:a xlink:type="simple" xlink:href="https://stackoverflow.com/questions/71779613/fatal-error-reached-heap-limit-allocation-failed-javascript-heap-out-of-memor" text:style-name="ListLabel_20_19" text:visited-style-name="ListLabel_20_19"><text:span text:style-name="T10">https://stackoverflow.com/questions/71779613/fatal-error-reached-heap-limit-allocation-failed-javascript-heap-out-of-memor</text:span></text:a></text:p>
        </text:list-item>
        <text:list-item>
          <text:p text:style-name="P5"><text:span text:style-name="T9">SharedArrayBuffer · uNetworking uWebSockets.js · Discussion #493 - GitHub, acessado em junho 26, 2026, </text:span><text:a xlink:type="simple" xlink:href="https://github.com/uNetworking/uWebSockets.js/discussions/493" text:style-name="ListLabel_20_19" text:visited-style-name="ListLabel_20_19"><text:span text:style-name="T10">https://github.com/uNetworking/uWebSockets.js/discussions/493</text:span></text:a></text:p>
        </text:list-item>
        <text:list-item>
          <text:p text:style-name="P5"><text:span text:style-name="T9">Managing Voice Chat - Documentation - Discord Developer Portal, acessado em junho 26, 2026, </text:span><text:a xlink:type="simple" xlink:href="https://docs.discord.com/developers/discord-social-sdk/development-guides/managing-voice-chat" text:style-name="ListLabel_20_19" text:visited-style-name="ListLabel_20_19"><text:span text:style-name="T10">https://docs.discord.com/developers/discord-social-sdk/development-guides/managing-voice-chat</text:span></text:a></text:p>
        </text:list-item>
        <text:list-item>
          <text:p text:style-name="P5"><text:span text:style-name="T9">How to Enable the Advanced Voice Activity Feature on Discord App [Guide] - YouTube, acessado em junho 26, 2026, </text:span><text:a xlink:type="simple" xlink:href="https://www.youtube.com/watch?v=cv_glD0KXuM&amp;vl=en" text:style-name="ListLabel_20_19" text:visited-style-name="ListLabel_20_19"><text:span text:style-name="T10">https://www.youtube.com/watch?v=cv_glD0KXuM&amp;vl=en</text:span></text:a></text:p>
        </text:list-item>
        <text:list-item>
          <text:p text:style-name="P5"><text:span text:style-name="T9">Voice indicator always lit or not working correctly? : r/discordapp - Reddit, acessado em junho 26, 2026, </text:span><text:a xlink:type="simple" xlink:href="https://www.reddit.com/r/discordapp/comments/1qnmnyi/voice_indicator_always_lit_or_not_working/" text:style-name="ListLabel_20_19" text:visited-style-name="ListLabel_20_19"><text:span text:style-name="T10">https://www.reddit.com/r/discordapp/comments/1qnmnyi/voice_indicator_always_lit_or_not_work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7" meta:paragraph-count="154" meta:word-count="6495" meta:character-count="49712" meta:non-whitespace-character-count="43406"/>
    <meta:generator>LibreOfficeDev/6.0.5.2$Linux_X86_64 LibreOffice_project/</meta:generator>
  </office:meta>
</office:document-meta>
</file>