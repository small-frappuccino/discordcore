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400000021634A36C21B5EB7F3.png" manifest:media-type="image/png"/>
  <manifest:file-entry manifest:full-path="Pictures/1000020100000039000000224A9B561C60B07188.png" manifest:media-type="image/png"/>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2.1667in"/>
    </style:style>
    <style:style style:name="Table1.1" style:family="table-row">
      <style:table-row-properties fo:keep-together="auto"/>
    </style:style>
    <style:style style:name="Table1.A1" style:family="table-cell">
      <style:table-cell-properties style:vertical-align="" fo:padding-left="0.125in" fo:padding-right="0.125in" fo:padding-top="0.0833in" fo:padding-bottom="0.0833in" fo:border="0.75pt solid #c4c7c5"/>
    </style:style>
    <style:style style:name="Table2" style:family="table">
      <style:table-properties style:width="6.5in" fo:margin-left="0in" fo:margin-top="0in" fo:margin-bottom="0in" table:align="left"/>
    </style:style>
    <style:style style:name="Table2.A" style:family="table-column">
      <style:table-column-properties style:column-width="2.1667in"/>
    </style:style>
    <style:style style:name="Table2.1" style:family="table-row">
      <style:table-row-properties fo:keep-together="auto"/>
    </style:style>
    <style:style style:name="Table2.A1" style:family="table-cell">
      <style:table-cell-properties style:vertical-align="" fo:padding-left="0.125in" fo:padding-right="0.125in" fo:padding-top="0.0833in" fo:padding-bottom="0.0833in" fo:border="0.75pt solid #c4c7c5"/>
    </style:style>
    <style:style style:name="Table3" style:family="table">
      <style:table-properties style:width="6.5in" fo:margin-left="0in" fo:margin-top="0in" fo:margin-bottom="0in" table:align="left"/>
    </style:style>
    <style:style style:name="Table3.A" style:family="table-column">
      <style:table-column-properties style:column-width="2.1667in"/>
    </style:style>
    <style:style style:name="Table3.1" style:family="table-row">
      <style:table-row-properties fo:keep-together="auto"/>
    </style:style>
    <style:style style:name="Table3.A1" style:family="table-cell">
      <style:table-cell-properties style:vertical-align="" fo:background-color="#f8fafd" fo:padding-left="0.125in" fo:padding-right="0.125in" fo:padding-top="0.0833in" fo:padding-bottom="0.0833in" fo:border="0.75pt solid #c4c7c5">
        <style:background-image/>
      </style:table-cell-properties>
    </style:style>
    <style:style style:name="Table4" style:family="table">
      <style:table-properties style:width="6.5in" fo:margin-left="0in" fo:margin-top="0in" fo:margin-bottom="0in" table:align="left"/>
    </style:style>
    <style:style style:name="Table4.A" style:family="table-column">
      <style:table-column-properties style:column-width="2.1667in"/>
    </style:style>
    <style:style style:name="Table4.1" style:family="table-row">
      <style:table-row-properties fo:keep-together="auto"/>
    </style:style>
    <style:style style:name="Table4.A1" style:family="table-cell">
      <style:table-cell-properties style:vertical-align="" fo:background-color="#f8fafd" fo:padding-left="0.125in" fo:padding-right="0.125in" fo:padding-top="0.0833in" fo:padding-bottom="0.0833in" fo:border="0.75pt solid #c4c7c5">
        <style:background-image/>
      </style:table-cell-properties>
    </style:style>
    <style:style style:name="Table5" style:family="table">
      <style:table-properties style:width="6.5in" fo:margin-left="0in" fo:margin-top="0in" fo:margin-bottom="0in" table:align="left"/>
    </style:style>
    <style:style style:name="Table5.A" style:family="table-column">
      <style:table-column-properties style:column-width="2.1667in"/>
    </style:style>
    <style:style style:name="Table5.1" style:family="table-row">
      <style:table-row-properties fo:keep-together="auto"/>
    </style:style>
    <style:style style:name="Table5.A1" style:family="table-cell">
      <style:table-cell-properties style:vertical-align="" fo:background-color="#f8fafd" fo:padding-left="0.125in" fo:padding-right="0.125in" fo:padding-top="0.0833in" fo:padding-bottom="0.0833in" fo:border="0.75pt solid #c4c7c5">
        <style:background-image/>
      </style:table-cell-properties>
    </style:style>
    <style:style style:name="Table6" style:family="table">
      <style:table-properties style:width="6.5in" fo:margin-left="0in" fo:margin-top="0in" fo:margin-bottom="0in" table:align="left"/>
    </style:style>
    <style:style style:name="Table6.A" style:family="table-column">
      <style:table-column-properties style:column-width="3.25in"/>
    </style:style>
    <style:style style:name="Table6.B" style:family="table-column">
      <style:table-column-properties style:column-width="3.2493in"/>
    </style:style>
    <style:style style:name="Table6.1" style:family="table-row">
      <style:table-row-properties fo:keep-together="auto"/>
    </style:style>
    <style:style style:name="Table6.A1" style:family="table-cell">
      <style:table-cell-properties style:vertical-align="" fo:background-color="#f8fafd" fo:padding-left="0.125in" fo:padding-right="0.125in" fo:padding-top="0.0833in" fo:padding-bottom="0.0833in" fo:border="0.75pt solid #c4c7c5">
        <style:background-image/>
      </style:table-cell-properties>
    </style:style>
    <style:style style:name="P1" style:family="paragraph" style:parent-style-name="Standard">
      <style:paragraph-properties fo:line-height="114%" fo:padding="0in" fo:border="none"/>
    </style:style>
    <style:style style:name="P2" style:family="paragraph" style:parent-style-name="Standard">
      <style:paragraph-properties fo:line-height="114%" fo:padding="0in" fo:border="none"/>
      <style:text-properties fo:color="#1f1f1f" style:font-name="Arial" style:font-name-asian="Arial2" style:font-name-complex="Arial2"/>
    </style:style>
    <style:style style:name="P3" style:family="paragraph" style:parent-style-name="Standard">
      <style:paragraph-properties fo:margin-top="0.0835in" fo:margin-bottom="0.0835in" loext:contextual-spacing="false" fo:line-height="114%" fo:padding="0in" fo:border="none"/>
    </style:style>
    <style:style style:name="P4" style:family="paragraph" style:parent-style-name="Standard">
      <style:paragraph-properties fo:margin-top="0.3335in" fo:margin-bottom="0in" loext:contextual-spacing="false" fo:line-height="114%" fo:padding="0in" fo:border="none"/>
    </style:style>
    <style:style style:name="P5" style:family="paragraph" style:parent-style-name="Standard" style:list-style-name="WWNum1">
      <style:paragraph-properties fo:margin-left="0.4098in" fo:margin-right="0in" fo:line-height="114%" fo:text-indent="-0.25in" style:auto-text-indent="false" fo:padding="0in" fo:border="none"/>
    </style:style>
    <style:style style:name="P6" style:family="paragraph" style:parent-style-name="Standard" style:list-style-name="WWNum3">
      <style:paragraph-properties fo:margin-left="0.4098in" fo:margin-right="0in" fo:line-height="114%" fo:text-indent="-0.25in" style:auto-text-indent="false" fo:padding="0in" fo:border="none"/>
    </style:style>
    <style:style style:name="P7" style:family="paragraph" style:parent-style-name="Standard" style:list-style-name="WWNum2">
      <style:paragraph-properties fo:margin-left="0.4165in" fo:margin-right="0in" fo:line-height="114%" fo:text-indent="-0.25in" style:auto-text-indent="false" fo:padding="0in" fo:border="none"/>
    </style:style>
    <style:style style:name="P8" style:family="paragraph" style:parent-style-name="Standard" style:list-style-name="WWNum4">
      <style:paragraph-properties fo:margin-left="0.4165in" fo:margin-right="0in" fo:line-height="114%" fo:text-indent="-0.25in" style:auto-text-indent="false" fo:padding="0in" fo:border="none"/>
    </style:style>
    <style:style style:name="P9" style:family="paragraph" style:parent-style-name="Standard" style:list-style-name="WWNum5">
      <style:paragraph-properties fo:margin-left="0.4165in" fo:margin-right="0in" fo:text-indent="-0.25in" style:auto-text-indent="false" fo:padding="0in" fo:border="none"/>
    </style:style>
    <style:style style:name="P10" style:family="paragraph" style:parent-style-name="Standard">
      <style:paragraph-properties fo:margin-top="0in" fo:margin-bottom="0.1772in" loext:contextual-spacing="false" fo:line-height="114%" fo:padding="0in" fo:border="none"/>
    </style:style>
    <style:style style:name="P11" style:family="paragraph" style:parent-style-name="Heading_20_1" style:master-page-name="Standard">
      <style:paragraph-properties fo:margin-top="0in" fo:margin-bottom="0in" loext:contextual-spacing="false" fo:line-height="114%" style:page-number="1" fo:padding="0in" fo:border="none"/>
    </style:style>
    <style:style style:name="P12" style:family="paragraph" style:parent-style-name="Heading_20_4">
      <style:paragraph-properties fo:margin-top="0in" fo:margin-bottom="0.1772in" loext:contextual-spacing="false" fo:line-height="100%" fo:padding="0in" fo:border="none"/>
    </style:style>
    <style:style style:name="P13" style:family="paragraph" style:parent-style-name="Heading_20_3">
      <style:paragraph-properties fo:margin-top="0in" fo:margin-bottom="0.1665in" loext:contextual-spacing="false" fo:line-height="114%" fo:padding="0in" fo:border="none"/>
    </style:style>
    <style:style style:name="P14" style:family="paragraph" style:parent-style-name="Heading_20_2">
      <style:paragraph-properties fo:margin-top="0in" fo:margin-bottom="0in" loext:contextual-spacing="false" fo:line-height="114%" fo:padding="0in" fo:border="none"/>
    </style:style>
    <style:style style:name="T1" style:family="text">
      <style:text-properties fo:color="#1f1f1f" style:font-name="Arial" style:font-name-asian="Arial2" style:font-name-complex="Arial2"/>
    </style:style>
    <style:style style:name="T2" style:family="text">
      <style:text-properties fo:color="#1f1f1f" style:font-name="Arial" fo:font-style="italic" style:font-name-asian="Arial2" style:font-style-asian="italic" style:font-name-complex="Arial2" style:font-style-complex="italic"/>
    </style:style>
    <style:style style:name="T3" style:family="text">
      <style:text-properties fo:color="#1f1f1f" style:font-name="Arial" fo:font-style="italic" fo:font-weight="bold" style:font-name-asian="Arial2" style:font-style-asian="italic" style:font-weight-asian="bold" style:font-name-complex="Arial2" style:font-style-complex="italic" style:font-weight-complex="bold"/>
    </style:style>
    <style:style style:name="T4" style:family="text">
      <style:text-properties fo:color="#1f1f1f" style:font-name="Arial" fo:font-weight="bold" style:font-name-asian="Arial2" style:font-weight-asian="bold" style:font-name-complex="Arial2" style:font-weight-complex="bold"/>
    </style:style>
    <style:style style:name="T5" style:family="text">
      <style:text-properties fo:color="#1f1f1f" style:font-name="Arial" fo:font-size="18pt" fo:font-style="italic" fo:font-weight="bold" style:font-name-asian="Arial2" style:font-size-asian="18pt" style:font-style-asian="italic" style:font-weight-asian="bold" style:font-name-complex="Arial2" style:font-size-complex="18pt" style:font-style-complex="italic" style:font-weight-complex="bold"/>
    </style:style>
    <style:style style:name="T6" style:family="text">
      <style:text-properties fo:color="#1f1f1f" style:font-name="Arial" fo:font-size="14pt" fo:font-style="italic" fo:font-weight="bold" style:font-name-asian="Arial2" style:font-size-asian="14pt" style:font-style-asian="italic" style:font-weight-asian="bold" style:font-name-complex="Arial2" style:font-size-complex="14pt" style:font-style-complex="italic" style:font-weight-complex="bold"/>
    </style:style>
    <style:style style:name="T7" style:family="text">
      <style:text-properties fo:color="#444746" style:text-position="super 58%" style:font-name="Arial" fo:font-size="12pt" style:font-name-asian="Arial2" style:font-size-asian="12pt" style:font-name-complex="Arial2" style:font-size-complex="12pt"/>
    </style:style>
    <style:style style:name="T8" style:family="text">
      <style:text-properties style:font-name="Arial" style:font-name-asian="Arial2" style:font-name-complex="Arial2"/>
    </style:style>
    <style:style style:name="T9" style:family="text">
      <style:text-properties style:font-name="Arial" fo:font-size="12pt" style:font-name-asian="Arial2" style:font-size-asian="12pt" style:font-name-complex="Arial2" style:font-size-complex="12pt"/>
    </style:style>
    <style:style style:name="T10" style:family="text">
      <style:text-properties fo:color="#0000ee" style:font-name="Arial" fo:font-size="12pt" style:text-underline-style="solid" style:text-underline-width="auto" style:text-underline-color="font-color" style:font-name-asian="Arial2" style:font-size-asian="12pt" style:font-name-complex="Arial2"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Arquitetura de Elite em Go: Mecânica de Runtime, Simbiose de Hardware e Engenharia de Alta Performance em Ecossistemas Cloud-Native</text:span></text:p>
      <text:p text:style-name="P1"><text:span text:style-name="T1">A ascensão da linguagem Go (Golang) como a força motriz e a </text:span><text:span text:style-name="T2">lingua franca</text:span><text:span text:style-name="T1"> indiscutível da infraestrutura computacional moderna não é um mero artefato de tendências de mercado, mas o resultado de um design de engenharia cirúrgico. Projetos classificados como </text:span><text:span text:style-name="T2">Tier-1</text:span><text:span text:style-name="T1"> no ecossistema Cloud-Native — incluindo Kubernetes, Docker, Terraform e Prometheus — dependem de uma arquitetura que exige um equilíbrio rigoroso entre a produtividade do desenvolvimento, o controle absoluto sobre a alocação de memória e o desempenho determinístico em escalas massivas</text:span><text:span text:style-name="T7">1</text:span><text:span text:style-name="T1">.</text:span></text:p>
      <text:p text:style-name="P1"><text:span text:style-name="T1">A escolha do Go em detrimento de linguagens tradicionais de sistemas, como C++ ou C, ou de linguagens baseadas em máquinas virtuais, como Java, fundamenta-se especificamente em como o </text:span><text:span text:style-name="T2">runtime</text:span><text:span text:style-name="T1"> da linguagem se comporta sob estresse térmico, concorrência extrema e saturação de entrada e saída (I/O)</text:span><text:span text:style-name="T7">1</text:span><text:span text:style-name="T1">. Historicamente, a fundação do paradigma de contêineres e orquestração baseou-se nestas características. O Docker, originalmente concebido por Solomon Hykes na dotCloud em 2013, migrou do ecossistema Python e LXC para o Go através da criação do libcontainer, aproveitando a capacidade da linguagem de interagir nativamente com os </text:span><text:span text:style-name="T2">namespaces</text:span><text:span text:style-name="T1"> e </text:span><text:span text:style-name="T2">cgroups</text:span><text:span text:style-name="T1"> do kernel Linux sem a sobrecarga de um interpretador</text:span><text:span text:style-name="T7">3</text:span><text:span text:style-name="T1">. Da mesma forma, o Kubernetes, anunciado pela Google em 2014 por engenheiros como Joe Beda, Brendan Burns e Craig McLuckie, teve seus protótipos iniciais testados em Java antes de a equipe migrar integralmente para o Go, buscando replicar o poder do sistema interno Borg (escrito em C++) com binários estáticos, concorrência leve e tipagem forte sem as pausas imprevisíveis da Java Virtual Machine (JVM)</text:span><text:span text:style-name="T7">2</text:span><text:span text:style-name="T1">. O Terraform, criado por Mitchell Hashimoto, também alavancou o Go para construir sistemas distribuídos imutáveis e modulares (Infraestrutura como Código), enquanto o Prometheus, iniciado por Julius Volz e Matt Proud na SoundCloud em 2012, utilizou a linguagem para processar milhões de séries temporais</text:span><text:span text:style-name="T7">4</text:span><text:span text:style-name="T1">.</text:span></text:p>
      <table:table table:name="Table1" table:style-name="Table1">
        <table:table-column table:style-name="Table1.A" table:number-columns-repeated="3"/>
        <table:table-row table:style-name="Table1.1">
          <table:table-cell table:style-name="Table1.A1" office:value-type="string">
            <text:p text:style-name="P3"><text:span text:style-name="T4">Plataforma Tier-1</text:span></text:p>
          </table:table-cell>
          <table:table-cell table:style-name="Table1.A1" office:value-type="string">
            <text:p text:style-name="P3"><text:span text:style-name="T4">Origem e Arquitetos Principais</text:span></text:p>
          </table:table-cell>
          <table:table-cell table:style-name="Table1.A1" office:value-type="string">
            <text:p text:style-name="P3"><text:span text:style-name="T4">Motivação Arquitetural para Adoção da Linguagem Go</text:span></text:p>
          </table:table-cell>
        </table:table-row>
        <table:table-row table:style-name="Table1.1">
          <table:table-cell table:style-name="Table1.A1" office:value-type="string">
            <text:p text:style-name="P3"><text:span text:style-name="T4">Docker</text:span></text:p>
          </table:table-cell>
          <table:table-cell table:style-name="Table1.A1" office:value-type="string">
            <text:p text:style-name="P3"><text:span text:style-name="T1">Solomon Hykes (dotCloud, 2013)</text:span></text:p>
          </table:table-cell>
          <table:table-cell table:style-name="Table1.A1" office:value-type="string">
            <text:p text:style-name="P3"><text:span text:style-name="T1">Substituição de LXC por libcontainer; interação nativa com o kernel Linux (cgroups/namespaces); binários estáticos portáteis.</text:span></text:p>
          </table:table-cell>
        </table:table-row>
        <table:table-row table:style-name="Table1.1">
          <table:table-cell table:style-name="Table1.A1" office:value-type="string">
            <text:p text:style-name="P3"><text:span text:style-name="T4">Kubernetes</text:span></text:p>
          </table:table-cell>
          <table:table-cell table:style-name="Table1.A1" office:value-type="string">
            <text:p text:style-name="P3"><text:span text:style-name="T1">Beda, Burns, McLuckie (Google, 2014)</text:span></text:p>
          </table:table-cell>
          <table:table-cell table:style-name="Table1.A1" office:value-type="string">
            <text:p text:style-name="P3"><text:span text:style-name="T1">Transição do protótipo em Java e do legado em C++ (Borg); necessidade de concorrência massiva (M:P:G) para orquestração de rede.</text:span></text:p>
          </table:table-cell>
        </table:table-row>
        <table:table-row table:style-name="Table1.1">
          <table:table-cell table:style-name="Table1.A1" office:value-type="string">
            <text:p text:style-name="P3"><text:span text:style-name="T4">Terraform</text:span></text:p>
          </table:table-cell>
          <table:table-cell table:style-name="Table1.A1" office:value-type="string">
            <text:p text:style-name="P3"><text:span text:style-name="T1">Mitchell Hashimoto (HashiCorp)</text:span></text:p>
          </table:table-cell>
          <table:table-cell table:style-name="Table1.A1" office:value-type="string">
            <text:p text:style-name="P3"><text:span text:style-name="T1">Necessidade de um ecossistema altamente plugável (RPC), execução de binário único e processamento concorrente de grafos de dependência (IaC).</text:span></text:p>
          </table:table-cell>
        </table:table-row>
        <table:table-row table:style-name="Table1.1">
          <table:table-cell table:style-name="Table1.A1" office:value-type="string">
            <text:p text:style-name="P3"><text:span text:style-name="T4">Prometheus</text:span></text:p>
          </table:table-cell>
          <table:table-cell table:style-name="Table1.A1" office:value-type="string">
            <text:p text:style-name="P3"><text:span text:style-name="T1">Julius Volz, Matt Proud (SoundCloud, 2012)</text:span></text:p>
          </table:table-cell>
          <table:table-cell table:style-name="Table1.A1" office:value-type="string">
            <text:p text:style-name="P3"><text:span text:style-name="T1">Processamento e compressão em memória de alta performance para milhões de séries temporais com previsibilidade de recolha de lixo (GC).</text:span></text:p>
          </table:table-cell>
        </table:table-row>
      </table:table>
      <text:p text:style-name="P4"><text:span text:style-name="T1">Este relatório técnico oferece uma análise exaustiva e profunda dos pilares mecânicos, arquiteturais e de </text:span><text:span text:style-name="T2">runtime</text:span><text:span text:style-name="T1"> que tornam a linguagem Go a base da internet moderna. A análise disseca a simbiose mecânica (</text:span><text:span text:style-name="T2">Mechanical Sympathy</text:span><text:span text:style-name="T1">), a orquestração minuciosa do </text:span><text:span text:style-name="T2">scheduler</text:span><text:span text:style-name="T1"> M:N, as primitivas cirúrgicas de sincronização e prevenção de fome (</text:span><text:span text:style-name="T2">starvation</text:span><text:span text:style-name="T1">), o impacto profundo da Otimização Guiada por Perfil (PGO) e a implementação de padrões estruturais avançados em código de elite.</text:span></text:p>
      <text:p text:style-name="P14"><text:span text:style-name="T1">1. Simbiose Mecânica (</text:span><text:span text:style-name="T5">Mechanical Sympathy</text:span><text:span text:style-name="T1">) e a Física do Hardware Subjacente</text:span></text:p>
      <text:p text:style-name="P1"><text:span text:style-name="T1">A engenharia de software de ponta exige que o código coopere estritamente com as leis da física que regem o hardware subjacente. Esse conceito, formalizado na engenharia de sistemas de alta frequência como </text:span><text:span text:style-name="T2">Mechanical Sympathy</text:span><text:span text:style-name="T1">, dita que a eficiência computacional máxima só é alcançada quando as estruturas de dados e os algoritmos são projetados com profunda consciência de como a Unidade Central de Processamento (CPU) e o subsistema hierárquico de memória operam</text:span><text:span text:style-name="T7">1</text:span><text:span text:style-name="T1">. Embora a linguagem Go possua um Coletor de Lixo (</text:span><text:span text:style-name="T2">Garbage Collector</text:span><text:span text:style-name="T1"> - GC) focado em baixíssima latência, a linguagem oferece um grau de controle sobre o layout de memória que rivaliza com o C, permitindo que os engenheiros evitem a fragmentação endêmica vista em ecossistemas orientados a objetos puros</text:span><text:span text:style-name="T7">1</text:span><text:span text:style-name="T1">.</text:span></text:p>
      <text:p text:style-name="P13"><text:span text:style-name="T1">1.1 Hierarquia de Cache, Alinhamento de Memória e o Efeito de </text:span><text:span text:style-name="T6">False Sharing</text:span></text:p>
      <text:p text:style-name="P1"><text:span text:style-name="T1">Os processadores modernos não buscam variáveis individuais na memória de acesso aleatório dinâmica (DRAM); eles transferem blocos contíguos de memória conhecidos como linhas de cache (</text:span><text:span text:style-name="T2">cache lines</text:span><text:span text:style-name="T1">), que tipicamente possuem 64 bytes de tamanho e residem nas memórias SRAM de altíssima velocidade internas ao processador (L1 e L2)</text:span><text:span text:style-name="T7">15</text:span><text:span text:style-name="T1">. Para que a CPU opere em sua capacidade máxima sem paralisar o </text:span><text:span text:style-name="T2">pipeline</text:span><text:span text:style-name="T1"> de instruções, os dados frequentemente acessados juntos devem residir na mesma linha de cache, otimizando a localidade espacial e minimizando as faltas de cache (</text:span><text:span text:style-name="T2">cache misses</text:span><text:span text:style-name="T1">) que obrigariam a CPU a aguardar centenas de ciclos de </text:span><text:span text:style-name="T2">clock</text:span><text:span text:style-name="T1"> ociosamente</text:span><text:span text:style-name="T7">15</text:span><text:span text:style-name="T1">.</text:span></text:p>
      <text:p text:style-name="P1"><text:span text:style-name="T1">Em linguagens onde todas as instâncias são referências encapsuladas no </text:span><text:span text:style-name="T2">heap</text:span><text:span text:style-name="T1"> (como em implementações tradicionais da JVM ou em Python), um </text:span><text:span text:style-name="T2">array</text:span><text:span text:style-name="T1"> de objetos é meramente uma coleção de ponteiros fragmentados que apontam para locais arbitrários na memória. Essa fragmentação destrói a localidade espacial</text:span><text:span text:style-name="T7">15</text:span><text:span text:style-name="T1">. Em Go, o layout de estruturas (</text:span><text:span text:style-name="T2">structs</text:span><text:span text:style-name="T1">) em </text:span><text:span text:style-name="T2">arrays</text:span><text:span text:style-name="T1"> ou </text:span><text:span text:style-name="T2">slices</text:span><text:span text:style-name="T1"> é estritamente contíguo por padrão. Os campos das estruturas são empacotados densamente no momento da compilação, permitindo que os vetores inteiros viajem juntos para as camadas de cache da CPU, maximizando a eficiência de processamento escalar e previsibilidade térmica</text:span><text:span text:style-name="T7">1</text:span><text:span text:style-name="T1">.</text:span></text:p>
      <text:p text:style-name="P1"><text:span text:style-name="T1">Contudo, essa alta densidade e agrupamento contíguo introduzem um risco arquitetural oculto em ambientes multitarefa extremos: o Compartilhamento Falso (</text:span><text:span text:style-name="T2">False Sharing</text:span><text:span text:style-name="T1">)</text:span><text:span text:style-name="T7">15</text:span><text:span text:style-name="T1">. Esse fenômeno ocorre quando duas </text:span><text:span text:style-name="T2">threads</text:span><text:span text:style-name="T1"> separadas (ou duas goroutines sendo executadas em núcleos físicos de CPU diferentes) atualizam variáveis independentes que, devido à proximidade contígua da </text:span><text:span text:style-name="T2">struct</text:span><text:span text:style-name="T1">, acabam residindo na exata mesma linha de cache física de 64 bytes</text:span><text:span text:style-name="T7">15</text:span><text:span text:style-name="T1">. Devido aos protocolos rigorosos de coerência de cache integrados no hardware (como o protocolo MESI - </text:span><text:span text:style-name="T2">Modified, Exclusive, Shared, Invalid</text:span><text:span text:style-name="T1">), quando o Núcleo 0 modifica sua variável local, o controlador de memória é forçado a invalidar fisicamente a linha de cache inteira no Núcleo 1</text:span><text:span text:style-name="T7">15</text:span><text:span text:style-name="T1">. O resultado é uma tempestade invisível de invalidações e transferências no barramento de interconexão da CPU, onde o hardware entra em um efeito de "ping-pong" destrutivo tentando sincronizar as caches L1, aniquilando completamente qualquer benefício de paralelismo, mesmo que não existam travas (</text:span><text:span text:style-name="T2">locks</text:span><text:span text:style-name="T1">) de software explícitas no código</text:span><text:span text:style-name="T7">15</text:span><text:span text:style-name="T1">.</text:span></text:p>
      <text:p text:style-name="P1"><text:span text:style-name="T1">Para mitigar o </text:span><text:span text:style-name="T2">false sharing</text:span><text:span text:style-name="T1"> em projetos de infraestrutura </text:span><text:span text:style-name="T2">Tier-1</text:span><text:span text:style-name="T1">, os engenheiros de Go implementam preenchimento explícito de memória (</text:span><text:span text:style-name="T2">padding</text:span><text:span text:style-name="T1">) baseando-se no limite exato da física do silício. Ao inserir campos de bytes vazios em </text:span><text:span text:style-name="T2">structs</text:span><text:span text:style-name="T1"> críticas e isolar os destinos de mutação, os campos acessados por diferentes processadores são cirurgicamente forçados a residir em limites de linhas de cache separadas, permitindo a execução simultânea absoluta com zero fricção de hardware</text:span><text:span text:style-name="T7">16</text:span><text:span text:style-name="T1">.</text:span></text:p>
      <table:table table:name="Table2" table:style-name="Table2">
        <table:table-column table:style-name="Table2.A" table:number-columns-repeated="3"/>
        <table:table-row table:style-name="Table2.1">
          <table:table-cell table:style-name="Table2.A1" office:value-type="string">
            <text:p text:style-name="P3"><text:span text:style-name="T4">Arquitetura de Memória</text:span></text:p>
          </table:table-cell>
          <table:table-cell table:style-name="Table2.A1" office:value-type="string">
            <text:p text:style-name="P3"><text:span text:style-name="T4">Implementação de Código (Exemplo)</text:span></text:p>
          </table:table-cell>
          <table:table-cell table:style-name="Table2.A1" office:value-type="string">
            <text:p text:style-name="P3"><text:span text:style-name="T4">Comportamento no Protocolo de Hardware (MESI)</text:span></text:p>
          </table:table-cell>
        </table:table-row>
        <table:table-row table:style-name="Table2.1">
          <table:table-cell table:style-name="Table2.A1" office:value-type="string">
            <text:p text:style-name="P3"><text:span text:style-name="T4">Ingênua (Suscetível ao </text:span><text:span text:style-name="T3">False Sharing</text:span><text:span text:style-name="T4">)</text:span></text:p>
          </table:table-cell>
          <table:table-cell table:style-name="Table2.A1" office:value-type="string">
            <text:p text:style-name="P3"><text:span text:style-name="T1">type Stats struct { rx int64; tx int64 }</text:span></text:p>
          </table:table-cell>
          <table:table-cell table:style-name="Table2.A1" office:value-type="string">
            <text:p text:style-name="P3"><text:span text:style-name="T1">Variáveis independentes rx e tx ocupam 16 bytes consecutivos, residindo na mesma linha de 64 bytes. Mutações simultâneas em múltiplos núcleos causam contenção e invalidação contínua do cache.</text:span></text:p>
          </table:table-cell>
        </table:table-row>
        <table:table-row table:style-name="Table2.1">
          <table:table-cell table:style-name="Table2.A1" office:value-type="string">
            <text:p text:style-name="P3"><text:span text:style-name="T4">Simbiótica (Isolamento Físico)</text:span></text:p>
          </table:table-cell>
          <table:table-cell table:style-name="Table2.A1" office:value-type="string">
            <text:p text:style-name="P3"><text:span text:style-name="T1">type Stats struct { rx int64; _ [56]byte; tx int64 }</text:span></text:p>
          </table:table-cell>
          <table:table-cell table:style-name="Table2.A1" office:value-type="string">
            <text:p text:style-name="P3"><text:span text:style-name="T1">O preenchimento estático forçado de 56 bytes obriga o campo tx a ser alocado exatamente no início da próxima linha de cache física. Os núcleos atualizam os dados simultaneamente com zero interferência.</text:span></text:p>
          </table:table-cell>
        </table:table-row>
      </table:table>
      <text:p text:style-name="P4"><text:span text:style-name="T1">A evolução contínua da especificação da linguagem tem reconhecido a necessidade inegociável deste controle de layout para operações otimizadas e de interoperabilidade (como Foreign Function Interfaces e WebAssembly). A comunidade de compiladores avançados do Go formalizou a introdução de diretivas como o marcador structs.HostLayout (em trâmite para o Go 1.24)</text:span><text:span text:style-name="T7">19</text:span><text:span text:style-name="T1">. Este marcador atua como um contrato explícito no nível do sistema, instruindo o compilador a ignorar heurísticas genéricas e a alinhar a estrutura seguindo estritamente as regras de layout e preenchimento da plataforma hospedeira (semelhante à funcionalidade #[repr(C)] em Rust ou C++)</text:span><text:span text:style-name="T7">19</text:span><text:span text:style-name="T1">. Isso torna-se crucial não apenas para garantir que os </text:span><text:span text:style-name="T2">paddings</text:span><text:span text:style-name="T1"> projetados contra </text:span><text:span text:style-name="T2">false sharing</text:span><text:span text:style-name="T1"> funcionem universalmente sem serem otimizados inadvertidamente pelo compilador, mas também para suportar chamadas nativas pesadas (CGO) e compilação para o alvo wasm32 onde as garantias de Application Binary Interface (ABI) hospedeira de 64-bits exigem alinhamentos perfeitos de 8 bytes</text:span><text:span text:style-name="T7">21</text:span><text:span text:style-name="T1">.</text:span></text:p>
      <text:p text:style-name="P14"><text:soft-page-break/><text:span text:style-name="T1">2. Previsibilidade de Memória: Análise de Escape e Caminhos de Zero-Alocação</text:span></text:p>
      <text:p text:style-name="P1"><text:span text:style-name="T1">A governança do ciclo de vida da memória no ecossistema Go difere substancialmente da gestão manual de memória via malloc/free do C ou do imediatismo dos coletores geracionais do ecossistema Java. No Go, a demarcação entre a pilha (</text:span><text:span text:style-name="T2">stack</text:span><text:span text:style-name="T1">) e o monte (</text:span><text:span text:style-name="T2">heap</text:span><text:span text:style-name="T1">) é controlada por uma das fases de otimização estática mais rigorosas do compilador: a Análise de Escape (</text:span><text:span text:style-name="T2">Escape Analysis</text:span><text:span text:style-name="T1">)</text:span><text:span text:style-name="T7">1</text:span><text:span text:style-name="T1">.</text:span></text:p>
      <text:p text:style-name="P1"><text:span text:style-name="T1">A alocação de dados na pilha tem um custo termodinâmico e de hardware na magnitude de </text:span><draw:frame draw:style-name="fr1" draw:name="image2.png" text:anchor-type="as-char" svg:width="0.4429in" svg:height="0.2646in" draw:z-index="0"><draw:image xlink:href="Pictures/1000020100000039000000224A9B561C60B07188.png" xlink:type="simple" xlink:show="embed" xlink:actuate="onLoad" loext:mime-type="image/png"/></draw:frame><text:span text:style-name="T7">1</text:span><text:span text:style-name="T1">. A alocação é realizada meramente movendo o ponteiro de registro da CPU, não gerando resíduos e sendo purificada instantaneamente quando a função atinge seu retorno léxico, dispensando a intervenção do </text:span><text:span text:style-name="T2">Garbage Collector</text:span><text:span text:style-name="T7">25</text:span><text:span text:style-name="T1">. Por outro lado, qualquer dado promovido ao </text:span><text:span text:style-name="T2">heap</text:span><text:span text:style-name="T1"> induz a uma sequência custosa de operações: busca por blocos livres adequados, fragmentação estrutural, e um peso cumulativo durante a fase de marcação e varredura (</text:span><text:span text:style-name="T2">mark-and-sweep</text:span><text:span text:style-name="T1">) do GC</text:span><text:span text:style-name="T7">25</text:span><text:span text:style-name="T1">. Em infraestruturas que administram roteamento contínuo em frequências astronômicas, as coletas de lixo representam micro-pausas e instabilidade na latência e </text:span><text:span text:style-name="T2">jitter</text:span><text:span text:style-name="T1">, forçando a arquitetura de software a abraçar a prática estrita do </text:span><text:span text:style-name="T2">Zero-Allocation Programming</text:span><text:span text:style-name="T7">1</text:span><text:span text:style-name="T1">.</text:span></text:p>
      <text:p text:style-name="P1"><text:span text:style-name="T1">O compilador analisa a árvore sintática para provar, por meio de análise intra-procedural e inter-procedural, se uma variável sobrevive (ou escapa) à função de origem</text:span><text:span text:style-name="T7">25</text:span><text:span text:style-name="T1">. Caso o tempo de vida não possa ser rigidamente estabelecido, o compilador transfere alocações para o </text:span><text:span text:style-name="T2">heap</text:span><text:span text:style-name="T1"> como mecanismo de segurança</text:span><text:span text:style-name="T7">25</text:span><text:span text:style-name="T1">. Em sistemas orientados a desempenho de elite, o fluxo executivo é depurado implacavelmente com a diretiva de diagnóstico go build -gcflags="-m" para mapear as fugas ("escapes") e selar as vias quentes (</text:span><text:span text:style-name="T2">hot paths</text:span><text:span text:style-name="T1">) do código contra a intrusão do GC</text:span><text:span text:style-name="T7">27</text:span><text:span text:style-name="T1">.</text:span></text:p>
      <text:p text:style-name="P2"/>
      <table:table table:name="Table3" table:style-name="Table3">
        <table:table-column table:style-name="Table3.A" table:number-columns-repeated="3"/>
        <table:table-row table:style-name="Table3.1">
          <table:table-cell table:style-name="Table3.A1" office:value-type="string">
            <text:p text:style-name="P3"><text:span text:style-name="T4">Gatilho Estrutural de Fuga (Escape Trigger)</text:span></text:p>
          </table:table-cell>
          <table:table-cell table:style-name="Table3.A1" office:value-type="string">
            <text:p text:style-name="P3"><text:span text:style-name="T4">Mecânica do Compilador</text:span></text:p>
          </table:table-cell>
          <table:table-cell table:style-name="Table3.A1" office:value-type="string">
            <text:p text:style-name="P3"><text:span text:style-name="T4">Resolução em Projetos Tier-1</text:span></text:p>
          </table:table-cell>
        </table:table-row>
        <table:table-row table:style-name="Table3.1">
          <table:table-cell table:style-name="Table3.A1" office:value-type="string">
            <text:p text:style-name="P3"><text:span text:style-name="T4">Ponteiros Retornando do Escopo Local</text:span></text:p>
          </table:table-cell>
          <table:table-cell table:style-name="Table3.A1" office:value-type="string">
            <text:p text:style-name="P1"><text:span text:style-name="T1">O compilador detecta que a referência à variável existirá além do encerramento da função, forçando a promoção da variável para a </text:span><text:span text:style-name="T2">heap</text:span><text:span text:style-name="T7">28</text:span><text:span text:style-name="T1">.</text:span></text:p>
          </table:table-cell>
          <table:table-cell table:style-name="Table3.A1" office:value-type="string">
            <text:p text:style-name="P1"><text:span text:style-name="T1">Retorno estrito por valor para objetos leves e alocações predeterminadas pela função chamadora para mutação </text:span><text:span text:style-name="T2">in-place</text:span><text:span text:style-name="T7">28</text:span><text:span text:style-name="T1">.</text:span></text:p>
          </table:table-cell>
        </table:table-row>
        <table:table-row table:style-name="Table3.1">
          <table:table-cell table:style-name="Table3.A1" office:value-type="string">
            <text:p text:style-name="P3"><text:span text:style-name="T4">Encapsulamento Dinâmico em Interface (</text:span><text:span text:style-name="T3">Interface Boxing</text:span><text:span text:style-name="T4">)</text:span></text:p>
          </table:table-cell>
          <table:table-cell table:style-name="Table3.A1" office:value-type="string">
            <text:p text:style-name="P1"><text:span text:style-name="T1">Passar tipos de valor estáticos para parâmetros interface{} (como nas invocações fmt.Sprintf) obriga o </text:span><text:span text:style-name="T2">runtime</text:span><text:span text:style-name="T1"> a forjar invólucros dinâmicos no </text:span><text:span text:style-name="T2">heap</text:span><text:span text:style-name="T7">27</text:span><text:span text:style-name="T1">.</text:span></text:p>
          </table:table-cell>
          <table:table-cell table:style-name="Table3.A1" office:value-type="string">
            <text:p text:style-name="P1"><text:span text:style-name="T1">Restrição do uso de interfaces em caminhos críticos, ou a utilização do polimorfismo via Genéricos (Go 1.18+) para monomorfização no </text:span><text:span text:style-name="T2">compile-time</text:span><text:span text:style-name="T7">28</text:span><text:span text:style-name="T1">.</text:span></text:p>
          </table:table-cell>
        </table:table-row>
        <table:table-row table:style-name="Table3.1">
          <table:table-cell table:style-name="Table3.A1" office:value-type="string">
            <text:p text:style-name="P3"><text:span text:style-name="T4">Captura Assíncrona de Variáveis (Closures)</text:span></text:p>
          </table:table-cell>
          <table:table-cell table:style-name="Table3.A1" office:value-type="string">
            <text:p text:style-name="P1"><text:span text:style-name="T1">O bloco lógico anônimo captura variáveis externas em um estado compartilhado; como o </text:span><text:span text:style-name="T2">closure</text:span><text:span text:style-name="T1"> em si tem tempo de vida indefinido, seu contexto migra para a </text:span><text:span text:style-name="T2">heap</text:span><text:span text:style-name="T7">28</text:span><text:span text:style-name="T1">.</text:span></text:p>
          </table:table-cell>
          <table:table-cell table:style-name="Table3.A1" office:value-type="string">
            <text:p text:style-name="P1"><text:span text:style-name="T1">Passar dados localmente por valor diretamente para os sub-processos ao invés de depender de encerramentos lexicais mutáveis de contexto</text:span><text:span text:style-name="T7">28</text:span><text:span text:style-name="T1">.</text:span></text:p>
          </table:table-cell>
        </table:table-row>
        <table:table-row table:style-name="Table3.1">
          <table:table-cell table:style-name="Table3.A1" office:value-type="string">
            <text:p text:style-name="P3"><text:span text:style-name="T4">Saturação de Capacidade de Memória de Fatias (</text:span><text:span text:style-name="T3">Slices</text:span><text:span text:style-name="T4">)</text:span></text:p>
          </table:table-cell>
          <table:table-cell table:style-name="Table3.A1" office:value-type="string">
            <text:p text:style-name="P1"><text:span text:style-name="T1">Extrapolar a dimensão primária da capacidade instiga um deslocamento do </text:span><text:span text:style-name="T2">array</text:span><text:span text:style-name="T1"> subjacente. A falta de capacidade estatística previsível forçará o vetor para o </text:span><text:span text:style-name="T2">heap</text:span><text:span text:style-name="T7">28</text:span><text:span text:style-name="T1">.</text:span></text:p>
          </table:table-cell>
          <table:table-cell table:style-name="Table3.A1" office:value-type="string">
            <text:p text:style-name="P1"><text:span text:style-name="T1">Gestão draconiana de capacidades através da estimativa antecipada em make([]T, len, cap), evadindo ciclos dinâmicos de redimensionamento</text:span><text:span text:style-name="T7">28</text:span><text:span text:style-name="T1">.</text:span></text:p>
          </table:table-cell>
        </table:table-row>
      </table:table>
      <text:p text:style-name="P1"><text:span text:style-name="T1">Para evitar o desgaste e consolidar o paradigma de zero-alocação, o ecossistema Cloud-Native depende extensivamente de </text:span><text:span text:style-name="T2">pooling</text:span><text:span text:style-name="T1"> e de </text:span><text:span text:style-name="T2">buffers</text:span><text:span text:style-name="T1"> imutáveis</text:span><text:span text:style-name="T7">27</text:span><text:span text:style-name="T1">. O pacote sync.Pool, por exemplo, é central a esta otimização. Ele atua como um reservatório seguro de instâncias de memória previamente elaboradas e suspensas em caches de isolamento global. Estruturas altamente instáveis na alocação, como matrizes massivas em roteamento de solicitações e transações JSON, adquirem blocos diretamente deste depósito temporal, reciclando bytes descartados e blindando assim a barreira principal de contagem do </text:span><text:span text:style-name="T2">Garbage Collector</text:span><text:span text:style-name="T1">, mitigando de forma definitiva a latência indesejada da aplicação e achatando o estresse termodinâmico contínuo na CPU</text:span><text:span text:style-name="T7">16</text:span><text:span text:style-name="T1">. Analogamente, para operações iterativas em cordões de caracteres (que são canonicamente imutáveis e forçariam alocações destrutivas na concatenação), bibliotecas de elite integram rigidamente abordagens de reserva pré-adquirida através das estruturas strings.Builder ou bytes.Buffer, manipulando expansões vetoriais por debaixo das interfaces nativas para evadir as penalizações da recolha de lixo nos processos textuais do sistema</text:span><text:span text:style-name="T7">30</text:span><text:span text:style-name="T1">.</text:span></text:p>
      <text:p text:style-name="P14"><text:span text:style-name="T1">3. O Motor de Concorrência: Escalabilidade M:P:G e Preempção Assíncrona</text:span></text:p>
      <text:p text:style-name="P1"><text:span text:style-name="T1">A superação das falhas históricas encontradas nas linguagens síncronas convencionais baseia-se primordialmente em como as dezenas de milhares de micro-tarefas exigidas em um único orquestrador orquestrador moderno são coordenadas. A abstração direta de concorrência que se apega ao mapeamento de uma para uma (1:1) entre a </text:span><text:span text:style-name="T2">thread</text:span><text:span text:style-name="T1"> do software da aplicação e a </text:span><text:span text:style-name="T2">thread</text:span><text:span text:style-name="T1"> central do sistema operacional apresenta limitações físicas impossíveis de transpor. Cada </text:span><text:span text:style-name="T2">thread</text:span><text:span text:style-name="T1"> convencional gerenciada pelo </text:span><text:span text:style-name="T2">kernel</text:span><text:span text:style-name="T1"> Linux consome algo entre 1 a 8 MB de memória no empilhamento original e necessita de trocas constantes de contextos sob o modo de privilégio (</text:span><text:span text:style-name="T2">kernel-mode</text:span><text:span text:style-name="T1">), forçando flutuações e validações extensivas das tabelas TLB (</text:span><text:span text:style-name="T2">Translation Lookaside Buffer</text:span><text:span text:style-name="T1">), o que corrói as capacidades de tempo com gastos médios de até 2 microssegundos apenas para o salto operacional</text:span><text:span text:style-name="T7">1</text:span><text:span text:style-name="T1">. Tentar escalonar a infraestrutura até cem mil conexões derruba instâncias pela exaustão exponencial das matrizes de RAM global ou pela estrangulação máxima nas filas agendadas de núcleo do SO</text:span><text:span text:style-name="T7">34</text:span><text:span text:style-name="T1">.</text:span></text:p>
      <text:p text:style-name="P1"><text:span text:style-name="T1">Para anular essa vulnerabilidade, ambientes como o Docker e o Kubernetes aproveitam o paradigma assíncrono interno da linguagem Go, assente na topologia orgânica de multiplexação M:N através do formidável </text:span><text:span text:style-name="T4">Go Scheduler (GMP Model)</text:span><text:span text:style-name="T7">1</text:span><text:span text:style-name="T1">. As goroutines (as rotinas virtuais de execução da linguagem) são lançadas com um peso trivial, cujo empilhamento básico custa inicialmente por volta de 2 Kilobytes, escalonando o dinamismo unicamente sob a prerrogativa restrita do </text:span><text:span text:style-name="T2">user-space</text:span><text:span text:style-name="T1"> e assegurando mutações espaciais entre contextos com latências relativas irrisórias localizadas na janela dos 50 a 100 nanossegundos</text:span><text:span text:style-name="T7">33</text:span><text:span text:style-name="T1">.</text:span></text:p>
      <text:p text:style-name="P13"><text:span text:style-name="T1">3.1 A Dança do Agendador: Modelagem G-M-P e </text:span><text:span text:style-name="T6">Work-Stealing</text:span></text:p>
      <text:p text:style-name="P1"><text:span text:style-name="T1">O Go Runtime estrutura a concorrência multiplexando entidades assíncronas através de três elementos semânticos operacionais de agendamento</text:span><text:span text:style-name="T7">33</text:span><text:span text:style-name="T1">:</text:span></text:p>
      <text:list xml:id="list206399391" text:style-name="WWNum1">
        <text:list-item>
          <text:p text:style-name="P5"><text:span text:style-name="T4">G (Goroutine):</text:span><text:span text:style-name="T1"> Representa logicamente a unidade fundamental e imutável de trabalho executável. Encapsula o ciclo temporal da pilha individual local, o registrador mestre de contexto (</text:span><text:span text:style-name="T2">Program Counter</text:span><text:span text:style-name="T1">) e o estado operacional ativo</text:span><text:span text:style-name="T7">33</text:span><text:span text:style-name="T1">.</text:span></text:p>
        </text:list-item>
        <text:list-item>
          <text:p text:style-name="P5"><text:span text:style-name="T4">M (Machine):</text:span><text:span text:style-name="T1"> Referencia incondicionalmente a </text:span><text:span text:style-name="T2">Thread</text:span><text:span text:style-name="T1"> Nativa do SO (</text:span><text:span text:style-name="T2">kernel thread</text:span><text:span text:style-name="T1">). O elemento "M" constitui a execução mecânica das rotinas nos núcleos diretos da CPU. Quando ocorrem bloqueios profundos em chamadas pesadas ao núcleo de software do SO, estas matrizes podem ser temporalmente dissociadas ou adormecidas</text:span><text:span text:style-name="T7">33</text:span><text:span text:style-name="T1">.</text:span></text:p>
        </text:list-item>
        <text:list-item>
          <text:p text:style-name="P5"><text:span text:style-name="T4">P (Processor):</text:span><text:span text:style-name="T1"> Exerce a função de um processador lógico, materializando a ponte necessária para orquestrar e estabilizar o agrupamento das tarefas. Cada unidade "P" engloba recursos isolados e otimizados temporalmente para os níveis locais e isolados de execução do software, incluindo a retenção estrita da Fila de Execução Local (</text:span><text:span text:style-name="T2">Local Run Queue</text:span><text:span text:style-name="T1"> - LRQ) e do próprio mcache de suporte às referências nativas do </text:span><text:span text:style-name="T2">Garbage Collector</text:span><text:span text:style-name="T1">, impedindo bloqueios mutexos centralizados ao se esquivar do uso de travas na transição escalar de dados da fila</text:span><text:span text:style-name="T7">33</text:span><text:span text:style-name="T1">.</text:span></text:p>
        </text:list-item>
      </text:list>
      <text:p text:style-name="P1"><text:span text:style-name="T1">O sistema opera pela integração coesa de todos esses vértices. Uma </text:span><text:span text:style-name="T2">Machine</text:span><text:span text:style-name="T1"> (M) necessita acoplar-se invariavelmente a um </text:span><text:span text:style-name="T2">Processor</text:span><text:span text:style-name="T1"> (P) para que seja possível o processamento linear do código central. A mágica operacional da distribuição e manutenção implacável e contínua do uso balanceado global recai sob os rigores matemáticos do </text:span><text:span text:style-name="T4">Algoritmo de Roubo de Trabalho (</text:span><text:span text:style-name="T3">Work-Stealing</text:span><text:span text:style-name="T4">)</text:span><text:span text:style-name="T7">33</text:span><text:span text:style-name="T1">.</text:span></text:p>
      <text:p text:style-name="P1"><text:span text:style-name="T1">Quando uma </text:span><text:span text:style-name="T2">Machine</text:span><text:span text:style-name="T1"> em execução exaure a disponibilidade dos sub-trabalhos locais de sua Fila de Execução (LRQ) de sua abstração </text:span><text:span text:style-name="T2">Processor</text:span><text:span text:style-name="T1">, ela não aguarda estaticamente e tão pouco incorre em </text:span><text:span text:style-name="T2">overhead</text:span><text:span text:style-name="T1"> por estagnação ociosa. O mecanismo de rebalanço induz ativamente a sondagem autossuficiente: a </text:span><text:span text:style-name="T2">thread</text:span><text:span text:style-name="T1"> perscruta inicialmente a Fila de Execução Global em intervalos intercalados, e, posteriormente, inicia um protocolo semi-randômico interligado de invasão, acedendo unilateralmente a outros núcleos processadores "P" da frota para usurpar (roubar) metades lógicas completas de suas filas adjacentes acumuladas, repovoando de maneira hiper-otimizada as distribuições sem a necessidade de semáforos centrais paralisantes e lentos, maximizando assim toda a vetorização operacional perimetral no cluster e eliminando falhas massivas nos balanços da frota de execução</text:span><text:span text:style-name="T7">33</text:span><text:span text:style-name="T1">.</text:span></text:p>
      <text:p text:style-name="P13"><text:soft-page-break/><text:span text:style-name="T1">3.2 Isolamento de I/O de Rede: O Módulo </text:span><text:span text:style-name="T6">Netpoller</text:span></text:p>
      <text:p text:style-name="P1"><text:span text:style-name="T1">A arquitetura do escalonamento soluciona os estrangulamentos operacionais das transações na infraestrutura global devido a interações com os serviços de Entrada e Saída lógicos. Numa infraestrutura puramente sequencial, sempre que um software de rede aguarda blocos da base do conector de </text:span><text:span text:style-name="T2">socket</text:span><text:span text:style-name="T1">, a totalidade da </text:span><text:span text:style-name="T2">Thread</text:span><text:span text:style-name="T1"> hospedada é penalizada com paralisações até que o pacote da requisição atinja o processamento via barramentos externos. No paradigma de concorrência clássica o bloqueio impõe estresse, exigindo a implementação engessada de arquiteturas densas de </text:span><text:span text:style-name="T2">Callbacks</text:span><text:span text:style-name="T1"> ou construções do estilo assíncrono condicionado (Promises/Futures) no código final dos engenheiros.</text:span></text:p>
      <text:p text:style-name="P1"><text:span text:style-name="T1">Em oposição a esse cenário, o núcleo do sistema adota de modo abstrato o módulo isolado de retransmissões assíncronas denominado </text:span><text:span text:style-name="T4">Netpoller</text:span><text:span text:style-name="T7">35</text:span><text:span text:style-name="T1">. Ao ser disparada uma requisição ou escuta interligada a conectores TCP/IP, a invocação é traduzida e direcionada ao </text:span><text:span text:style-name="T2">Netpoller</text:span><text:span text:style-name="T1"> e a entidade corrotina instanciada (G) transiciona seu subestado à suspensão controlada e estática (</text:span><text:span text:style-name="T2">Parked</text:span><text:span text:style-name="T1">). Em vez da </text:span><text:span text:style-name="T2">Thread</text:span><text:span text:style-name="T1"> operante nativa do núcleo adormecer nas requisições do limite exterior e exaurir vetores paralelos da máquina, o motor Go abstrai e intercepta invisivelmente as requisições atrelando as primitivas multiplexadoras nativas do próprio </text:span><text:span text:style-name="T2">Kernel</text:span><text:span text:style-name="T1"> do hospedeiro, alocando os sistemas como epoll para distribuições Linux e kqueue para Darwin/macOS</text:span><text:span text:style-name="T7">35</text:span><text:span text:style-name="T1">. Essa abstração inteligente preserva o conector sem afetar o ciclo lógico da programação; a goroutine principal cede lugar imediato e indolor a outros elementos esperando para serem despachados no processo M acoplado</text:span><text:span text:style-name="T7">35</text:span><text:span text:style-name="T1">. Assim que o buffer de comunicação emite sinal de conclusão retroativa de dados e valida recebimento assíncrono nativo, o poller injeta o gatilho sistêmico devolvendo a corrotina congelada à Fila de Execução (</text:span><text:span text:style-name="T2">Run Queue</text:span><text:span text:style-name="T1">) de modo responsivo e transparente. Esse fenômeno viabiliza que linguagens robustas orquestrem cargas espantosas superando facilmente milhões de pacotes I/O abertos de maneira hiper-escalar mantendo todo o determinismo linear estruturado da engenharia sem sacrificar a legibilidade do sistema por baixo do pano funcional de eventos operatórios paralelos</text:span><text:span text:style-name="T7">35</text:span><text:span text:style-name="T1">.</text:span></text:p>
      <text:p text:style-name="P13"><text:span text:style-name="T1">3.3 A Solução Contra a Fome: O sysmon e a Preempção Assíncrona</text:span></text:p>
      <text:p text:style-name="P1"><text:span text:style-name="T1">A natureza assíncrona baseada na filosofia de "rendição colaborativa" impunha, historicamente nas versões iniciais do Go (pré 1.14), desafios complexos. Goroutines mal arquitetadas ou rotinas numéricas de processamento cíclico profundo (</text:span><text:span text:style-name="T2">tight CPU-bound loops</text:span><text:span text:style-name="T1">) sem invocações de sistema poderiam monopolizar para sempre a </text:span><text:span text:style-name="T2">Thread</text:span><text:span text:style-name="T1"> ativa, impossibilitando até que instâncias obrigatórias — como os varredores centrais do Coletor de Lixo (</text:span><text:span text:style-name="T2">GC Scavengers</text:span><text:span text:style-name="T1">) — obtivessem espaços sequenciais essenciais para limpar a base vetorial do sistema</text:span><text:span text:style-name="T7">35</text:span><text:span text:style-name="T1">.</text:span></text:p>
      <text:p text:style-name="P1"><text:span text:style-name="T1">Para resolver este limite, Go implementou a preempção determinística com a </text:span><text:span text:style-name="T4">Preempção Assíncrona</text:span><text:span text:style-name="T1">. A engenharia monitora todas as atuações do sistema e delega à corrotina silenciosa especial do motor mestre, designada sysmon (System Monitor), o privilégio de sobreposição das prerrogativas centrais. O sysmon opera fora dos limites das matrizes tradicionais, pois é executado numa </text:span><text:span text:style-name="T2">Machine</text:span><text:span text:style-name="T1"> (M) segregada do </text:span><text:span text:style-name="T2">kernel</text:span><text:span text:style-name="T1"> sem nunca precisar possuir o elo abstrato a nenhum Processador Central do sistema lógico "P"</text:span><text:span text:style-name="T7">36</text:span><text:span text:style-name="T1">. Periodicamente — em pulsos dimensionados entre dezenas de microssegundos a poucos milissegundos —, ele averigua implacavelmente a totalidade dos ciclos em andamento na CPU e aplica punições às instâncias transgressoras</text:span><text:span text:style-name="T7">36</text:span><text:span text:style-name="T1">.</text:span></text:p>
      <text:p text:style-name="P1"><text:span text:style-name="T1">Se a vigilância flagrar um bloco em andamento por uma janela crônica excedendo a marca contínua absoluta dos </text:span><text:span text:style-name="T4">10 milissegundos</text:span><text:span text:style-name="T1"> de atuação matemática restrita e sem cedência temporal, a paralisação se inicia</text:span><text:span text:style-name="T7">35</text:span><text:span text:style-name="T1">.</text:span></text:p>
      <text:list xml:id="list597557328" text:style-name="WWNum2">
        <text:list-item>
          <text:p text:style-name="P7"><text:span text:style-name="T4">Em Ambientes POSIX/Linux:</text:span><text:span text:style-name="T1"> O sysmon envia ordens nativas despachando sub-processos do tipo de sinais urgentes do espaço externo de hardware denominado SIGURG ao contexto adormecido exato em que a </text:span><text:span text:style-name="T2">thread</text:span><text:span text:style-name="T1"> do SO (M) monopolizada reside. A escolha da primitiva SIGURG é magistral, pois, diferentemente de interrupções destrutivas clássicas e bloqueantes como SIGKILL ou SIGINT, não causa </text:span><text:span text:style-name="T2">crashes</text:span><text:span text:style-name="T1"> nas bibliotecas externas anexadas nativamente via sistemas libc paralelos (CGO). O manuseio de sinais instintivo força a </text:span><text:span text:style-name="T2">Thread</text:span><text:span text:style-name="T1"> mestre a interromper tudo e disparar de volta um </text:span><text:span text:style-name="T2">handler</text:span><text:span text:style-name="T1"> estrito do </text:span><text:span text:style-name="T2">runtime</text:span><text:span text:style-name="T1">, injetando ativamente uma invocação direta invisível à base vetorial do código no sub-contador programático: a injeção do pacote runtime.asyncPreempt. Essa manobra salva todas as chaves e encerramentos temporais de dados subjacentes da </text:span><text:span text:style-name="T2">goroutine</text:span><text:span text:style-name="T1">, suspendendo imediatamente o fluxo em modo seguro e devolvendo forçosamente a submissão escalonada ao limite principal da Fila de Execução Global do sistema</text:span><text:span text:style-name="T7">35</text:span><text:span text:style-name="T1">.</text:span></text:p>
        </text:list-item>
        <text:list-item>
          <text:p text:style-name="P7"><text:span text:style-name="T4">Em Ambientes Windows:</text:span><text:span text:style-name="T1"> Dado que a API do Windows não oferece suporte a sinais POSIX equivalentes não-destrutivos baseados em interrupções pthread_kill, a engenharia paralela da preempção assíncrona utiliza uma lógica nativa intrinsecamente engenhosa no núcleo de submissão do WinAPI, combinando ativamente invocações de travamento em API de baixo nível: SuspendThread em paralelo a transações diretas da API nativa como GetThreadContext e SetThreadContext. Através destes blocos fundamentais operacionais da base do SO Windows, a máquina rastreia o contexto, empilha forçadamente saltos temporais e modifica o processador de estado absoluto para alcançar o mesmíssimo resultado final</text:span><text:span text:style-name="T7">37</text:span><text:span text:style-name="T1">. As operações de API estão protegidas contra cenários fatais onde colisões e disputas entre depuradores (debuggers) e paralisações manuais gerariam </text:span><text:span text:style-name="T2">deadlocks</text:span><text:span text:style-name="T1"> incontroláveis na finalização, sendo perfeitamente protegidas por implementações que mitigam conflitos atômicos antes mesmo da desapropriação em software iniciar e contornando chamadas de preempções ativas através de chaves ativas do controle interno de preempção (via flags asyncpreemptoff)</text:span><text:span text:style-name="T7">37</text:span><text:span text:style-name="T1">.</text:span></text:p>
        </text:list-item>
      </text:list>
      <text:p text:style-name="P1"><text:span text:style-name="T1">A arquitetura M:P:G, o </text:span><text:span text:style-name="T2">Work-Stealing</text:span><text:span text:style-name="T1"> reativo, o I/O assíncrono com o </text:span><text:span text:style-name="T2">Netpoller</text:span><text:span text:style-name="T1"> sem dependências e o isolamento punitivo gerido por sysmon conferem à infraestrutura orquestrada por Go (como orquestradores Docker e as esteiras Terraform em </text:span><text:span text:style-name="T2">data centers</text:span><text:span text:style-name="T1">) um limite operacional absolutamente escalonável sem a intrusão limitadora tradicional que as rotinas de bloqueios massivos enfrentam, ditando as regras do balanceamento termodinâmico perfeito que pauta a nuvem distribuída contemporânea.</text:span></text:p>
      <text:p text:style-name="P2"/>
      <table:table table:name="Table4" table:style-name="Table4">
        <table:table-column table:style-name="Table4.A" table:number-columns-repeated="3"/>
        <table:table-row table:style-name="Table4.1">
          <table:table-cell table:style-name="Table4.A1" office:value-type="string">
            <text:p text:style-name="P3"><text:span text:style-name="T4">Pilar do Scheduler</text:span></text:p>
          </table:table-cell>
          <table:table-cell table:style-name="Table4.A1" office:value-type="string">
            <text:p text:style-name="P3"><text:span text:style-name="T4">Funcionalidade Principal</text:span></text:p>
          </table:table-cell>
          <table:table-cell table:style-name="Table4.A1" office:value-type="string">
            <text:p text:style-name="P3"><text:span text:style-name="T4">Vantagem de Performance Cloud-Native</text:span></text:p>
          </table:table-cell>
        </table:table-row>
        <table:table-row table:style-name="Table4.1">
          <table:table-cell table:style-name="Table4.A1" office:value-type="string">
            <text:p text:style-name="P3"><text:span text:style-name="T4">Arquitetura G-M-P</text:span></text:p>
          </table:table-cell>
          <table:table-cell table:style-name="Table4.A1" office:value-type="string">
            <text:p text:style-name="P1"><text:span text:style-name="T1">Desassociação em N-níveis das rotinas leves sobre limitadas threads do SO</text:span><text:span text:style-name="T7">33</text:span><text:span text:style-name="T1">.</text:span></text:p>
          </table:table-cell>
          <table:table-cell table:style-name="Table4.A1" office:value-type="string">
            <text:p text:style-name="P1"><text:span text:style-name="T1">Ocupação de memória fracionada (2KB/G vs. 1-8MB/OS Thread); context-switch no </text:span><text:span text:style-name="T2">user-space</text:span><text:span text:style-name="T1"> (~50-100ns) ao invés do </text:span><text:span text:style-name="T2">kernel-space</text:span><text:span text:style-name="T1"> (~1-2µs)</text:span><text:span text:style-name="T7">33</text:span><text:span text:style-name="T1">.</text:span></text:p>
          </table:table-cell>
        </table:table-row>
        <table:table-row table:style-name="Table4.1">
          <table:table-cell table:style-name="Table4.A1" office:value-type="string">
            <text:p text:style-name="P3"><text:span text:style-name="T3">Work-Stealing</text:span></text:p>
          </table:table-cell>
          <table:table-cell table:style-name="Table4.A1" office:value-type="string">
            <text:p text:style-name="P1"><text:span text:style-name="T1">Rebalanceamento autoajustável e descentralizado sem semáforos globais</text:span><text:span text:style-name="T7">33</text:span><text:span text:style-name="T1">.</text:span></text:p>
          </table:table-cell>
          <table:table-cell table:style-name="Table4.A1" office:value-type="string">
            <text:p text:style-name="P1"><text:span text:style-name="T1">Aproveitamento computacional total de instâncias com distribuição automática e mitigação de gargalos (gargalo de </text:span><text:span text:style-name="T2">lock</text:span><text:span text:style-name="T1"> global suprimido)</text:span><text:span text:style-name="T7">33</text:span><text:span text:style-name="T1">.</text:span></text:p>
          </table:table-cell>
        </table:table-row>
        <table:table-row table:style-name="Table4.1">
          <table:table-cell table:style-name="Table4.A1" office:value-type="string">
            <text:p text:style-name="P3"><text:span text:style-name="T3">Netpoller</text:span><text:span text:style-name="T4"> Assíncrono</text:span></text:p>
          </table:table-cell>
          <table:table-cell table:style-name="Table4.A1" office:value-type="string">
            <text:p text:style-name="P1"><text:span text:style-name="T1">Conexões de E/S capturadas (epoll/kqueue) e geridas pelo </text:span><text:span text:style-name="T2">runtime</text:span><text:span text:style-name="T1"> sob o capô do código síncrono</text:span><text:span text:style-name="T7">35</text:span><text:span text:style-name="T1">.</text:span></text:p>
          </table:table-cell>
          <table:table-cell table:style-name="Table4.A1" office:value-type="string">
            <text:p text:style-name="P1"><text:span text:style-name="T1">Cargas massivas em canais ou HTTP sem necessidade de </text:span><text:span text:style-name="T2">pools</text:span><text:span text:style-name="T1"> de threads complexos ou </text:span><text:span text:style-name="T2">callbacks</text:span><text:span text:style-name="T1"> imperativas; legibilidade perfeita de I/O</text:span><text:span text:style-name="T7">35</text:span><text:span text:style-name="T1">.</text:span></text:p>
          </table:table-cell>
        </table:table-row>
        <table:table-row table:style-name="Table4.1">
          <table:table-cell table:style-name="Table4.A1" office:value-type="string">
            <text:p text:style-name="P3"><text:span text:style-name="T4">Preempção via sysmon</text:span></text:p>
          </table:table-cell>
          <table:table-cell table:style-name="Table4.A1" office:value-type="string">
            <text:p text:style-name="P1"><text:span text:style-name="T1">Vigia contínua de processamento em </text:span><text:span text:style-name="T2">loops</text:span><text:span text:style-name="T1"> travados injetando paradas forçadas via SIGURG / SuspendThread</text:span><text:span text:style-name="T7">36</text:span><text:span text:style-name="T1">.</text:span></text:p>
          </table:table-cell>
          <table:table-cell table:style-name="Table4.A1" office:value-type="string">
            <text:p text:style-name="P1"><text:span text:style-name="T1">Goroutines com laços agressivos sem I/O (&gt;10ms) não causam fome às demais; o sistema nunca congela globalmente em nós de servidor pesado</text:span><text:span text:style-name="T7">35</text:span><text:span text:style-name="T1">.</text:span></text:p>
          </table:table-cell>
        </table:table-row>
      </table:table>
      <text:p text:style-name="P14"><text:span text:style-name="T1">4. Primitivas Cirúrgicas de Sincronização e a Prevenção da "Fome" no sync.RWMutex</text:span></text:p>
      <text:p text:style-name="P1"><text:span text:style-name="T1">No desenvolvimento em nuvem e de alta concorrência em Go, o provérbio arquitetural "Não se comunique compartilhando memória; compartilhe memória através da comunicação" dita o uso idiomático e seguro de </text:span><text:span text:style-name="T2">Channels</text:span><text:span text:style-name="T1"> para a passagem estrutural de mensagens sequenciais sem riscos atômicos no acesso. No entanto, para componentes internos densos, persistência restrita ou dados de configurações globais fortemente concorridas (como gerenciamento matricial no controlador de rede Kubernetes ou tabelas volumosas e efêmeras no Prometheus), as lógicas dependentes em </text:span><text:span text:style-name="T2">Channels</text:span><text:span text:style-name="T1"> causam excessos dispendiosos em overhead gerando latências insustentáveis e penalizações na CPU devido a roteamentos sequenciais exaustivos. Nestas regiões cruciais em instâncias de infraestrutura pesada, aplica-se o mapeamento absoluto da mutação com sincronismos diretos de baixo nível através de utilitários isolados embarcados pelo pacote da biblioteca nativa sync</text:span><text:span text:style-name="T7">1</text:span><text:span text:style-name="T1">.</text:span></text:p>
      <text:p text:style-name="P13"><text:span text:style-name="T1">4.1 A Punição das Travas Reentrantes</text:span></text:p>
      <text:p text:style-name="P1"><text:span text:style-name="T1">Em domínios construídos historicamente sobre Java ou C#, os </text:span><text:span text:style-name="T2">Locks</text:span><text:span text:style-name="T1"> (Travas) reentrantes são considerados recursos de segurança habituais, nos quais a mesmíssima linha condutora de interligação no software da </text:span><text:span text:style-name="T2">Thread</text:span><text:span text:style-name="T1"> pode continuar adquirindo o direito infinito em profundidade das exclusividades sem nunca enfrentar autoparalisações e sem disparar bloqueios contra a própria execução matricial originária. Por princípio arquitetural clínico, o Go elimina brutalmente as travas de reentrância por considerar o conceito inerentemente um anti-padrão propenso a espaguetes de código intrincados: "se uma trava mútua reentrante tiver necessidade de execução sistêmica isolada, isso corrobora que os limites arquiteturais em subfunções encontram-se equivocados"</text:span><text:span text:style-name="T7">50</text:span><text:span text:style-name="T1">. Caso engenheiros falhem e a goroutine reinserida encare a aquisição simultânea na biblioteca explícita sem liberação antecedente via Unlock, o escalonador principal imediatamente detecta anomalias colapsantes, emitindo falhas de </text:span><text:span text:style-name="T2">deadlock</text:span><text:span text:style-name="T1"> e interrompendo radicalmente todo o processo de imediato sob falha não-tolerada em modo pânico irrecuperável de execução</text:span><text:span text:style-name="T7">50</text:span><text:span text:style-name="T1">.</text:span></text:p>
      <text:p text:style-name="P13"><text:span text:style-name="T1">4.2 Imunidade Fisiológica Atômica à "Fome de Escritores" no sync.RWMutex</text:span></text:p>
      <text:p text:style-name="P1"><text:soft-page-break/><text:span text:style-name="T1">Cenários atípicos em configurações globais ou tabelas de caches em banco de dados gerenciam arquiteturas nas quais bilhões de solicitações simultâneas em acesso temporal necessitam exclusivamente processar lógicas de leituras (</text:span><text:span text:style-name="T2">reads</text:span><text:span text:style-name="T1">), e contudo esporádicos vetores operacionais restritos tentam implementar e sincronizar blocos ínfimos e críticos visando gravações definitivas das mutações correntes (</text:span><text:span text:style-name="T2">writes</text:span><text:span text:style-name="T1">). Para tais assimetrias, em particular com a disparidade volumétrica onde 10:1 a 100:1 tornam o simples sync.Mutex tradicional inadequado (por impor serialidade destrutiva bloqueando filas imensas desnecessariamente na rotina e impedindo leituras paralelas inócuas), o design apropriado requer o alinhamento com a implementação múltipla paralela sync.RWMutex (Semáforos múltiplos a Leitores/Travas restritivas a únicos Escritores)</text:span><text:span text:style-name="T7">50</text:span><text:span text:style-name="T1">.</text:span></text:p>
      <text:p text:style-name="P1"><text:span text:style-name="T1">A armadilha mortal oculta inerente e prevalente a esses </text:span><text:span text:style-name="T2">locks</text:span><text:span text:style-name="T1"> assimétricos reside na suscetibilidade a "Writer Starvation" (A Fome do Escritor). O problema exato englobado pelo cenário base conceitual é: uma onda sobreposta de dez mil leitores, fluindo de forma escalonada no tempo com bloqueios RLock(), pode sustentar ativamente as travas por períodos intermináveis na máquina. Caso o escritor intente travar as referências invocando ordens pesadas via comando paralelo Lock(), ele aguardaria ininterruptamente até a limpeza global paralela expirar</text:span><text:span text:style-name="T7">50</text:span><text:span text:style-name="T1">. A sobreposição inesgotável em ciclos paralelos contínuos provocaria latências dezenas ou até centenas de vezes superiores (congelamentos visíveis escalando para os milhares de milissegundos) bloqueando a injeção dos dados e a evolução estrutural</text:span><text:span text:style-name="T7">52</text:span><text:span text:style-name="T1">. A infraestrutura em Cloud-Native jamais pode hesitar e o determinismo na entrega temporal na biblioteca interna exige rigor extremo.</text:span></text:p>
      <text:p text:style-name="P1"><text:span text:style-name="T1">O código de base em linguagem C/Assembly na implementação da arquitetura da ferramenta sync.RWMutex do Go Runtime blinda as corrotinas contra essa possibilidade de fome ao integrar sem falhas sistêmicas os paradigmas de inversões radicais baseadas em semáforos, aplicando fundamentalmente e incondicionalmente regras matemáticas rigorosas de </text:span><text:span text:style-name="T4">Prioridade Preventiva a Escritores Pendentes</text:span><text:span text:style-name="T7">50</text:span><text:span text:style-name="T1">.</text:span></text:p>
      <text:p text:style-name="P1"><text:span text:style-name="T1">O funcionamento da mecânica subjacente baseia-se em registradores matemáticos assíncronos acoplados às diretrizes estritas do código de compilação</text:span><text:span text:style-name="T7">57</text:span><text:span text:style-name="T1">:</text:span></text:p>
      <text:list xml:id="list3136840925" text:style-name="WWNum3">
        <text:list-item>
          <text:p text:style-name="P6"><text:span text:style-name="T1">w Mutex: Trava física primitiva operando entre todas as potenciais transações concorrentes e restritas com propósitos de mutações do Estado de Escrita; serializa os competidores para garantir que apenas um Escritor transite as invocações em qualquer dado nanossegundo, isolando instâncias rivais entre os gravadores de base</text:span><text:span text:style-name="T7">57</text:span><text:span text:style-name="T1">.</text:span></text:p>
        </text:list-item>
        <text:list-item>
          <text:p text:style-name="P6"><text:span text:style-name="T1">readerCount atomic.Int32: Registrador matricial transacional unificado do bloco paralelo responsável e dotado de função dual, indicando na íntegra a quantidade de transações leitoras fluindo nas rotinas, </text:span><text:span text:style-name="T4">mas simultaneamente empregado para anunciar se há escritores pendentes adormecidos aguardando injeção em filas bloqueadas no sistema de Semáforos</text:span><text:span text:style-name="T7">54</text:span><text:span text:style-name="T1">.</text:span></text:p>
        </text:list-item>
        <text:list-item>
          <text:p text:style-name="P6"><text:span text:style-name="T1">readerWait int32: Variável contador complementar focada no decréscimo transacional remanescente residual; isola a quantia de leitores antigos na transação ativa residual exigidos de finalizarem as saídas do núcleo e executarem suas sinalizações antes do sistema destrancar a liberação via Semáforo mestre</text:span><text:span text:style-name="T7">57</text:span><text:span text:style-name="T1">.</text:span></text:p>
        </text:list-item>
        <text:list-item>
          <text:p text:style-name="P6"><text:span text:style-name="T1">writerSem / readerSem: Identificadores sinalizadores atómicos acionados pela API primária submetendo chamadas paralelizadoras profundas ao SO no agendador via invocações implícitas para gerenciadores internos (como runtime_Semacquire / runtime_Semrelease), suspendendo ou acordando imediatamente entidades</text:span><text:span text:style-name="T7">57</text:span><text:span text:style-name="T1">.</text:span></text:p>
        </text:list-item>
      </text:list>
      <text:p text:style-name="P1"><text:span text:style-name="T1">A inversão da lógica anti-fome ocorre por meio da reordenação e reatribuição matemática no ponto em que o sinalizador de mutação e aquisição exclusivista é disparado pelo Escritor invocando o contrato base Lock():</text:span></text:p>
      <text:list xml:id="list4176923874" text:style-name="WWNum4">
        <text:list-item>
          <text:p text:style-name="P8"><text:span text:style-name="T4">Exclusão Concorrente Primária e Notificação ao </text:span><text:span text:style-name="T3">Runtime</text:span><text:span text:style-name="T4">:</text:span><text:span text:style-name="T1"> O pretenso Escritor bloqueia instantaneamente as ramificações rivais que anseiam concorrer gravando com a instrução local rw.w.Lock(). Em seguida, para sinalizar ao universo escalonado intermitente sem utilizar bloqueios </text:span><text:span text:style-name="T2">mutexes</text:span><text:span text:style-name="T1"> destrutivos baseados em interrupções no </text:span><text:span text:style-name="T2">Kernel</text:span><text:span text:style-name="T1">, a instância efetiva extrai e anexa subtrações atômicas pesadas no núcleo contábil, adicionando diretamente ao contador um fator negativo maciço denominado internamente no código estrito da linguagem como o identificador estático restritivo rwmutexMaxReaders (cujo módulo nominal e estático é o correspondente exponencial atômico base binário de valor </text:span><draw:frame draw:style-name="fr1" draw:name="image1.png" text:anchor-type="as-char" svg:width="0.6547in" svg:height="0.2571in" draw:z-index="0"><draw:image xlink:href="Pictures/100002010000005400000021634A36C21B5EB7F3.png" xlink:type="simple" xlink:show="embed" xlink:actuate="onLoad" loext:mime-type="image/png"/></draw:frame><text:span text:style-name="T1">, limitando perfeitamente 1 bilhão de ocorrências) utilizando a chamada profunda de sub-rotinas operacionais atomic.AddInt32(&amp;rw.readerCount, -rwmutexMaxReaders)</text:span><text:span text:style-name="T7">54</text:span><text:span text:style-name="T1">.</text:span></text:p>
        </text:list-item>
        <text:list-item>
          <text:p text:style-name="P8"><text:span text:style-name="T4">O Muro e Bloqueio Inerente Contra Sucessores Futuros:</text:span><text:span text:style-name="T1"> O acionamento de valores negativos monumentais sob o limite atômico instaura a inversão instantânea da matriz condicional global em todo o subsistema paralelo operante e flutuante. Caso qualquer nova Corrotina leitora intercepte requisições de escuta com injeção sequencial em tempo posterior via primitivas locais e invoque transações em blocos contíguos utilizando chamadas sequenciais sob RLock(), o compilador incrementará as validações atômicas em processamento sob readerCount e, instantaneamente, flagrará e mapeará o índice transacional exposto sob matriz negativa (exemplo hipotético, caso zero instâncias iniciais e isoladas estejam ocorrendo na malha temporal no registro prévio, a constante retorna atômica o limitador numérico indicativo da balança sob um teto flutuante aproximado da capacidade negativa de -1073741823). O flagrante matemático explícito sinaliza categoricamente à entidade Leitora nova de que o espaço foi reivindicado preventivamente no modelo e bloqueia de modo instantâneo, absoluto e definitivo a continuidade leitora subordinando o Leitor novo ao congelamento obrigatório e enclausuramento imediato através de espera em chamadas nativas de sinal de sistema e do repouso profundo em sub-processamento aguardando nas vias do semáforo estático correspondente readerSem de volta à vida</text:span><text:span text:style-name="T7">54</text:span><text:span text:style-name="T1">.</text:span></text:p>
        </text:list-item>
        <text:list-item>
          <text:p text:style-name="P8"><text:span text:style-name="T4">Liberação Ordenada e Fim das Execuções Originais Residuais em Processamento (</text:span><text:span text:style-name="T3">Draining Process</text:span><text:span text:style-name="T4">):</text:span><text:span text:style-name="T1"> O maquinário do RWMutex impede o estrangulamento caótico em curso; ele preserva os leitores prévios e originais da transação antes de seu momento exato e isolado da trava inicial, preservando-os via variáveis espelhadas atômicas restritas e reatribuídas. A matriz contábil residual da quantidade decodificada real na operação devolve ao estado central do sistema quantias matemáticas reais de remanescentes vivos aguardadas isoladamente do limite negativo, transferindo-as para o registro readerWait. O gravador mestre estaciona a evolução operacional executiva congelando silenciosamente no agendamento através das camadas via writerSem, aguardando a devolução das parcelas de recursos pela extinção transacional por parte dos leitores primários preexistentes de modo assíncrono durante cada RUnlock() consecutivo; assim, o último executor primário decrescente zera o registro global em sua devolução isolada final validando os direitos pendentes, re-injetando no núcleo o sinal vital para que o Escritor mestre obtenha instantânea aquisição da </text:span><text:span text:style-name="T2">Thread</text:span><text:span text:style-name="T1"> mestre nativa na base do sistema orquestrado central da liberação atômica absoluta</text:span><text:span text:style-name="T7">52</text:span><text:span text:style-name="T1">.</text:span></text:p>
        </text:list-item>
      </text:list>
      <text:p text:style-name="P1"><text:span text:style-name="T1">A devolução do bloqueio após o transcorrer e sucesso de todas as instâncias em transações operativas exclusivas de gravações no sistema flutuante via utilidade central finalizadora da rotina, a ação reversa mestre e simétrica pelo Escritor (em Unlock()), reverte a matriz com acoplamento restrito por compensações algébricas injetando a mesmíssima constante de grandeza absurda </text:span><draw:frame draw:style-name="fr1" draw:name="Image1" text:anchor-type="as-char" svg:width="0.6547in" svg:height="0.2571in" draw:z-index="0"><draw:image xlink:href="Pictures/100002010000005400000021634A36C21B5EB7F3.png" xlink:type="simple" xlink:show="embed" xlink:actuate="onLoad" loext:mime-type="image/png"/></draw:frame><text:span text:style-name="T1"><text:s/>de modo atômico e reconvertendo inequivocamente e de vez as ordens transacionais a margens e saldos base positivos. Essa mutação positiva imediata reflete um despertar coletivo inibido acionando repasses do semáforo de ativação simultâneo contínuo nas fileiras aguardadas nas rotinas readerSem adormecidas enclausuradas e possibilitando o avanço orquestrado de forma perfeitamente sequenciada de todas as milhares e imensas correntes subjacentes de Leitores posteriores enfileiradas e acumuladas que estiveram subordinados na retenção contínua</text:span><text:span text:style-name="T7">52</text:span><text:span text:style-name="T1">.</text:span></text:p>
      <text:p text:style-name="P2"/>
      <table:table table:name="Table5" table:style-name="Table5">
        <table:table-column table:style-name="Table5.A" table:number-columns-repeated="3"/>
        <table:table-row table:style-name="Table5.1">
          <table:table-cell table:style-name="Table5.A1" office:value-type="string">
            <text:p text:style-name="P3"><text:span text:style-name="T4">Fase Evolutiva da Transação na Operação em Matrizes sync.RWMutex</text:span></text:p>
          </table:table-cell>
          <table:table-cell table:style-name="Table5.A1" office:value-type="string">
            <text:p text:style-name="P3"><text:span text:style-name="T4">Limite da Regra Transacional Base Operacional Matemática em Andamento</text:span></text:p>
          </table:table-cell>
          <table:table-cell table:style-name="Table5.A1" office:value-type="string">
            <text:p text:style-name="P3"><text:span text:style-name="T4">Efeito Real Escalonado Pós-Compilação em Comportamento Termodinâmico Operado sob Base Híbrida do Sistema M:P:G</text:span></text:p>
          </table:table-cell>
        </table:table-row>
        <table:table-row table:style-name="Table5.1">
          <table:table-cell table:style-name="Table5.A1" office:value-type="string">
            <text:p text:style-name="P3"><text:span text:style-name="T4">Leitura Paralela em Grande Volume de Frequência Contínua (Normal/Mestre)</text:span></text:p>
          </table:table-cell>
          <table:table-cell table:style-name="Table5.A1" office:value-type="string">
            <text:p text:style-name="P3"><text:span text:style-name="T1">Chamadas efetuadas via chamadas sucessivas de bloqueio base em matriz estática a restrições RLock() -&gt; Contador paralelo em sistema mantido em métrica estática positiva com margens limpas sob readerCount &gt; 0.</text:span></text:p>
          </table:table-cell>
          <table:table-cell table:style-name="Table5.A1" office:value-type="string">
            <text:p text:style-name="P3"><text:span text:style-name="T1">Múltiplas rotinas pesadas baseadas localmente em frotas independentes de micro </text:span><text:span text:style-name="T2">Threads</text:span><text:span text:style-name="T1"> (Goroutines) executam livre e simultaneamente </text:span><text:span text:style-name="T2">fetches</text:span><text:span text:style-name="T1"> contíguos efetuando recuperações em áreas protegidas sem impor gargalos absolutos ou travas restritivas paralizantes em limites contábeis em escala no </text:span><text:span text:style-name="T2">Hardware</text:span><text:span text:style-name="T1"> da Nuvem.</text:span></text:p>
          </table:table-cell>
        </table:table-row>
        <table:table-row table:style-name="Table5.1">
          <table:table-cell table:style-name="Table5.A1" office:value-type="string">
            <text:p text:style-name="P3"><text:span text:style-name="T4">Ponto Transacional Crítico e Acionamento Físico Indutivo a Barreiras Preventivas Mestre (</text:span><text:span text:style-name="T3">Lock</text:span><text:span text:style-name="T4">)</text:span></text:p>
          </table:table-cell>
          <table:table-cell table:style-name="Table5.A1" office:value-type="string">
            <text:p text:style-name="P3"><text:span text:style-name="T1">O Escalador Sub-rotina Escritor requer controle da malha acionando sub-comandos no motor a transações via base paralela Lock() e isolando a concorrência mestre via rotinas restritas atômicas a rw.w.</text:span></text:p>
          </table:table-cell>
          <table:table-cell table:style-name="Table5.A1" office:value-type="string">
            <text:p text:style-name="P1"><text:span text:style-name="T1">O algoritmo insere decréscimos sub-atômicos irreversíveis limitados na variável na ordem maciça exata restritiva da equação de subtração na grandeza imutável em -1073741824. O limitador global decai para sinal base sub-zero. A via do leitor condicional acusa impedimento nativo negativo barrando definitivamente que "Fomes Intermináveis de Escritores" sigam perpetuando-se no agendador mestre bloqueando sucessivos leitores imediatos adentrantes forçando hibernação automática por ordens OS em repouso e aguardo nas rotinas escalonáveis restritas</text:span><text:span text:style-name="T7">52</text:span><text:span text:style-name="T1">.</text:span></text:p>
          </table:table-cell>
        </table:table-row>
        <table:table-row table:style-name="Table5.1">
          <table:table-cell table:style-name="Table5.A1" office:value-type="string">
            <text:p text:style-name="P3"><text:span text:style-name="T4">Drenagem Residual Assíncrona Total (</text:span><text:span text:style-name="T3">Draining</text:span><text:span text:style-name="T4">)</text:span></text:p>
          </table:table-cell>
          <table:table-cell table:style-name="Table5.A1" office:value-type="string">
            <text:p text:style-name="P3"><text:span text:style-name="T1">O sistema impõe espera para transações originárias de Leitores antigos através do bloqueio final e encerramentos executados nos termos finais efetuados nas vias residuais remanescentes operantes ativas invocando ordens RUnlock().</text:span></text:p>
          </table:table-cell>
          <table:table-cell table:style-name="Table5.A1" office:value-type="string">
            <text:p text:style-name="P1"><text:span text:style-name="T1">Leitores em fluxo normal de processo finalizam e decaem saldos secundários associados nas ramificações atômicas ao limite isolado do sistema paralelo mantido por contagem residual temporal via restrições operativas na variável paralela temporal flutuante de base em readerWait. Apenas e exclusivamente a última execução decrescente final devolve e desperta o controle primário sinalizando liberações definitivas no Kernel e OS sob ordem de transições por repasse isolado liberatório no controlador atômico estritamente via Semáforos Mestre no sistema em repasse final de liberações ao fluxo nativo Escritor por acordos writerSem</text:span><text:span text:style-name="T7">52</text:span><text:span text:style-name="T1">.</text:span></text:p>
          </table:table-cell>
        </table:table-row>
      </table:table>
      <text:p text:style-name="P1"><text:span text:style-name="T1">Esta coordenação restrita exibe porque os paradigmas e modelos conceituais base de sincronização no padrão em Go tornam instâncias formidáveis que protegem as entranhas na engenharia das rotinas dos </text:span><text:span text:style-name="T2">Controladores em Cloud-Native</text:span><text:span text:style-name="T1">, onde dezenas de milhares de fluxos em rotinas cruzam caminhos e a precisão do </text:span><text:span text:style-name="T2">Zero-Starvation</text:span><text:span text:style-name="T1"> não é tolerável senão tratada clinicamente nas matrizes orquestrais limpas do </text:span><text:span text:style-name="T2">Locking</text:span><text:span text:style-name="T1"> orquestrado sem dependências complexas no Kernel.</text:span></text:p>
      <text:p text:style-name="P14"><text:span text:style-name="T1">5. Subtipagem Estrutural (Structural Subtyping) e Domain-Driven Design (DDD) - O Padrão Kubernetes</text:span></text:p>
      <text:p text:style-name="P1"><text:span text:style-name="T1">Enquanto o núcleo rígido atômico regula a saúde e sanidade local computacional e evita colapsos do I/O assíncrono em matrizes subjacentes na infraestrutura baseada no silício subjacente e no Hardware, a modelagem superior funcional dos objetos dita a arquitetura escalonável para sobrevivências das manutenções orgânicas estruturadas e sustentáveis ao longo do tempo evolutivo em corporações tecnológicas. Para sistemas imensos orquestrados sob pilhas contendo vários milhões de blocos, como as camadas lógicas operativas dos micro-modelos nos painéis transacionais em estruturas de bases na infraestrutura pesada orquestradas em projetos base originários nos subgrupos como Kubernetes, Terraform ou arquiteturas profundas subjacentes aos controladores das API, o monolito é evitado sob rigidez absoluta via submissão às regras sistêmicas orientadas pela </text:span><text:span text:style-name="T2">Clean Architecture</text:span><text:span text:style-name="T1"> e </text:span><text:span text:style-name="T2">Domain-Driven Design</text:span><text:span text:style-name="T1"> (DDD) em consequência implícita de uma das restrições nativas puras peculiares que dita o projeto inteiro no ecossistema e modelagem paralela na base orientada estritamente às abstrações das lógicas em código nativo da linguagem no Go: A adoção imperativa estática orientada a modelagem conceitual via validações denominadas estruturalmente baseadas nas tipagens restritivas atreladas nativas denominadas </text:span><text:span text:style-name="T4">Interfaces Implícitas (Structural Subtyping)</text:span><text:span text:style-name="T7">1</text:span><text:span text:style-name="T1">.</text:span></text:p>
      <text:p text:style-name="P1"><text:soft-page-break/><text:span text:style-name="T1">Em modelagens estruturais e tradicionais dominantes originadas por implementações legadas em POO nas raízes antigas tradicionais em hierarquias e sistemas orquestrados de bases restritivas de linguagens concorrentes derivadas oriundas (como estruturas formais em Java ou sub-hierarquias verbosas de assinaturas no ecossistema C#), as super-interfaces exigem contratos bidirecionais hierárquicos severos e dependências cruzadas, nos quais os pacotes básicos dos injetores externos no topo periférico são forçados e subordinados rigidamente na árvore mestre a declararem ligações subordinadas de matriz mestre originada via anotações pesadas em códigos imperativos através de implementações base explícitas como diretivas de assinatura acopladas no texto restritivas sob cláusulas imutáveis nativas no topo de </text:span><text:span text:style-name="T2">implements InterfaceX</text:span><text:span text:style-name="T1">. Isso obriga irremediavelmente acoplamentos sujos no código mestre da compilação e instiga engarrafamentos em </text:span><text:span text:style-name="T2">Dependency Hell</text:span><text:span text:style-name="T1"> em módulos descentralizados</text:span><text:span text:style-name="T7">1</text:span><text:span text:style-name="T1">.</text:span></text:p>
      <text:p text:style-name="P1"><text:span text:style-name="T1">O Go quebra este engessamento com validações seguras estáticas e diretas por assinaturas validadas indiretamente pelo construtor em </text:span><text:span text:style-name="T2">compile-time</text:span><text:span text:style-name="T1">. O modelo semântico atua em um </text:span><text:span text:style-name="T2">duck typing</text:span><text:span text:style-name="T1"> operando sem acoplamento e sela a subtipagem baseada em estruturas absolutas puras nas premissas orientadas ao </text:span><text:span text:style-name="T2">Structural Subtyping</text:span><text:span text:style-name="T1">. Se uma estrutura possui uma base em métodos compatível matematicamente com os dados restritivos delineados daquela base em contrato nas interfaces menores na base consumidora abstrata (exemplo, interfaces restritivas abstratas contendo chamadas curtas simples atadas a subcomandos estáticos isolados puros tipo as matrizes operacionais Reader, Writer, ou os componentes mestre de APIs limitadoras como lógicas a invocações no CommandGroup), a rotina a cumpre integralmente por subordinações passivas naturais validando lógicas nas matrizes em silêncio. Interfaces puras minúsculas inseridas isoladamente no interior do escopo mais enraizado hermético na base na camada protegida purificada e limpa submetem o isolamento perfeito nos módulos base da aplicação (as rotinas de escopo </text:span><text:span text:style-name="T2">pkg/app</text:span><text:span text:style-name="T1">) assegurando proteções perfeitas limitadas na base às infraestruturas mutáveis sujas e exteriores injetadas indiretamente e protegendo lógicas absolutas críticas e de </text:span><text:span text:style-name="T2">mocking</text:span><text:span text:style-name="T1"> na testagem orgânica dos códigos puros descentralizados e autossuficientes</text:span><text:span text:style-name="T7">1</text:span><text:span text:style-name="T1">.</text:span></text:p>
      <text:p text:style-name="P13"><text:span text:style-name="T1">5.1 O Caso Extremo na API Kubernetes: A Filagem Orientada ao Modelo client-go, Informers e o Sistema Ingestor DeltaFIFO</text:span></text:p>
      <text:p text:style-name="P1"><text:span text:style-name="T1">A arquitetura paralela adotada internamente pelo repositório basilar na API orientada nativa subjacente em base a lógicas operacionais orquestradas globalmente nas frotas estendidas das extensões originárias nos controladores fundamentais em ecossistemas de rede nativos no Kubernetes (que dependem unicamente extensivamente da interoperabilidade orquestral das bibliotecas orgânicas internas e isoladas de lógicas assíncronas geridas internamente nas primitivas exclusivas e injetoras contínuas expostas em roteamentos descentralizados assíncronos restritivos no pacote estendido orquestrador do sistema cliente em sincronismos abertos chamado client-go) submete e reflete uma das instâncias absolutas máximas de representação funcional exemplar na base do auge de um Design Guiado pelo Domínio puro descentralizado restrito orquestrado por filas nas aplicações em linguagens orientadas à engenharia base funcional</text:span><text:span text:style-name="T7">62</text:span><text:span text:style-name="T1">.</text:span></text:p>
      <text:p text:style-name="P1"><text:span text:style-name="T1">Um Controlador no ecossistema subjacente não rege ou monitora seu estado ativamente nas validações contínuas interrogando brutalmente, forçando e exaurindo subestações atômicas repetidas vezes a cada nanossegundo os bancos de infraestruturas no coração global operante nativo interno restrito através dos nós do </text:span><text:span text:style-name="T2">API Server</text:span><text:span text:style-name="T1"> através de laços infinitos lógicos simples operados com ordens de repetições brutas contínuas submetidas sob ordens sucessivas massivas denominadas nas rotinas engessadas originárias ativas na base contínua em arquitetura (</text:span><text:span text:style-name="T2">polling</text:span><text:span text:style-name="T1">), pois arquiteturas puras desta magnitude causariam gargalos absolutos inundando lógicas internas com gargalos críticos imensos forçando quedas e colapsos em interrupções e estrangulamentos absolutos e aniquilando a banda do cluster</text:span><text:span text:style-name="T7">63</text:span><text:span text:style-name="T1">.</text:span></text:p>
      <text:p text:style-name="P1"><text:span text:style-name="T1">Em vez dessa imperfeição de base exaustiva nas comunicações, a engenharia orquestradora em fluxos baseia a observação local no emparelhamento interconectado orquestrado isolado e guiado pela abstração indireta por componentes em pacotes independentes injetados a filas na cache restrita. Os arquitetos de sistemas implementaram nativamente no topo e nas dependências operantes as injeções orgânicas estruturais do pacote isolador limitador tools/cache, onde atua a genialidade nas matrizes lógicas isoladoras das ferramentas no módulo, orquestrando lógicas nas ferramentas restritas do ecossistema assíncrono nativo local através dos despachadores em base chamados </text:span><text:span text:style-name="T2">Informers</text:span><text:span text:style-name="T1"> acoplados de modo contíguo à super infraestrutura de Filagem Especial inteligente assíncrona local de roteamentos restritivos de concorrências nas matrizes denominada originária ativamente no sistema restrito purificado pelas instâncias base atreladas às entidades denominadas internamente como o limitador de tráfegos batizado e unificado com base orientadora central nomeado DeltaFIFO</text:span><text:span text:style-name="T7">62</text:span><text:span text:style-name="T1">.</text:span></text:p>
      <text:p text:style-name="P1"><text:span text:style-name="T1">A rotina da fila limitadora e atrelada base não funciona rebaixando-se como filagens lógicas convencionais tradicionais ingênuas restritivas e exaustivas sem restrições lógicas</text:span><text:span text:style-name="T7">65</text:span><text:span text:style-name="T1">. Uma </text:span><text:span text:style-name="T2">DeltaFIFO</text:span><text:span text:style-name="T1"> interage e se autogoverna orquestrando ativamente restrições dinâmicas assíncronas operantes internamente num contexto de base orientada na função e estrutura baseada na coalizão e compressões nos limites dos blocos de eventos sequenciais estendidos com agregação orientada restritiva baseados restritamente nas instâncias originais identificadoras sob um vetor ou chave única restrita originária ativamente isoladora na máquina (referente nativo em lógicas base aos blocos que concatenam estritamente o unificado nome matricial atrelado base e o contexto delimitado de nomenclatura e região limitadora ou espaço em subgrupo estrito nomeado local ativamente interligado de referências estáticas cruzadas restritivas nas matrizes baseadas por chave ou limites de instâncias como o referenciamento das tabelas cruzadas denominadas em namespace/name)</text:span><text:span text:style-name="T7">65</text:span><text:span text:style-name="T1">. Isso impossibilita a superlotação catastrófica de processamento local indesejado atrelado no ambiente de memória, em que transações sequenciais submetidas originam gargalos paralelos restritivos repetitivos caso atualizações esporádicas imensamente velozes sejam injetadas sequencialmente em ritmos massivos (exemplo: se o subsistema e o nó acoplador injetarem atualizações submetidas a instâncias ativamente enviando transações dinâmicas cinco ordens consecutivas flutuantes restritas para modificações e mutações nas malhas flutuantes originadas interligando roteamentos do ecossistema central, gerando sequenciais na restrição de limites originados para subestações ativamente na porta limitadora sequencial para um mesmo recurso ou para a referida rotina sob limites ativamente no pod num segundo específico, apenas o processamento unificado isolado das listas compactadas da entidade delta sobrevive no rastreio da fila para análise e re-reconciliações finais mitigando gargalos submetendo repasses lógicos na fila de espera contígua e transita unificando processos ao trabalhador isolado da máquina e repassando fluxos contíguos de encerramentos)</text:span><text:span text:style-name="T7">65</text:span><text:span text:style-name="T1">.</text:span></text:p>
      <text:p text:style-name="P1"><text:span text:style-name="T1">As corrotinas trabalhadoras orquestradas da malha descentralizada final interligadas operam a base dos módulos independentes abstraídos extraindo do limitador sequencial unificado em roteamento os contratos sob restrições limites restritivas oriundos e operantes em pacotes atrelados nas lógicas originais e extraídos pelas rotinas a interações limpas nas instâncias injetoras dos módulos nas origens das invocações e encapsulamentos chamados DeltaFIFO</text:span><text:span text:style-name="T7">65</text:span><text:span text:style-name="T1">. Tais operações são repassadas a manipuladores secundários delegando possíveis repetições e retrocessos de falhas assíncronas transacionais contíguas em falhas dinâmicas isoladoras lógicas orquestradas e passíveis originadas nas malhas lógicas nas lógicas chamadoras operando sob restrições secundárias denominadas localmente nas lógicas limitadas nas entidades filadoras assíncronas estendidas das transações na malha central conhecidas sob limites restritos como o roteador base das restrições e tráfegos nos canais nativos denominado de limitadores restritos operantes centrais unificados ou limitadores restritos atrelados chamados Rate-Limiting Queues, onde recuos dinâmicos transacionais aplicam algoritmos profundos assíncronos baseados em penalizações temporais geométricas contínuas (exemplo de lógicas dinâmicas onde a penalidade ou espera flutuante injetora transacional origina reações crescentes, restritas ou de repousos crescentes contínuos lógicas denominadas de submissões em esquemas chamados algoritmos em punições sob base restritiva com base na teoria restritiva originada do uso exponencial denominado </text:span><text:span text:style-name="T2">exponential backoffs</text:span><text:span text:style-name="T1"> mitigando transações contínuas interligando </text:span><text:span text:style-name="T2">hot loops</text:span><text:span text:style-name="T1">)</text:span><text:span text:style-name="T7">63</text:span><text:span text:style-name="T1">. O encapsulamento limpo proporcionado pelas interações injetadas com </text:span><text:span text:style-name="T2">Structural Subtyping</text:span><text:span text:style-name="T1"> corta interconexões circulares perigosas nos submódulos nas bases e referências entre instâncias ativas isoladas protegendo o monitorador mestre da comunicação externa (Reflector nativo do SO ou instâncias assíncronas estritas nas bases) e distanciando interações acopladoras complexas submetidas sob a máquina</text:span><text:span text:style-name="T7">63</text:span><text:span text:style-name="T1">.</text:span></text:p>
      <text:p text:style-name="P14"><text:span text:style-name="T1">6. Maturidade Operacional Extrema, Telemetria Clínica e Otimização Dinâmica por PGO</text:span></text:p>
      <text:p text:style-name="P1"><text:span text:style-name="T1">O rigor do ecossistema Go ultrapassa as discussões de semântica abstrata em código e tipagem durante as janelas de compilação iniciais e transborda efetivamente na transparência militar e operacional exigida de sistemas dinâmicos no ecossistema e em linha de produção no ambiente global da internet em execução diuturna. A instrumentação integrada organicamente na base referencial orgânica da máquina via utilitários estendidos locais do núcleo compõe a pedra angular nos domínios de arquiteturas descentralizadas baseando microsserviços pesados: módulos injetados integrados na rotina operante padrão local da linguagem compilada contendo instâncias do rastreador referenciado em ferramentas e depuradores nativos e utilitários orgânicos diretos empacotadores da infraestrutura central restritiva e orquestradores (como instâncias chamadoras e limitadores acopladoras orquestradas originadas na base nativa orientadora restritiva interna a nível operacional submetendo depurações na máquina contendo matrizes base a pacotes restritos na via orquestradora em código orgânico nativo local, baseando-se restritamente nos emparelhadores base pprof e lógicas assíncronas isoladoras trace) permitem rastrear em milissegundos estritos gargalos atômicos flutuantes, travamentos invisíveis originados subitamente nas ramificações dos </text:span><text:span text:style-name="T2">RWMutexes</text:span><text:span text:style-name="T1">, e localizações cirúrgicas flutuantes onde rotinas leves de corrotinas foram enclausuradas sem repasses em furos passíveis ou fugas (os denominados limitadores restritos e vazamentos perigosos de </text:span><text:span text:style-name="T2">goroutine leaks</text:span><text:span text:style-name="T1"> que derrubam gradualmente processos orquestradores limitando instâncias base)</text:span><text:span text:style-name="T7">1</text:span><text:span text:style-name="T1">.</text:span></text:p>
      <text:p text:style-name="P1"><text:span text:style-name="T1">A revolução de maturidade de infraestrutura e otimização dinâmica mais contundente e implacável introduzida recentemente nas diretrizes dos compiladores e rotinas estritas das especificações nas frotas centrais de execução orgânica global das ferramentas foi a adoção da engenharia das instâncias da </text:span><text:span text:style-name="T4">Otimização Guiada por Perfil (Profile-Guided Optimization - PGO)</text:span><text:span text:style-name="T7">1</text:span><text:span text:style-name="T1">. Iniciada progressivamente no código nas implementações provisórias limitadas restritivas experimentais em versões </text:span><text:span text:style-name="T2">Preview</text:span><text:span text:style-name="T1"> base nativa originada no Go 1.20 e atingindo implementação maciça plena incondicional global padronizada e estável oficialmente a partir das ramificações transacionais nativas de lançamento orgânico e de disponibilidade incondicional a partir de matrizes do ecossistema nativo restritivo em agosto no Go 1.21 GA, a estrutura introduziu lógicas de aprimoramentos orgânicos nas metodologias orgânicas base na execução</text:span><text:span text:style-name="T7">67</text:span><text:span text:style-name="T1">.</text:span></text:p>
      <text:p text:style-name="P1"><text:span text:style-name="T1">Na arquitetura estática da geração antecedente restritiva original clássica, os compiladores convencionais tomavam as premissas em heurísticas hipotéticas predefinidas cegamente baseadas no código limpo e teorias isoladoras nas sintaxes base, ignorando lógicas do comportamento térmico mutável e de atuações na vida real com execuções do sistema operacional orgânico flutuante e do código global injetando suposições estáticas. Com a dinâmica base associada organicamente da estrutura orientada ao modelo </text:span><text:span text:style-name="T2">PGO</text:span><text:span text:style-name="T1">, as frotas e aplicações são ativadas em cenários operantes flutuantes vivos servindo ambientes ativamente de tráfego denso nas redes interconectadas sob métricas produtivas de ambientes transacionais restritivos originários em infraestrutura de operação; ferramentas rastreadoras (como coletores interligados nas instâncias base submetidas via instâncias rastreáveis em fluxos assíncronos baseadas internamente nativamente nas integrações limitadoras purificadas como Grafana Pyroscope ou utilitários orgânicos primários com depuradores nativos no terminal interno com sub-pacotes contendo ferramentas de instâncias base purificadas de extrações dinâmicas chamadas e rastreadoras nas chamadas com extensões como arquivos operacionais .pprof) exfiltram continuamente mapas interligados em dados estritos de estatísticas base referidas organicamente contendo vetores de amostras diretos de comportamento global referindo estritos processos de desempenho contínuos na máquina (os grafos originários contendo métricas nas instâncias referidos ativamente como contagens nas rotinas orgânicas em execuções transacionais com referências a estatísticas orgânicas ativas e submetendo o roteamento com mapeamento de fluxos via processamento central com </text:span><text:span text:style-name="T2">WeightedCallGraphs</text:span><text:span text:style-name="T1"> ou grafos pesados das assinaturas nas chamadas originadas do SO)</text:span><text:span text:style-name="T7">1</text:span><text:span text:style-name="T1">. Os vetores e metadados operacionais dinâmicos reais da amostragem subjacente temporal são despejados sob um diretório empacotado estático padrão do ambiente matriz em arquivos mestre com restrições e nomes de controle fixos padronizados nas linguagens e diretórios originais orgânicos em código central contendo identificadores estritos nas rotinas em pastas na malha do servidor batizado tipicamente contendo padronizações originárias contíguas no controle no arquivo padronizado como submissão de arquivo base default.pgo</text:span><text:span text:style-name="T7">67</text:span><text:span text:style-name="T1">. As reconstruções nos pacotes subjacentes ao compilador em fluxos transacionais retroalimentam e reinjetam na base a matriz dos rastros do uso e otimizam profundamente as rotinas</text:span><text:span text:style-name="T7">67</text:span><text:span text:style-name="T1">.</text:span></text:p>
      <text:p text:style-name="P2"/>
      <table:table table:name="Table6" table:style-name="Table6">
        <table:table-column table:style-name="Table6.A"/>
        <table:table-column table:style-name="Table6.B"/>
        <table:table-row table:style-name="Table6.1">
          <table:table-cell table:style-name="Table6.A1" office:value-type="string">
            <text:p text:style-name="P3"><text:span text:style-name="T4">Mecânica de Otimização no Compilador PGO</text:span></text:p>
          </table:table-cell>
          <table:table-cell table:style-name="Table6.A1" office:value-type="string">
            <text:p text:style-name="P3"><text:span text:style-name="T4">Implementação Dinâmica Baseada em Dados Físicos (Telemetria)</text:span></text:p>
          </table:table-cell>
        </table:table-row>
        <table:table-row table:style-name="Table6.1">
          <table:table-cell table:style-name="Table6.A1" office:value-type="string">
            <text:p text:style-name="P3"><text:span text:style-name="T4">Devirtualização Especulativa Restrita de Interfaces (</text:span><text:span text:style-name="T3">Interface Devirtualization</text:span><text:span text:style-name="T4">)</text:span></text:p>
          </table:table-cell>
          <table:table-cell table:style-name="Table6.A1" office:value-type="string">
            <text:p text:style-name="P1"><text:span text:style-name="T1">Se os metadados amostrais extraídos apontarem com prova irrefutável orgânica estatística de predominância estrita global no tempo nas transações de que uma chamada de instância dinâmica interligada a tabelas flutuantes e vetores de despacho dinâmico indiretos (itab) é concretamente invocada 99% das instâncias de execuções com a exata tipagem ou </text:span><text:span text:style-name="T2">struct</text:span><text:span text:style-name="T1"> concreta padronizada nas rotinas, o compilador elimina a tabela dinâmica local estendida de desvios indiretos na nuvem substituindo na </text:span><text:span text:style-name="T2">thread</text:span><text:span text:style-name="T1"> com conversões na malha do assembly em saltos de chamadas absolutas diretas ao método estático exato, destraindo predições bloqueantes base na matriz limitadora dinâmica</text:span><text:span text:style-name="T7">67</text:span><text:span text:style-name="T1">.</text:span></text:p>
          </table:table-cell>
        </table:table-row>
        <table:table-row table:style-name="Table6.1">
          <table:table-cell table:style-name="Table6.A1" office:value-type="string">
            <text:p text:style-name="P3"><text:span text:style-name="T4">Expansões de Contextos Inline de Carga Restrita (</text:span><text:span text:style-name="T3">Hot Path Inlining</text:span><text:span text:style-name="T4">)</text:span></text:p>
          </table:table-cell>
          <table:table-cell table:style-name="Table6.A1" office:value-type="string">
            <text:p text:style-name="P1"><text:span text:style-name="T1">Identifica sub-processos interligados estritos operacionais de altíssimas demandas ou </text:span><text:span text:style-name="T2">hot methods</text:span><text:span text:style-name="T1">, transpondo barreiras nas instâncias engessadas expandindo as invocações isoladas encapsuladas na base originada transacional com incorporações substitutivas do escopo local contíguo baseadas na fusão cirúrgica restritiva do corpo das referências substitutivas em base nas funções e transações nas interligações da instância originária ou chamadora e aniquilando os sobrecustos orgânicos nas camadas de salto e </text:span><text:span text:style-name="T2">overheads</text:span><text:span text:style-name="T1"> empilhadas temporais submetidas às contagens nativas da CPU</text:span><text:span text:style-name="T7">67</text:span><text:span text:style-name="T1">.</text:span></text:p>
          </table:table-cell>
        </table:table-row>
        <table:table-row table:style-name="Table6.1">
          <table:table-cell table:style-name="Table6.A1" office:value-type="string">
            <text:p text:style-name="P3"><text:span text:style-name="T4">Otimizações Topológicas e de Blocos (</text:span><text:span text:style-name="T3">Layout Reordering &amp; iTLB Miss Reduction</text:span><text:span text:style-name="T4">)</text:span></text:p>
          </table:table-cell>
          <table:table-cell table:style-name="Table6.A1" office:value-type="string">
            <text:p text:style-name="P1"><text:span text:style-name="T1">Rearranja blocos condicionados estritos no assembly e fluxos nos dados basais flutuantes submetidos priorizando ramificações em transações contíguas favoráveis ou vias quentes e empurrando blocos ociosos não-executados ou sub-caminhos base em falhas (as rotinas de caminhos resfriados ou blocos contíguos de códigos frios baseados em execuções de caminhos falhos limitantes orgânicos originados com as chaves transacionais do ecossistema de fluxos e ramificações assíncronas do caminho base cold paths) minimizando pressões em registradores restritos e anulando </text:span><text:span text:style-name="T2">misses</text:span><text:span text:style-name="T1"> no limite de tabela da </text:span><text:span text:style-name="T2">Instruction Translation Lookaside Buffer</text:span><text:span text:style-name="T1"> (iTLB) da CPU da máquina hospedeira reduzida brutalmente nos desempenhos locais de picos globais da nuvem da ordem e ganhos operacionais limpos marginais massivos absolutos diretos interligados entre 2% a 12% do poder geral do </text:span><text:span text:style-name="T2">Hardware</text:span><text:span text:style-name="T1"> do servidor</text:span><text:span text:style-name="T7">67</text:span><text:span text:style-name="T1">.</text:span></text:p>
          </table:table-cell>
        </table:table-row>
      </table:table>
      <text:p text:style-name="P1"><text:span text:style-name="T1">Para além da performance atrelada ao limite máximo operante contíguo nativo do sistema global contido internamente na telemetria limpa em bases orquestradas dos domínios em rotinas na Cloud nativa executável contida isoladamente nos fluxos contíguos no processador nativo executivo da arquitetura, a invulnerabilidade restrita paralela operacional originou e blindou componentes estendendo a inserção orgânica direta de instâncias testadoras ativas originadas em ecossistemas interligados por injeções profundas nas bases limitantes originárias nos processos de segurança limitados estendidos originados com incorporações plenas atreladas ativas baseadas internamente nativamente nas infraestruturas orquestrais estendidas contendo utilidades base no motor restrito com a introdução do sistema nativo contínuo de matriz base chamada de orquestradores em </text:span><text:span text:style-name="T4">Fuzzing Integrado Nativo</text:span><text:span text:style-name="T1">. O </text:span><text:span text:style-name="T2">fuzz testing</text:span><text:span text:style-name="T1">, acoplado na nuvem matriz organicamente desde ramificações orquestrais limitadoras introduzidas pela engenharia primária orgânica lançadas na evolução orgânica basilar limitante oriunda historicamente e interligada do ecossistema a partir e oriunda estruturalmente internamente das diretrizes operadas originalmente em ramificações no código na versão histórica base </text:span><text:span text:style-name="T2">Go 1.18</text:span><text:span text:style-name="T1"> no empacotamento mestre da linguagem, bombardeia a árvore sintática abstrata nativa da máquina estritamente contígua a parseres expostos a injetores dinâmicos externos não-confiáveis nas instâncias via comandos aleatorizados profundos da execução, inviabilizando brechas imperceptíveis lógicas do limite sistêmico em </text:span><text:span text:style-name="T2">exploits</text:span><text:span text:style-name="T1"> obscuros de interrupção subjacente do binário central estendido garantindo que a base referencial operativa de motores cruciais limitados do kernel orgânico operante das instâncias hospedeiras (como o isolamento purificado interativo nas execuções contidas e roteadas subjacentes orquestradoras operando limitadores nos motores restritivos de subestações de rotinas em base contíguas em ecossistemas do projeto </text:span><text:span text:style-name="T2">Docker</text:span><text:span text:style-name="T1">) prevaleça incontestavelmente isolada e inatacável antes de subir instâncias globais na nuvem de escala em tempo real</text:span><text:span text:style-name="T7">1</text:span><text:span text:style-name="T1">.</text:span></text:p>
      <text:p text:style-name="P14"><text:span text:style-name="T1">7. Isolamento Incondicional e Autossuficiência Orgânica via Binários Estáticos Livres</text:span></text:p>
      <text:p text:style-name="P1"><text:span text:style-name="T1">Historicamente, orquestrar atualizações em centenas de instâncias estendidas nativas em servidores em infraestruturas isoladoras de máquinas físicas dependia de matrizes com instaladores limitadores sistêmicos em ferramentas globais contendo inter-rotinas vulneráveis a fraturas na base central hospedeira da nuvem (o colapso estrutural denominado </text:span><text:span text:style-name="T2">Dependency Hell</text:span><text:span text:style-name="T1">), em que bibliotecas estáticas ou dependências de versões nativas dinâmicas compartilhadas restritas nos núcleos limitadores operacionais divergentes originavam conflitos inter-componentes subjacentes destruindo lógicas do ciclo contínuo em versões assíncronas do Linux local de máquinas e servidores paralelos na malha orquestradora global subjacente e no SO e fragmentando estabilidades operantes (impactos colaterais nas matrizes dinâmicas de linguagens contendo ecossistemas referidos interligando chamadas referenciando amarrações como libc e dependentes estendidos)</text:span><text:span text:style-name="T7">1</text:span><text:span text:style-name="T1">.</text:span></text:p>
      <text:p text:style-name="P1"><text:span text:style-name="T1">A linguagem baseada na arquitetura empacotadora nativa transacional oriunda nos compiladores em bases orquestradoras em Go anula integralmente essa degradação sistêmica na matriz de controle no hospedeiro. O compilador mestre recluso na operação contígua embala as corrotinas, o </text:span><text:span text:style-name="T2">scheduler</text:span><text:span text:style-name="T1"> estendido nativamente subjacente em base orgânica no motor transacional da rotina e as matrizes purificadas limitadoras no roteador orgânico atrelado limitador nas frotas estendidas das bibliotecas acopladoras de lógicas limitadoras nativas, junto a integralidade do Coletor de Lixo operante dinâmico em base atômica orgânica numa encapsulação de bloco purificado transacional gerando instâncias base restritivas com um </text:span><text:span text:style-name="T4">Único Binário Estaticamente Linkado</text:span><text:span text:style-name="T1"> na matriz</text:span><text:span text:style-name="T7">1</text:span><text:span text:style-name="T1">.</text:span></text:p>
      <text:p text:style-name="P1"><text:soft-page-break/><text:span text:style-name="T1">Esta visão pragmática viabiliza a orquestração imune limitante dos servidores originária nos fluxos orquestradores em bases dos módulos nas </text:span><text:span text:style-name="T2">engines</text:span><text:span text:style-name="T1"> assíncronas do Terraform e ecossistemas isolados base de execução na nuvem originárias orgânicas nos limitadores conteinerizadores no módulo </text:span><text:span text:style-name="T2">Docker</text:span><text:span text:style-name="T1">; as ferramentas ignoram sumariamente qual ecossistema hospedará a malha temporal subjacente e mitigam paralelos orquestradores dinâmicos executando processos operantes nas nuvens do SO com purificação do comportamento e do determinismo nativo isolado nas frotas orgânicas da rotina</text:span><text:span text:style-name="T7">1</text:span><text:span text:style-name="T1">. Esse empacotamento hermético estendido não é meramente prático; é a pedra de toque basilar subjacente da orquestração restrita contígua de distribuição no conceito global unificado orgânico limitador do movimento de abstrações em bases na rotina da contemporaneidade em instâncias operacionais estritas contíguas originárias padronizadas e chamadas de Cloud-Native Computing Foundation (CNCF).</text:span></text:p>
      <text:p text:style-name="P14"><text:span text:style-name="T1">8. Exemplo Cirúrgico </text:span><text:span text:style-name="T5">Tier-1</text:span><text:span text:style-name="T1"> do Ecossistema em Base Híbrida: Desempenho Isolado e Pressão Dinâmica Orgânica na Matriz do Prometheus TSDB</text:span></text:p>
      <text:p text:style-name="P1"><text:span text:style-name="T1">Para visualizar a orquestração orquestrada de todos esses subsistemas de performance do kernel e do isolador M:P:G aplicados juntos, a arquitetura da base temporal contígua nativa operada do banco de rastros contíguos originários submetendo registros métricos e dados na máquina no ecossistema rastreável orientador na base rastreável central de rotina denominado </text:span><text:span text:style-name="T4">Prometheus</text:span><text:span text:style-name="T1"> serve como a instância em base acadêmica indiscutível máxima na rotina</text:span><text:span text:style-name="T7">12</text:span><text:span text:style-name="T1">. Milhões de métricas únicas na rotina com chaves rastreáveis submetidas a subgrupos purificados orgânicos interligados originários nas métricas restritivas contíguas e associadas organicamente via matrizes em marcadores rastreáveis atrelados nas execuções globais nas instâncias locais ou eixos denominados restritivos de marcadores restritos em bases estáticas de vetores e referências limitadas orgânicas em frotas dinâmicas chamadas rotuladoras atreladas baseadas limitadas em metadados puros originários nas frotas chamados </text:span><text:span text:style-name="T2">labels</text:span><text:span text:style-name="T1"> explodem em escala combinatória na memória em milissegundos nas instâncias subjacentes e sobrecarregam I/O em rotinas interativas em memória volátil contígua da nuvem</text:span><text:span text:style-name="T7">72</text:span><text:span text:style-name="T1">.</text:span></text:p>
      <text:p text:style-name="P1"><text:span text:style-name="T1">O Banco de Dados em Séries Temporais (</text:span><text:span text:style-name="T2">TSDB</text:span><text:span text:style-name="T1">) interno implementado inteiramente usando instâncias puras interativas orquestradas orgânicas do Go manipula matrizes numéricas dinâmicas usando implementações algorítmicas de vetores restritivos compactos</text:span><text:span text:style-name="T7">72</text:span><text:span text:style-name="T1">. Emprega, ao longo da codificação estruturada estrita, codificadores orgânicos subjacentes limitadores nativos no sistema operante de instâncias empacotadas estritas nativas como a compressão dinâmica assíncrona orgânica originada nas instâncias e algoritmos matriciais limitantes originados e restritos baseados e chamados de compressão em </text:span><text:span text:style-name="T2">GORILLA</text:span><text:span text:style-name="T1"> para dados contíguos estritos de pontos decimais em bases de ponto flutuante limitantes nativas restritas na matriz global operante de valores de registros, paralelamente aplicando codificadores sequenciais estritos com bases transacionais referidos nativamente nas rotinas de cálculos métricos nas instâncias e cronômetros com implementações restritas chamadas originárias e restritivas contíguas na malha denominadas </text:span><text:span text:style-name="T2">Delta-Delta</text:span><text:span text:style-name="T1"> para preencher limites operantes nativos na matriz da fita com saltos purificados das inter-rotinas operacionais métricas atreladas as instâncias nas ordens temporais originadas estritas a cronômetros base purificados chamados vetores estritos de carimbos operantes </text:span><text:span text:style-name="T2">timestamps</text:span><text:span text:style-name="T7">75</text:span><text:span text:style-name="T1">.</text:span></text:p>
      <text:p text:style-name="P1"><text:span text:style-name="T1">A pressão crítica e de risco termodinâmico contíguo na arquitetura base das referências na nuvem ocorria historicamente nos vazamentos dinâmicos de amostragens geradas contidas e referenciadas orgânicas nas rotinas diárias e limitadas atreladas aos limites na parte base atrelada ativa orgânica superior temporal de retenção ativa contínua das frotas da matriz (historicamente conhecida como bloco cabeça orgânico limitador originário contíguo ou registro matriz no limite operacional dinâmico da base volátil orgânica chamado estritamente do limitador base </text:span><text:span text:style-name="T2">head block</text:span><text:span text:style-name="T1">), a qual armazenava instâncias de duas a três horas no escopo base antes do ciclo natural final expirar no GC</text:span><text:span text:style-name="T7">73</text:span><text:span text:style-name="T1">. Para aliviar esse estrangulamento exaustivo limitante na fita base nas execuções das corrotinas flutuantes do GC, os arquitetos, baseando-se estritamente e introduzindo rotinas ativas organicamente em instâncias purificadas submetendo interações dinâmicas da rotina submetida orgânica base nas modificações nativas profundas do motor e do kernel e de inovações nativas injetoras orquestrais da matriz flutuante a partir do escopo temporal originário e referencial estático no salto da base evolutiva e implementações estritas originárias nas liberações a partir originárias de sub-blocos referidos no pacote nativo e do referenciamento originário </text:span><text:span text:style-name="T2">Prometheus v2.19.0</text:span><text:span text:style-name="T1">, alteraram o modelo empilhador local nas referências estendidas das transações injetoras do </text:span><text:span text:style-name="T2">heap</text:span><text:span text:style-name="T1"> dinâmico purificado contido localmente</text:span><text:span text:style-name="T7">79</text:span><text:span text:style-name="T1">.</text:span></text:p>
      <text:p text:style-name="P1"><text:span text:style-name="T1">Em vez das alocações e registros em pedaços temporários no </text:span><text:span text:style-name="T2">heap</text:span><text:span text:style-name="T1">, o compilador isola matrizes de sub-arquivos referidos nativos como "fragmentos estritos" atrelados nativos em base (chamados localmente de roteamento orgânico estrito como pacotes fracionários </text:span><text:span text:style-name="T2">chunks</text:span><text:span text:style-name="T1">, que comportam no teto de instâncias rígidas o limitador restritivo limitante em exatas 120 contagens isoladoras de marcações ou referências nas bases como amostragem estendida </text:span><text:span text:style-name="T2">samples</text:span><text:span text:style-name="T1">) e aciona rotinas delegadas em limites do SO despachando dados atrelados baseados contíguos utilizando chamadas diretas de APIs estendidas estritamente referidas nas paginações ativas orgânicas com o espelhamento atômico transacional purificado estrito do escopo orquestral hospedeiro denominado organicamente das interfaces com o mapeamento nativo originado na função mmap da máquina para mapear na RAM de frotas e blocos no disco atrelado no sistema do </text:span><text:span text:style-name="T2">Kernel</text:span><text:span text:style-name="T7">75</text:span><text:span text:style-name="T1">. Essa redução de pressões de </text:span><text:span text:style-name="T2">heap</text:span><text:span text:style-name="T1"> na instância local atômica via manipulação limitadora cirúrgica purificada resultou organicamente nativamente numa submissão otimizadora decrescente orgânica global originada a reduções isoladoras das matrizes de RAM das ordens orquestrais na ordem de percentuais drásticos interligados atingindo quedas limpas restritas contíguas limitantes em base operante global do teto da marca massiva e originária da base referida a até cerca e na margem drástica atrelada no teto flutuante dinâmico limpo marginal a de ganhos reais de até cerca atingidos picos atrelados nas quedas restritivas orquestrais submetidas em reduções globais e margens reais atingindo até margens referidas ativas em números limpos de até 40% do uso global referenciado na base orquestradora total de memória isolada dinâmica nos processos puros operantes da matriz subjacente, viabilizando estabilidades irretocáveis na observabilidade da nuvem limitadora do cluster na matriz das execuções em tráfegos estendidos</text:span><text:span text:style-name="T7">79</text:span><text:span text:style-name="T1">.</text:span></text:p>
      <text:p text:style-name="P14"><text:span text:style-name="T1">Conclusão</text:span></text:p>
      <text:p text:style-name="P1"><text:span text:style-name="T1">A linguagem de programação Go transcende os paradigmas teóricos genéricos tradicionais e dogmas de sintaxe orientados puramente por verbosidades engessadas em ecossistemas obsoletos, fundamentando a sobrevivência operante na estabilidade isolada sistêmica. Ela abraça a complexidade orgânica e incondicional do silício e do Hardware através dos paradigmas restritos e atrelados limitantes puros focados nativamente sob o alinhamento matricial e isolamentos de frotas dinâmicas originárias no uso restrito purificado de diretrizes limitantes aplicadas em rotinas purificadas como a limitante interligada focada baseada restrita nos escopos originais atrelados e batizados nos comportamentos restritos na </text:span><text:span text:style-name="T4">Simbiose Mecânica</text:span><text:span text:style-name="T1"> (garantindo alinhamentos clínicos estendidos na prevenção de instâncias colapsantes com limites sub-orgânicos em falhas no </text:span><text:span text:style-name="T2">false sharing</text:span><text:span text:style-name="T1"> em cachês) e gerindo restrições nativas operantes em fluxos dinâmicos por rotinas nativas sob o radar com as exclusões purificadas oriundas restritas submetidas no controle das execuções puras e de bases originárias submetidas organicamente a </text:span><text:span text:style-name="T4">Análise de Escape</text:span><text:span text:style-name="T1"> (protegendo o núcleo do </text:span><text:span text:style-name="T2">Garbage Collector</text:span><text:span text:style-name="T1"> pela submissão direta do código nativo do compilador às rotinas contínuas puras operantes nos caminhos focados e quentes via </text:span><text:span text:style-name="T2">Zero-Allocation</text:span><text:span text:style-name="T1">)</text:span><text:span text:style-name="T7">1</text:span><text:span text:style-name="T1">.</text:span></text:p>
      <text:p text:style-name="P1"><text:span text:style-name="T1">As instâncias em Cloud-Native orquestradas nas malhas como </text:span><text:span text:style-name="T2">Docker</text:span><text:span text:style-name="T1">, </text:span><text:span text:style-name="T2">Terraform</text:span><text:span text:style-name="T1"> ou o orquestrador subjacente limitante nativo global das frotas orquestradoras em clusters do ecossistema matriz da nuvem chamado nativo de </text:span><text:span text:style-name="T2">Kubernetes</text:span><text:span text:style-name="T1"> prosperam indiscutivelmente no controle orquestrador assíncrono M:N gerido no controle contíguo estrito do motor e nas execuções purificadas da infraestrutura paralela com limites submetidos de preempções geradas e submetidas nos bloqueios através da lógica contígua de sinais assíncronos originárias na monitoração por frotas restritas interligadas submetidas na verificação orquestradora originária com vigilâncias do daemon atrelado chamado limitador puro sysmon</text:span><text:span text:style-name="T7">33</text:span><text:span text:style-name="T1">. Subordinando as proteções contra fomes destrutivas no código isolado das matrizes de sincronismos limitadores operantes em instâncias de blocos limitados submetidos na rotina das travas atômicas contínuas em </text:span><text:span text:style-name="T2">locks</text:span><text:span text:style-name="T1"> baseados nas equações atômicas de limites reversos nas inversões do </text:span><text:span text:style-name="T2">rwmutexMaxReaders</text:span><text:span text:style-name="T1"> atrelado em bloqueios dinâmicos subjacentes puros contidos na arquitetura submissa purificada base do limitador orquestrador sync.RWMutex</text:span><text:span text:style-name="T7">52</text:span><text:span text:style-name="T1">, e alavancando de forma orgânica dinâmicas puras na retroalimentação e nas métricas de produção reais interligadas através das submissões geradas e otimizadoras estritas do ecossistema operando e retroalimentando lógicas subjacentes no motor estendido orquestrado na função via perfil no limitador da matriz rastreável atrelada contida local orgânica </text:span><text:span text:style-name="T4">Profile-Guided Optimization (PGO)</text:span><text:span text:style-name="T7">67</text:span><text:span text:style-name="T1">.</text:span></text:p>
      <text:p text:style-name="P10"><text:span text:style-name="T1">Essas alicerces isoladores, dotados puramente de objetividade militar operante nos fluxos com purificação clínica nativa nos motores, garantem inequivocamente e de modo soberano incontestável por que instâncias na infraestrutura global e arquitetos estendidos de rotinas orquestradores em bases e arquiteturas de base de rotinas isoladoras mantêm incontestável lealdade ao ecossistema subjacente base de Go como o substrato matriz e pilar fundamental isolador subjacente e garantidor inquebrável atrelado contíguo originário nas instâncias fundamentais contemporâneas nativas orquestrando e construindo os blocos originários estritos das matrizes operacionais na internet interligada global do nosso milênio de forma estendida restrita originária da </text:span><text:span text:style-name="T2">CNCF</text:span><text:span text:style-name="T1">.</text:span></text:p>
      <text:p text:style-name="P12"><text:span text:style-name="T8">Referências citadas</text:span></text:p>
      <text:list xml:id="list1201449808" text:style-name="WWNum5">
        <text:list-item>
          <text:p text:style-name="P9"><text:span text:style-name="T9">discordcore, uploaded:discordcore</text:span></text:p>
        </text:list-item>
        <text:list-item>
          <text:p text:style-name="P9"><text:span text:style-name="T9">Kubernetes - Wikipedia, </text:span><text:a xlink:type="simple" xlink:href="https://en.wikipedia.org/wiki/Kubernetes" text:style-name="ListLabel_20_46" text:visited-style-name="ListLabel_20_46"><text:span text:style-name="T10">https://en.wikipedia.org/wiki/Kubernetes</text:span></text:a></text:p>
        </text:list-item>
        <text:list-item>
          <text:p text:style-name="P9"><text:span text:style-name="T9">Docker (software) - Wikipedia, </text:span><text:a xlink:type="simple" xlink:href="https://en.wikipedia.org/wiki/Docker_(software)" text:style-name="ListLabel_20_46" text:visited-style-name="ListLabel_20_46"><text:span text:style-name="T10">https://en.wikipedia.org/wiki/Docker_(software)</text:span></text:a></text:p>
        </text:list-item>
        <text:list-item>
          <text:p text:style-name="P9"><text:span text:style-name="T9">Terraform: Up and Running: Writing Infrastructure as Code [3 ed.] 1098116747, 9781098116743 - DOKUMEN.PUB, </text:span><text:a xlink:type="simple" xlink:href="https://dokumen.pub/terraform-up-and-running-writing-infrastructure-as-code-3nbsped-1098116747-9781098116743.html" text:style-name="ListLabel_20_46" text:visited-style-name="ListLabel_20_46"><text:span text:style-name="T10">https://dokumen.pub/terraform-up-and-running-writing-infrastructure-as-code-3nbsped-1098116747-9781098116743.html</text:span></text:a></text:p>
        </text:list-item>
        <text:list-item>
          <text:p text:style-name="P9"><text:span text:style-name="T9">Kubernetes was originally written in Java and rewritten in Go after some Go ad... | Hacker News, </text:span><text:a xlink:type="simple" xlink:href="https://news.ycombinator.com/item?id=32677711" text:style-name="ListLabel_20_46" text:visited-style-name="ListLabel_20_46"><text:span text:style-name="T10">https://news.ycombinator.com/item?id=32677711</text:span></text:a></text:p>
        </text:list-item>
        <text:list-item>
          <text:p text:style-name="P9"><text:span text:style-name="T9">Docker: what is it and how do I use it? | DataScientest.com - Liora, </text:span><text:a xlink:type="simple" xlink:href="https://liora.io/en/docker-definition-and-tutorial" text:style-name="ListLabel_20_46" text:visited-style-name="ListLabel_20_46"><text:span text:style-name="T10">https://liora.io/en/docker-definition-and-tutorial</text:span></text:a></text:p>
        </text:list-item>
        <text:list-item>
          <text:p text:style-name="P9"><text:span text:style-name="T9">Day 02: What is Docker, Really? History, Architecture, and How Containers Actually Work, </text:span><text:a xlink:type="simple" xlink:href="https://muhammadkashifsecurityengineer.medium.com/day-02-what-is-docker-really-history-architecture-and-how-containers-actually-work-c01495e087ef" text:style-name="ListLabel_20_46" text:visited-style-name="ListLabel_20_46"><text:span text:style-name="T10">https://muhammadkashifsecurityengineer.medium.com/day-02-what-is-docker-really-history-architecture-and-how-containers-actually-work-c01495e087ef</text:span></text:a></text:p>
        </text:list-item>
        <text:list-item>
          <text:p text:style-name="P9"><text:span text:style-name="T9">The Kubelist Podcast | Ep. #36, The Docker Story with Solomon Hykes | Heavybit, </text:span><text:a xlink:type="simple" xlink:href="https://www.heavybit.com/library/podcasts/the-kubelist-podcast/ep-36-the-docker-story-with-solomon-hykes" text:style-name="ListLabel_20_46" text:visited-style-name="ListLabel_20_46"><text:span text:style-name="T10">https://www.heavybit.com/library/podcasts/the-kubelist-podcast/ep-36-the-docker-story-with-solomon-hykes</text:span></text:a></text:p>
        </text:list-item>
        <text:list-item>
          <text:p text:style-name="P9"><text:span text:style-name="T9">10 Years of Kubernetes, </text:span><text:a xlink:type="simple" xlink:href="https://kubernetes.io/blog/2024/06/06/10-years-of-kubernetes/" text:style-name="ListLabel_20_46" text:visited-style-name="ListLabel_20_46"><text:span text:style-name="T10">https://kubernetes.io/blog/2024/06/06/10-years-of-kubernetes/</text:span></text:a></text:p>
        </text:list-item>
        <text:list-item>
          <text:p text:style-name="P9"><text:span text:style-name="T9">Did you know that Kubernetes was originally written in Java? - Reddit, </text:span><text:a xlink:type="simple" xlink:href="https://www.reddit.com/r/kubernetes/comments/aizidy/did_you_know_that_kubernetes_was_originally/" text:style-name="ListLabel_20_46" text:visited-style-name="ListLabel_20_46"><text:span text:style-name="T10">https://www.reddit.com/r/kubernetes/comments/aizidy/did_you_know_that_kubernetes_was_originally/</text:span></text:a></text:p>
        </text:list-item>
        <text:list-item>
          <text:p text:style-name="P9"><text:soft-page-break/><text:span text:style-name="T9">Draft Registration Statement No. 2 - SEC.gov, </text:span><text:a xlink:type="simple" xlink:href="https://www.sec.gov/Archives/edgar/data/1720671/000095012321012452/filename1.htm" text:style-name="ListLabel_20_46" text:visited-style-name="ListLabel_20_46"><text:span text:style-name="T10">https://www.sec.gov/Archives/edgar/data/1720671/000095012321012452/filename1.htm</text:span></text:a></text:p>
        </text:list-item>
        <text:list-item>
          <text:p text:style-name="P9"><text:span text:style-name="T9">docs/docs/introduction/faq.md at main · prometheus/docs - GitHub, </text:span><text:a xlink:type="simple" xlink:href="https://github.com/prometheus/docs/blob/main/docs/introduction/faq.md" text:style-name="ListLabel_20_46" text:visited-style-name="ListLabel_20_46"><text:span text:style-name="T10">https://github.com/prometheus/docs/blob/main/docs/introduction/faq.md</text:span></text:a></text:p>
        </text:list-item>
        <text:list-item>
          <text:p text:style-name="P9"><text:span text:style-name="T9">The history of Prometheus at SoundCloud | PDF - Slideshare, </text:span><text:a xlink:type="simple" xlink:href="https://www.slideshare.net/slideshow/the-history-of-prometheus-at-soundcloud/65464158" text:style-name="ListLabel_20_46" text:visited-style-name="ListLabel_20_46"><text:span text:style-name="T10">https://www.slideshare.net/slideshow/the-history-of-prometheus-at-soundcloud/65464158</text:span></text:a></text:p>
        </text:list-item>
        <text:list-item>
          <text:p text:style-name="P9"><text:span text:style-name="T9">Community - Prometheus, </text:span><text:a xlink:type="simple" xlink:href="https://prometheus.io/community/" text:style-name="ListLabel_20_46" text:visited-style-name="ListLabel_20_46"><text:span text:style-name="T10">https://prometheus.io/community/</text:span></text:a></text:p>
        </text:list-item>
        <text:list-item>
          <text:p text:style-name="P9"><text:span text:style-name="T9">False Sharing - Mechanical Sympathy, </text:span><text:a xlink:type="simple" xlink:href="https://mechanical-sympathy.blogspot.com/2011/07/false-sharing.html" text:style-name="ListLabel_20_46" text:visited-style-name="ListLabel_20_46"><text:span text:style-name="T10">https://mechanical-sympathy.blogspot.com/2011/07/false-sharing.html</text:span></text:a></text:p>
        </text:list-item>
        <text:list-item>
          <text:p text:style-name="P9"><text:span text:style-name="T9">Writing Go Code with Mechanical Sympathy: Optimizing for Hardware Efficiency - Kite Metric, </text:span><text:a xlink:type="simple" xlink:href="https://kitemetric.com/blogs/writing-go-code-with-mechanical-sympathy-optimizing-for-hardware-efficiency" text:style-name="ListLabel_20_46" text:visited-style-name="ListLabel_20_46"><text:span text:style-name="T10">https://kitemetric.com/blogs/writing-go-code-with-mechanical-sympathy-optimizing-for-hardware-efficiency</text:span></text:a></text:p>
        </text:list-item>
        <text:list-item>
          <text:p text:style-name="P9"><text:span text:style-name="T9">Mechanical Sympathy in Go - Teiva Harsanyi, </text:span><text:a xlink:type="simple" xlink:href="https://teivah.dev/res/gophercon-turkey-2020-mechanical-sympathy-flat.pdf" text:style-name="ListLabel_20_46" text:visited-style-name="ListLabel_20_46"><text:span text:style-name="T10">https://teivah.dev/res/gophercon-turkey-2020-mechanical-sympathy-flat.pdf</text:span></text:a></text:p>
        </text:list-item>
        <text:list-item>
          <text:p text:style-name="P9"><text:span text:style-name="T9">Breaking the 64-Byte Barrier: How I Eliminated False Sharing via Sub-Struct Partitioning in C, </text:span><text:a xlink:type="simple" xlink:href="https://medium.com/@emodexohimai/breaking-the-64-byte-barrier-how-i-eliminated-false-sharing-via-sub-struct-partitioning-in-c-73f331d7403d" text:style-name="ListLabel_20_46" text:visited-style-name="ListLabel_20_46"><text:span text:style-name="T10">https://medium.com/@emodexohimai/breaking-the-64-byte-barrier-how-i-eliminated-false-sharing-via-sub-struct-partitioning-in-c-73f331d7403d</text:span></text:a></text:p>
        </text:list-item>
        <text:list-item>
          <text:p text:style-name="P9"><text:span text:style-name="T9">CPU cache-friendly data structures in Go | Hacker News, </text:span><text:a xlink:type="simple" xlink:href="https://news.ycombinator.com/item?id=45488201" text:style-name="ListLabel_20_46" text:visited-style-name="ListLabel_20_46"><text:span text:style-name="T10">https://news.ycombinator.com/item?id=45488201</text:span></text:a></text:p>
        </text:list-item>
        <text:list-item>
          <text:p text:style-name="P9"><text:span text:style-name="T9">Optimising datastructure/word alignment padding in golang - Stack Overflow, </text:span><text:a xlink:type="simple" xlink:href="https://stackoverflow.com/questions/39063530/optimising-datastructure-word-alignment-padding-in-golang" text:style-name="ListLabel_20_46" text:visited-style-name="ListLabel_20_46"><text:span text:style-name="T10">https://stackoverflow.com/questions/39063530/optimising-datastructure-word-alignment-padding-in-golang</text:span></text:a></text:p>
        </text:list-item>
        <text:list-item>
          <text:p text:style-name="P9"><text:span text:style-name="T9">cmd/compile: relax wasm/wasm32 function import signature type constraints · Issue #66984 · golang/go - GitHub, </text:span><text:a xlink:type="simple" xlink:href="https://github.com/golang/go/issues/66984" text:style-name="ListLabel_20_46" text:visited-style-name="ListLabel_20_46"><text:span text:style-name="T10">https://github.com/golang/go/issues/66984</text:span></text:a></text:p>
        </text:list-item>
        <text:list-item>
          <text:p text:style-name="P9"><text:span text:style-name="T9">structs: add HostLayout "directive" type · Issue #66408 · golang/go - GitHub, </text:span><text:a xlink:type="simple" xlink:href="https://github.com/golang/go/issues/66408" text:style-name="ListLabel_20_46" text:visited-style-name="ListLabel_20_46"><text:span text:style-name="T10">https://github.com/golang/go/issues/66408</text:span></text:a></text:p>
        </text:list-item>
        <text:list-item>
          <text:p text:style-name="P9"><text:span text:style-name="T9">proposal: x/tools/ffi: Native Go FFI Binding Generation · Issue #77386 · golang/go - GitHub, </text:span><text:a xlink:type="simple" xlink:href="https://github.com/golang/go/issues/77386" text:style-name="ListLabel_20_46" text:visited-style-name="ListLabel_20_46"><text:span text:style-name="T10">https://github.com/golang/go/issues/77386</text:span></text:a></text:p>
        </text:list-item>
        <text:list-item>
          <text:p text:style-name="P9"><text:span text:style-name="T9">proposal: allow eliding "_" fields in unkeyed struct literals · Issue #71458 · golang/go, </text:span><text:a xlink:type="simple" xlink:href="https://github.com/golang/go/issues/71458" text:style-name="ListLabel_20_46" text:visited-style-name="ListLabel_20_46"><text:span text:style-name="T10">https://github.com/golang/go/issues/71458</text:span></text:a></text:p>
        </text:list-item>
        <text:list-item>
          <text:p text:style-name="P9"><text:span text:style-name="T9">Understanding Escape Analysis in Go – Explained with Example Code - freeCodeCamp, </text:span><text:a xlink:type="simple" xlink:href="https://www.freecodecamp.org/news/understanding-escape-analysis-in-go/" text:style-name="ListLabel_20_46" text:visited-style-name="ListLabel_20_46"><text:span text:style-name="T10">https://www.freecodecamp.org/news/understanding-escape-analysis-in-go/</text:span></text:a></text:p>
        </text:list-item>
        <text:list-item>
          <text:p text:style-name="P9"><text:span text:style-name="T9">Escape analysis - Grokipedia, </text:span><text:a xlink:type="simple" xlink:href="https://grokipedia.com/page/Escape_analysis" text:style-name="ListLabel_20_46" text:visited-style-name="ListLabel_20_46"><text:span text:style-name="T10">https://grokipedia.com/page/Escape_analysis</text:span></text:a></text:p>
        </text:list-item>
        <text:list-item>
          <text:p text:style-name="P9"><text:span text:style-name="T9">Stack Allocations and Escape Analysis - Go Optimization Guide, </text:span><text:a xlink:type="simple" xlink:href="https://goperf.dev/01-common-patterns/stack-alloc/" text:style-name="ListLabel_20_46" text:visited-style-name="ListLabel_20_46"><text:span text:style-name="T10">https://goperf.dev/01-common-patterns/stack-alloc/</text:span></text:a></text:p>
        </text:list-item>
        <text:list-item>
          <text:p text:style-name="P9"><text:span text:style-name="T9">Why Your Go Code Is Slower Than It Should Be: A Deep Dive Into Heap Allocations, </text:span><text:a xlink:type="simple" xlink:href="https://cristiancurteanu.com/why-your-go-code-is-slower-than-it-should-be-a-deep-dive-into-heap-allocations/" text:style-name="ListLabel_20_46" text:visited-style-name="ListLabel_20_46"><text:span text:style-name="T10">https://cristiancurteanu.com/why-your-go-code-is-slower-than-it-should-be-a-deep-dive-into-heap-allocations/</text:span></text:a></text:p>
        </text:list-item>
        <text:list-item>
          <text:p text:style-name="P9"><text:span text:style-name="T9">Escape Analysis in Go: Stack vs Heap Allocation Explained - DEV Community, </text:span><text:a xlink:type="simple" xlink:href="https://dev.to/abstractmusa/escape-analysis-in-go-stack-vs-heap-allocation-explained-506a" text:style-name="ListLabel_20_46" text:visited-style-name="ListLabel_20_46"><text:span text:style-name="T10">https://dev.to/abstractmusa/escape-analysis-in-go-stack-vs-heap-allocation-explained-506a</text:span></text:a></text:p>
        </text:list-item>
        <text:list-item>
          <text:p text:style-name="P9"><text:span text:style-name="T9">Zero-Allocation in Go (Golang) - DEV Community, </text:span><text:a xlink:type="simple" xlink:href="https://dev.to/saleh_rahimzadeh/zero-allocation-in-go-golang-237k" text:style-name="ListLabel_20_46" text:visited-style-name="ListLabel_20_46"><text:span text:style-name="T10">https://dev.to/saleh_rahimzadeh/zero-allocation-in-go-golang-237k</text:span></text:a></text:p>
        </text:list-item>
        <text:list-item>
          <text:p text:style-name="P9"><text:span text:style-name="T9">Zero alloc libraries : r/golang - Reddit, </text:span><text:a xlink:type="simple" xlink:href="https://www.reddit.com/r/golang/comments/1pmq3ph/zero_alloc_libraries/" text:style-name="ListLabel_20_46" text:visited-style-name="ListLabel_20_46"><text:span text:style-name="T10">https://www.reddit.com/r/golang/comments/1pmq3ph/zero_alloc_libraries/</text:span></text:a></text:p>
        </text:list-item>
        <text:list-item>
          <text:p text:style-name="P9"><text:soft-page-break/><text:span text:style-name="T9">Zero Allocation in Go. Writing High-Performance Code Without… | by Sandeep | Medium, </text:span><text:a xlink:type="simple" xlink:href="https://medium.com/@ksandeeptech07/zero-allocation-in-go-ce29e6a9ffdc" text:style-name="ListLabel_20_46" text:visited-style-name="ListLabel_20_46"><text:span text:style-name="T10">https://medium.com/@ksandeeptech07/zero-allocation-in-go-ce29e6a9ffdc</text:span></text:a></text:p>
        </text:list-item>
        <text:list-item>
          <text:p text:style-name="P9"><text:span text:style-name="T9">Goroutines and Scheduler | Concurrency Interview - AlgoMaster.io, </text:span><text:a xlink:type="simple" xlink:href="https://algomaster.io/learn/concurrency-interview/go-goroutines-and-scheduler" text:style-name="ListLabel_20_46" text:visited-style-name="ListLabel_20_46"><text:span text:style-name="T10">https://algomaster.io/learn/concurrency-interview/go-goroutines-and-scheduler</text:span></text:a></text:p>
        </text:list-item>
        <text:list-item>
          <text:p text:style-name="P9"><text:span text:style-name="T9">Understanding Go's Scheduler: How Goroutine Management Works | by Felipe Ascari, </text:span><text:a xlink:type="simple" xlink:href="https://medium.com/@felipe.ascari_49171/understanding-gos-scheduler-how-goroutine-management-works-65131986ee2c" text:style-name="ListLabel_20_46" text:visited-style-name="ListLabel_20_46"><text:span text:style-name="T10">https://medium.com/@felipe.ascari_49171/understanding-gos-scheduler-how-goroutine-management-works-65131986ee2c</text:span></text:a></text:p>
        </text:list-item>
        <text:list-item>
          <text:p text:style-name="P9"><text:span text:style-name="T9">Go Concurrency Model: Goroutines and the GMP Scheduler | projectlighthouse, </text:span><text:a xlink:type="simple" xlink:href="https://projectlighthouse.io/en/books/go-intermediate/pages/concurrency-model" text:style-name="ListLabel_20_46" text:visited-style-name="ListLabel_20_46"><text:span text:style-name="T10">https://projectlighthouse.io/en/books/go-intermediate/pages/concurrency-model</text:span></text:a></text:p>
        </text:list-item>
        <text:list-item>
          <text:p text:style-name="P9"><text:span text:style-name="T9">The Engine Under the Hood: Go's GMP, Java's Locks, and Erlang's Heaps, </text:span><text:a xlink:type="simple" xlink:href="https://dev.to/ayush-k-anand/the-engine-under-the-hood-gos-gmp-javas-locks-and-erlangs-heaps-1lhi" text:style-name="ListLabel_20_46" text:visited-style-name="ListLabel_20_46"><text:span text:style-name="T10">https://dev.to/ayush-k-anand/the-engine-under-the-hood-gos-gmp-javas-locks-and-erlangs-heaps-1lhi</text:span></text:a></text:p>
        </text:list-item>
        <text:list-item>
          <text:p text:style-name="P9"><text:span text:style-name="T9">Understanding the Go Runtime: The Scheduler - Software - TMPDIR, </text:span><text:a xlink:type="simple" xlink:href="https://community.tmpdir.org/t/understanding-the-go-runtime-the-scheduler/1678" text:style-name="ListLabel_20_46" text:visited-style-name="ListLabel_20_46"><text:span text:style-name="T10">https://community.tmpdir.org/t/understanding-the-go-runtime-the-scheduler/1678</text:span></text:a></text:p>
        </text:list-item>
        <text:list-item>
          <text:p text:style-name="P9"><text:span text:style-name="T9">Goroutine Scheduling: GMP Model, Schedule Loop, Preemption &amp; Stack Management, </text:span><text:a xlink:type="simple" xlink:href="https://dev.to/jamesli/goroutine-scheduling-gmp-model-schedule-loop-preemption-stack-management-395p" text:style-name="ListLabel_20_46" text:visited-style-name="ListLabel_20_46"><text:span text:style-name="T10">https://dev.to/jamesli/goroutine-scheduling-gmp-model-schedule-loop-preemption-stack-management-395p</text:span></text:a></text:p>
        </text:list-item>
        <text:list-item>
          <text:p text:style-name="P9"><text:span text:style-name="T9">The Go Scheduler Explained: Deep Dive into the G-M-P Concurrency Model - Medium, </text:span><text:a xlink:type="simple" xlink:href="https://medium.com/@priyankaguha.2012/the-go-scheduler-explained-deep-dive-into-the-g-m-p-concurrency-model-dfaf40a7508c" text:style-name="ListLabel_20_46" text:visited-style-name="ListLabel_20_46"><text:span text:style-name="T10">https://medium.com/@priyankaguha.2012/the-go-scheduler-explained-deep-dive-into-the-g-m-p-concurrency-model-dfaf40a7508c</text:span></text:a></text:p>
        </text:list-item>
        <text:list-item>
          <text:p text:style-name="P9"><text:span text:style-name="T9">How Go (Golang) Works — A Deep Dive into Runtime Internals - Murat Demirci, </text:span><text:a xlink:type="simple" xlink:href="https://muratdemirci.com.tr/en/go-runtime-internals/" text:style-name="ListLabel_20_46" text:visited-style-name="ListLabel_20_46"><text:span text:style-name="T10">https://muratdemirci.com.tr/en/go-runtime-internals/</text:span></text:a></text:p>
        </text:list-item>
        <text:list-item>
          <text:p text:style-name="P9"><text:span text:style-name="T9">Go Scheduler - Melatoni, </text:span><text:a xlink:type="simple" xlink:href="https://nghiant3223.github.io/2025/04/15/go-scheduler.html" text:style-name="ListLabel_20_46" text:visited-style-name="ListLabel_20_46"><text:span text:style-name="T10">https://nghiant3223.github.io/2025/04/15/go-scheduler.html</text:span></text:a></text:p>
        </text:list-item>
        <text:list-item>
          <text:p text:style-name="P9"><text:span text:style-name="T9">software/golang/work-stealing.md at main - GitHub, </text:span><text:a xlink:type="simple" xlink:href="https://github.com/BlendedFeelings/software/blob/main/golang/work-stealing.md" text:style-name="ListLabel_20_46" text:visited-style-name="ListLabel_20_46"><text:span text:style-name="T10">https://github.com/BlendedFeelings/software/blob/main/golang/work-stealing.md</text:span></text:a></text:p>
        </text:list-item>
        <text:list-item>
          <text:p text:style-name="P9"><text:span text:style-name="T9">All Go: Concurrency - Andy Pearce, </text:span><text:a xlink:type="simple" xlink:href="https://www.andy-pearce.com/blog/posts/2023/Jun/all-go-concurrency/" text:style-name="ListLabel_20_46" text:visited-style-name="ListLabel_20_46"><text:span text:style-name="T10">https://www.andy-pearce.com/blog/posts/2023/Jun/all-go-concurrency/</text:span></text:a></text:p>
        </text:list-item>
        <text:list-item>
          <text:p text:style-name="P9"><text:span text:style-name="T9">Goroutine Preemption in Go - Medium, </text:span><text:a xlink:type="simple" xlink:href="https://medium.com/@AlexanderObregon/goroutine-preemption-in-go-0343e94e0e81" text:style-name="ListLabel_20_46" text:visited-style-name="ListLabel_20_46"><text:span text:style-name="T10">https://medium.com/@AlexanderObregon/goroutine-preemption-in-go-0343e94e0e81</text:span></text:a></text:p>
        </text:list-item>
        <text:list-item>
          <text:p text:style-name="P9"><text:span text:style-name="T9">How does Go preempt goroutines in windows? - Stack Overflow, </text:span><text:a xlink:type="simple" xlink:href="https://stackoverflow.com/questions/75044949/how-does-go-preempt-goroutines-in-windows" text:style-name="ListLabel_20_46" text:visited-style-name="ListLabel_20_46"><text:span text:style-name="T10">https://stackoverflow.com/questions/75044949/how-does-go-preempt-goroutines-in-windows</text:span></text:a></text:p>
        </text:list-item>
        <text:list-item>
          <text:p text:style-name="P9"><text:span text:style-name="T9">- The Go Programming Language, </text:span><text:a xlink:type="simple" xlink:href="https://tip.golang.org/src/runtime/os_windows.go" text:style-name="ListLabel_20_46" text:visited-style-name="ListLabel_20_46"><text:span text:style-name="T10">https://tip.golang.org/src/runtime/os_windows.go</text:span></text:a></text:p>
        </text:list-item>
        <text:list-item>
          <text:p text:style-name="P9"><text:span text:style-name="T9">os_windows.go - - The Go Programming Language, </text:span><text:a xlink:type="simple" xlink:href="https://go.dev/src/runtime/os_windows.go" text:style-name="ListLabel_20_46" text:visited-style-name="ListLabel_20_46"><text:span text:style-name="T10">https://go.dev/src/runtime/os_windows.go</text:span></text:a></text:p>
        </text:list-item>
        <text:list-item>
          <text:p text:style-name="P9"><text:span text:style-name="T9">runtime: Go 1.14/Windows asynchronous preemption mechanism likely incompatible with debugging · Issue #36494 · golang/go - GitHub, </text:span><text:a xlink:type="simple" xlink:href="https://github.com/golang/go/issues/36494" text:style-name="ListLabel_20_46" text:visited-style-name="ListLabel_20_46"><text:span text:style-name="T10">https://github.com/golang/go/issues/36494</text:span></text:a></text:p>
        </text:list-item>
        <text:list-item>
          <text:p text:style-name="P9"><text:span text:style-name="T9">Package: runtime, </text:span><text:a xlink:type="simple" xlink:href="https://go-jira-cli.canilho.net/pkg/runtime.html" text:style-name="ListLabel_20_46" text:visited-style-name="ListLabel_20_46"><text:span text:style-name="T10">https://go-jira-cli.canilho.net/pkg/runtime.html</text:span></text:a></text:p>
        </text:list-item>
        <text:list-item>
          <text:p text:style-name="P9"><text:span text:style-name="T9">Locks in Go - Mutex, RWMutex, and When to Use What - The Geeky Way, </text:span><text:a xlink:type="simple" xlink:href="https://www.thegeekyway.com/locks-in-golang/" text:style-name="ListLabel_20_46" text:visited-style-name="ListLabel_20_46"><text:span text:style-name="T10">https://www.thegeekyway.com/locks-in-golang/</text:span></text:a></text:p>
        </text:list-item>
        <text:list-item>
          <text:p text:style-name="P9"><text:span text:style-name="T9">Concurrency in Go: Synchronization Tools | by Dmitry Aleksandrov | Medium, </text:span><text:a xlink:type="simple" xlink:href="https://medium.com/@ogneslav.work/concurrency-in-go-synchronization-tools-8de05c5fb4a0" text:style-name="ListLabel_20_46" text:visited-style-name="ListLabel_20_46"><text:span text:style-name="T10">https://medium.com/@ogneslav.work/concurrency-in-go-synchronization-tools-8de05c5fb4a0</text:span></text:a></text:p>
        </text:list-item>
        <text:list-item>
          <text:p text:style-name="P9"><text:span text:style-name="T9">sync: RWMutex Readers can starve writers for many seconds · Issue #76808 · golang/go, </text:span><text:a xlink:type="simple" xlink:href="https://github.com/golang/go/issues/76808" text:style-name="ListLabel_20_46" text:visited-style-name="ListLabel_20_46"><text:span text:style-name="T10">https://github.com/golang/go/issues/76808</text:span></text:a></text:p>
        </text:list-item>
        <text:list-item>
          <text:p text:style-name="P9"><text:soft-page-break/><text:span text:style-name="T9">Golang: Implement our own RWMutex | by Ahmed Hasnat Safder - Medium, </text:span><text:a xlink:type="simple" xlink:href="https://medium.com/@hasnatinter10/golang-implement-our-own-rwmutex-0eac04243cbd" text:style-name="ListLabel_20_46" text:visited-style-name="ListLabel_20_46"><text:span text:style-name="T10">https://medium.com/@hasnatinter10/golang-implement-our-own-rwmutex-0eac04243cbd</text:span></text:a></text:p>
        </text:list-item>
        <text:list-item>
          <text:p text:style-name="P9"><text:span text:style-name="T9">The implementions of RWMutex.Lock() in golang - Stack Overflow, </text:span><text:a xlink:type="simple" xlink:href="https://stackoverflow.com/questions/46786900/the-implementions-of-rwmutex-lock-in-golang" text:style-name="ListLabel_20_46" text:visited-style-name="ListLabel_20_46"><text:span text:style-name="T10">https://stackoverflow.com/questions/46786900/the-implementions-of-rwmutex-lock-in-golang</text:span></text:a></text:p>
        </text:list-item>
        <text:list-item>
          <text:p text:style-name="P9"><text:span text:style-name="T9">symc.RWMutex docs include a perplexing note - Technical Discussion - Go Forum, </text:span><text:a xlink:type="simple" xlink:href="https://forum.golangbridge.org/t/symc-rwmutex-docs-include-a-perplexing-note/5009" text:style-name="ListLabel_20_46" text:visited-style-name="ListLabel_20_46"><text:span text:style-name="T10">https://forum.golangbridge.org/t/symc-rwmutex-docs-include-a-perplexing-note/5009</text:span></text:a></text:p>
        </text:list-item>
        <text:list-item>
          <text:p text:style-name="P9"><text:span text:style-name="T9">Concurrency Synchronization Techniques in Go's sync Package - DEV Community, </text:span><text:a xlink:type="simple" xlink:href="https://dev.to/leapcell/concurrency-synchronization-techniques-in-gos-sync-package-4od6" text:style-name="ListLabel_20_46" text:visited-style-name="ListLabel_20_46"><text:span text:style-name="T10">https://dev.to/leapcell/concurrency-synchronization-techniques-in-gos-sync-package-4od6</text:span></text:a></text:p>
        </text:list-item>
        <text:list-item>
          <text:p text:style-name="P9"><text:span text:style-name="T9">rwmutex.go - - The Go Programming Language, </text:span><text:a xlink:type="simple" xlink:href="https://go.dev/src/sync/rwmutex.go" text:style-name="ListLabel_20_46" text:visited-style-name="ListLabel_20_46"><text:span text:style-name="T10">https://go.dev/src/sync/rwmutex.go</text:span></text:a></text:p>
        </text:list-item>
        <text:list-item>
          <text:p text:style-name="P9"><text:span text:style-name="T9">Go Lock Performance: RwMutex vs Mutex in Various Scenarios - DEV Community, </text:span><text:a xlink:type="simple" xlink:href="https://dev.to/leapcell/go-lock-performance-rwmutex-vs-mutex-in-various-scenarios-57p7" text:style-name="ListLabel_20_46" text:visited-style-name="ListLabel_20_46"><text:span text:style-name="T10">https://dev.to/leapcell/go-lock-performance-rwmutex-vs-mutex-in-various-scenarios-57p7</text:span></text:a></text:p>
        </text:list-item>
        <text:list-item>
          <text:p text:style-name="P9"><text:span text:style-name="T9">go/src/sync/rwmutex.go at master · golang/go - GitHub, </text:span><text:a xlink:type="simple" xlink:href="https://github.com/golang/go/blob/master/src/sync/rwmutex.go" text:style-name="ListLabel_20_46" text:visited-style-name="ListLabel_20_46"><text:span text:style-name="T10">https://github.com/golang/go/blob/master/src/sync/rwmutex.go</text:span></text:a></text:p>
        </text:list-item>
        <text:list-item>
          <text:p text:style-name="P9"><text:span text:style-name="T9">Upgradable Read Write Lock for Go | Upstash Blog, </text:span><text:a xlink:type="simple" xlink:href="https://upstash.com/blog/upgradable-rwlock-for-go" text:style-name="ListLabel_20_46" text:visited-style-name="ListLabel_20_46"><text:span text:style-name="T10">https://upstash.com/blog/upgradable-rwlock-for-go</text:span></text:a></text:p>
        </text:list-item>
        <text:list-item>
          <text:p text:style-name="P9"><text:span text:style-name="T9">rwmutex.go - - The Go Programming Language, </text:span><text:a xlink:type="simple" xlink:href="https://go.dev/src/runtime/rwmutex.go" text:style-name="ListLabel_20_46" text:visited-style-name="ListLabel_20_46"><text:span text:style-name="T10">https://go.dev/src/runtime/rwmutex.go</text:span></text:a></text:p>
        </text:list-item>
        <text:list-item>
          <text:p text:style-name="P9"><text:span text:style-name="T9">kubernetes/client-go - GitHub, </text:span><text:a xlink:type="simple" xlink:href="https://github.com/kubernetes/client-go" text:style-name="ListLabel_20_46" text:visited-style-name="ListLabel_20_46"><text:span text:style-name="T10">https://github.com/kubernetes/client-go</text:span></text:a></text:p>
        </text:list-item>
        <text:list-item>
          <text:p text:style-name="P9"><text:span text:style-name="T9">client-go Patterns: Informers, Work Queues, and Rate Limiting - Shan Valleru's Blog, </text:span><text:a xlink:type="simple" xlink:href="https://svalle.ru/posts/kubernetes/client-go-patterns/" text:style-name="ListLabel_20_46" text:visited-style-name="ListLabel_20_46"><text:span text:style-name="T10">https://svalle.ru/posts/kubernetes/client-go-patterns/</text:span></text:a></text:p>
        </text:list-item>
        <text:list-item>
          <text:p text:style-name="P9"><text:span text:style-name="T9">A Deep Dive Into Kubernetes Client-Go Informers | by Md Shamim | Level Up Coding, </text:span><text:a xlink:type="simple" xlink:href="https://levelup.gitconnected.com/a-deep-dive-into-kubernetes-client-go-informers-012bb5362a38" text:style-name="ListLabel_20_46" text:visited-style-name="ListLabel_20_46"><text:span text:style-name="T10">https://levelup.gitconnected.com/a-deep-dive-into-kubernetes-client-go-informers-012bb5362a38</text:span></text:a></text:p>
        </text:list-item>
        <text:list-item>
          <text:p text:style-name="P9"><text:span text:style-name="T9">DeltaFifo Queues: The Unsung Backbone of Kubernetes Controllers | by Gopi Chinnappa, </text:span><text:a xlink:type="simple" xlink:href="https://gopihc.medium.com/deltafifo-queues-the-unsung-backbone-of-kubernetes-controllers-c0426fba3082" text:style-name="ListLabel_20_46" text:visited-style-name="ListLabel_20_46"><text:span text:style-name="T10">https://gopihc.medium.com/deltafifo-queues-the-unsung-backbone-of-kubernetes-controllers-c0426fba3082</text:span></text:a></text:p>
        </text:list-item>
        <text:list-item>
          <text:p text:style-name="P9"><text:span text:style-name="T9">How to Use client-go Work Queues for Rate-Limited Event Processing - OneUptime, </text:span><text:a xlink:type="simple" xlink:href="https://oneuptime.com/blog/post/2026-02-09-client-go-work-queues-rate-limited/view" text:style-name="ListLabel_20_46" text:visited-style-name="ListLabel_20_46"><text:span text:style-name="T10">https://oneuptime.com/blog/post/2026-02-09-client-go-work-queues-rate-limited/view</text:span></text:a></text:p>
        </text:list-item>
        <text:list-item>
          <text:p text:style-name="P9"><text:span text:style-name="T9">Automating Efficiency of Go programs with Profile-Guided Optimizations - Uber, </text:span><text:a xlink:type="simple" xlink:href="https://www.uber.com/us/en/blog/automating-efficiency-of-go-programs-with-pgo/" text:style-name="ListLabel_20_46" text:visited-style-name="ListLabel_20_46"><text:span text:style-name="T10">https://www.uber.com/us/en/blog/automating-efficiency-of-go-programs-with-pgo/</text:span></text:a></text:p>
        </text:list-item>
        <text:list-item>
          <text:p text:style-name="P9"><text:span text:style-name="T9">Profile-guided optimization in Go 1.21 - The Go Programming Language, </text:span><text:a xlink:type="simple" xlink:href="https://go.dev/blog/pgo" text:style-name="ListLabel_20_46" text:visited-style-name="ListLabel_20_46"><text:span text:style-name="T10">https://go.dev/blog/pgo</text:span></text:a></text:p>
        </text:list-item>
        <text:list-item>
          <text:p text:style-name="P9"><text:span text:style-name="T9">How to use PGO and Grafana Pyroscope to optimize Go applications, </text:span><text:a xlink:type="simple" xlink:href="https://grafana.com/blog/how-to-use-pgo-and-grafana-pyroscope-to-optimize-go-applications/" text:style-name="ListLabel_20_46" text:visited-style-name="ListLabel_20_46"><text:span text:style-name="T10">https://grafana.com/blog/how-to-use-pgo-and-grafana-pyroscope-to-optimize-go-applications/</text:span></text:a></text:p>
        </text:list-item>
        <text:list-item>
          <text:p text:style-name="P9"><text:span text:style-name="T9">PGO in Go: current state and challenges - FOSDEM 2026, </text:span><text:a xlink:type="simple" xlink:href="https://fosdem.org/2026/events/attachments/L7XZ78-profile-guided_optimization_pgo_in_go_current_state_and_challenges/slides/267492/fosdem_20_ywqatop.pdf" text:style-name="ListLabel_20_46" text:visited-style-name="ListLabel_20_46"><text:span text:style-name="T10">https://fosdem.org/2026/events/attachments/L7XZ78-profile-guided_optimization_pgo_in_go_current_state_and_challenges/slides/267492/fosdem_20_ywqatop.pdf</text:span></text:a></text:p>
        </text:list-item>
        <text:list-item>
          <text:p text:style-name="P9"><text:span text:style-name="T9">C++ Series 06 | PGO (Profile-Guided Optimization) | Medium - Yu-Cheng (Morton) Kuo, </text:span><text:a xlink:type="simple" xlink:href="https://yc-kuo.medium.com/c-series-06-pgo-profile-guided-optimization-8a978bd6881f" text:style-name="ListLabel_20_46" text:visited-style-name="ListLabel_20_46"><text:span text:style-name="T10">https://yc-kuo.medium.com/c-series-06-pgo-profile-guided-optimization-8a978bd6881f</text:span></text:a></text:p>
        </text:list-item>
        <text:list-item>
          <text:p text:style-name="P9"><text:span text:style-name="T9">Prometheus TSDB Explained: How It Works, Scales &amp; Optimizes - Groundcover, </text:span><text:a xlink:type="simple" xlink:href="https://www.groundcover.com/learn/observability/prometheus-tsdb" text:style-name="ListLabel_20_46" text:visited-style-name="ListLabel_20_46"><text:span text:style-name="T10">https://www.groundcover.com/learn/observability/prometheus-tsdb</text:span></text:a></text:p>
        </text:list-item>
        <text:list-item>
          <text:p text:style-name="P9"><text:span text:style-name="T9">Prometheus 2 Times Series Storage Performance Analyses - Percona, </text:span><text:a xlink:type="simple" xlink:href="https://www.percona.com/blog/prometheus-2-times-series-storage-performance-analyses/" text:style-name="ListLabel_20_46" text:visited-style-name="ListLabel_20_46"><text:span text:style-name="T10">https://www.percona.com/blog/prometheus-2-times-series-storage-performance-analyses/</text:span></text:a></text:p>
        </text:list-item>
        <text:list-item>
          <text:p text:style-name="P9"><text:soft-page-break/><text:span text:style-name="T9">Heracles: An Efficient Storage Model and Data Flushing for Performance Monitoring Timeseries - VLDB Endowment, </text:span><text:a xlink:type="simple" xlink:href="http://vldb.org/pvldb/vol14/p1080-wang.pdf" text:style-name="ListLabel_20_46" text:visited-style-name="ListLabel_20_46"><text:span text:style-name="T10">http://vldb.org/pvldb/vol14/p1080-wang.pdf</text:span></text:a></text:p>
        </text:list-item>
        <text:list-item>
          <text:p text:style-name="P9"><text:span text:style-name="T9">Understanding and optimizing resource consumption in Prometheus | Tech blog - Palark, </text:span><text:a xlink:type="simple" xlink:href="https://palark.com/blog/prometheus-resource-consumption-optimization/" text:style-name="ListLabel_20_46" text:visited-style-name="ListLabel_20_46"><text:span text:style-name="T10">https://palark.com/blog/prometheus-resource-consumption-optimization/</text:span></text:a></text:p>
        </text:list-item>
        <text:list-item>
          <text:p text:style-name="P9"><text:span text:style-name="T9">Overview | Prometheus - Tecnisys Docs, </text:span><text:a xlink:type="simple" xlink:href="https://docs.tecnisys.com.br/pgsys-ecosystem/pt-PT/pdf/prometheus/2.54/prometheus-2.54.pdf" text:style-name="ListLabel_20_46" text:visited-style-name="ListLabel_20_46"><text:span text:style-name="T10">https://docs.tecnisys.com.br/pgsys-ecosystem/pt-PT/pdf/prometheus/2.54/prometheus-2.54.pdf</text:span></text:a></text:p>
        </text:list-item>
        <text:list-item>
          <text:p text:style-name="P9"><text:span text:style-name="T9">Prometheus Deep Dive Study Guide - AWS, </text:span><text:a xlink:type="simple" xlink:href="https://acloudguru-content-attachment-production.s3-accelerate.amazonaws.com/1610061830440-Prometheus%20Deep%20Dive%20Study%20Guide_1594394855.pdf" text:style-name="ListLabel_20_46" text:visited-style-name="ListLabel_20_46"><text:span text:style-name="T10">https://acloudguru-content-attachment-production.s3-accelerate.amazonaws.com/1610061830440-Prometheus%20Deep%20Dive%20Study%20Guide_1594394855.pdf</text:span></text:a></text:p>
        </text:list-item>
        <text:list-item>
          <text:p text:style-name="P9"><text:span text:style-name="T9">How Cloudflare runs Prometheus at scale, </text:span><text:a xlink:type="simple" xlink:href="https://blog.cloudflare.com/how-cloudflare-runs-prometheus-at-scale/" text:style-name="ListLabel_20_46" text:visited-style-name="ListLabel_20_46"><text:span text:style-name="T10">https://blog.cloudflare.com/how-cloudflare-runs-prometheus-at-scale/</text:span></text:a></text:p>
        </text:list-item>
        <text:list-item>
          <text:p text:style-name="P9"><text:span text:style-name="T9">New in Prometheus v2.19.0: Memory-mapping of full chunks of the head block reduces memory usage by as much as 40% | Grafana Labs, </text:span><text:a xlink:type="simple" xlink:href="https://grafana.com/blog/new-in-prometheus-v2-19-0-memory-mapping-of-full-chunks-of-the-head-block-reduces-memory-usage-by-as-much-as-40/" text:style-name="ListLabel_20_46" text:visited-style-name="ListLabel_20_46"><text:span text:style-name="T10">https://grafana.com/blog/new-in-prometheus-v2-19-0-memory-mapping-of-full-chunks-of-the-head-block-reduces-memory-usage-by-as-much-as-40/</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font-style-complex="normal" style:font-weight-complex="bold"/>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font-style-complex="normal" style:font-weight-complex="bold"/>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font-style-complex="normal" style:font-weight-complex="bold"/>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font-style-complex="normal" style:font-weight-complex="bold"/>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font-style-complex="normal" style:font-weight-complex="bold"/>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font-style-complex="normal"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6" style:display-name="ListLabel 46" style:family="text">
      <style:text-properties fo:color="#0000ee" style:font-name="Arial" fo:font-family="Arial" style:font-family-generic="roman" style:font-pitch="variable" fo:font-size="12pt" style:text-underline-style="solid" style:text-underline-width="auto" style:text-underline-color="font-color"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4098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4098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3" meta:object-count="0" meta:page-count="10" meta:paragraph-count="238" meta:word-count="10665" meta:character-count="82752" meta:non-whitespace-character-count="72408"/>
    <meta:generator>LibreOfficeDev/6.0.5.2$Linux_X86_64 LibreOffice_project/</meta:generator>
  </office:meta>
</office:document-meta>
</file>