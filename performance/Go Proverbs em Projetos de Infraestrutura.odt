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fo:color="#444746" style:text-position="super 58%" style:font-name="Arial" fo:font-size="12pt" style:font-name-asian="Arial2" style:font-size-asian="12pt" style:font-name-complex="Arial2" style:font-size-complex="12pt"/>
    </style:style>
    <style:style style:name="P3" style:family="paragraph" style:parent-style-name="Standard">
      <style:paragraph-properties fo:line-height="114%" fo:padding="0in" fo:border="none"/>
      <style:text-properties fo:color="#1f1f1f" style:font-name="Arial" style:font-name-asian="Arial2" style:font-name-complex="Arial2"/>
    </style:style>
    <style:style style:name="P4" style:family="paragraph" style:parent-style-name="Standard">
      <style:paragraph-properties fo:margin-top="0.0835in" fo:margin-bottom="0.0835in" loext:contextual-spacing="false" fo:line-height="114%" fo:padding="0in" fo:border="none"/>
    </style:style>
    <style:style style:name="P5" style:family="paragraph" style:parent-style-name="Standard" style:list-style-name="WWNum1">
      <style:paragraph-properties fo:margin-left="0.4098in" fo:margin-right="0in" fo:line-height="114%" fo:text-indent="-0.25in" style:auto-text-indent="false" fo:padding="0in" fo:border="none"/>
    </style:style>
    <style:style style:name="P6" style:family="paragraph" style:parent-style-name="Standard" style:list-style-name="WWNum3">
      <style:paragraph-properties fo:margin-left="0.4098in" fo:margin-right="0in" fo:line-height="114%" fo:text-indent="-0.25in" style:auto-text-indent="false" fo:padding="0in" fo:border="none"/>
    </style:style>
    <style:style style:name="P7" style:family="paragraph" style:parent-style-name="Standard" style:list-style-name="WWNum2">
      <style:paragraph-properties fo:margin-left="0.4165in" fo:margin-right="0in" fo:line-height="114%" fo:text-indent="-0.25in" style:auto-text-indent="false" fo:padding="0in" fo:border="none"/>
    </style:style>
    <style:style style:name="P8" style:family="paragraph" style:parent-style-name="Standard" style:list-style-name="WWNum4">
      <style:paragraph-properties fo:margin-left="0.4165in" fo:margin-right="0in" fo:text-indent="-0.25in" style:auto-text-indent="false" fo:padding="0in" fo:border="none"/>
    </style:style>
    <style:style style:name="P9" style:family="paragraph" style:parent-style-name="Standard">
      <style:paragraph-properties fo:margin-top="0in" fo:margin-bottom="0.1772in" loext:contextual-spacing="false" fo:line-height="114%" fo:padding="0in" fo:border="none"/>
    </style:style>
    <style:style style:name="P10" style:family="paragraph" style:parent-style-name="Heading_20_1" style:master-page-name="Standard">
      <style:paragraph-properties fo:margin-top="0in" fo:margin-bottom="0in" loext:contextual-spacing="false" fo:line-height="114%" style:page-number="1" fo:padding="0in" fo:border="none"/>
    </style:style>
    <style:style style:name="P11" style:family="paragraph" style:parent-style-name="Heading_20_4">
      <style:paragraph-properties fo:margin-top="0in" fo:margin-bottom="0.1772in" loext:contextual-spacing="false" fo:line-height="114%" fo:padding="0in" fo:border="none"/>
    </style:style>
    <style:style style:name="P12" style:family="paragraph" style:parent-style-name="Heading_20_4">
      <style:paragraph-properties fo:margin-top="0in" fo:margin-bottom="0.1772in" loext:contextual-spacing="false" fo:line-height="100%" fo:padding="0in" fo:border="none"/>
    </style:style>
    <style:style style:name="P13" style:family="paragraph" style:parent-style-name="Heading_20_3">
      <style:paragraph-properties fo:margin-top="0in" fo:margin-bottom="0.1665in" loext:contextual-spacing="false" fo:line-height="114%" fo:padding="0in" fo:border="none"/>
    </style:style>
    <style:style style:name="P14" style:family="paragraph" style:parent-style-name="Heading_20_2">
      <style:paragraph-properties fo:margin-top="0in" fo:margin-bottom="0in" loext:contextual-spacing="false" fo:line-height="114%" fo:padding="0in" fo:border="none"/>
    </style:style>
    <style:style style:name="T1" style:family="text">
      <style:text-properties fo:color="#1f1f1f" style:font-name="Arial" style:font-name-asian="Arial2" style:font-name-complex="Arial2"/>
    </style:style>
    <style:style style:name="T2" style:family="text">
      <style:text-properties fo:color="#1f1f1f" style:font-name="Arial" fo:font-style="italic" style:font-name-asian="Arial2" style:font-style-asian="italic" style:font-name-complex="Arial2" style:font-style-complex="italic"/>
    </style:style>
    <style:style style:name="T3" style:family="text">
      <style:text-properties fo:color="#1f1f1f" style:font-name="Arial" fo:font-weight="bold" style:font-name-asian="Arial2" style:font-weight-asian="bold" style:font-name-complex="Arial2" style:font-weight-complex="bold"/>
    </style:style>
    <style:style style:name="T4" style:family="text">
      <style:text-properties fo:color="#1f1f1f" style:font-name="Arial" fo:font-size="14pt" fo:font-style="italic" fo:font-weight="bold" style:font-name-asian="Arial2" style:font-size-asian="14pt" style:font-style-asian="italic" style:font-weight-asian="bold" style:font-name-complex="Arial2" style:font-size-complex="14pt" style:font-style-complex="italic" style:font-weight-complex="bold"/>
    </style:style>
    <style:style style:name="T5" style:family="text">
      <style:text-properties fo:color="#444746" style:text-position="super 58%" style:font-name="Arial" fo:font-size="12pt" style:font-name-asian="Arial2" style:font-size-asian="12pt" style:font-name-complex="Arial2" style:font-size-complex="12pt"/>
    </style:style>
    <style:style style:name="T6" style:family="text">
      <style:text-properties style:font-name="Arial" style:font-name-asian="Arial2" style:font-name-complex="Arial2"/>
    </style:style>
    <style:style style:name="T7" style:family="text">
      <style:text-properties style:font-name="Arial" fo:font-size="12pt" style:font-name-asian="Arial2" style:font-size-asian="12pt" style:font-name-complex="Arial2" style:font-size-complex="12pt"/>
    </style:style>
    <style:style style:name="T8" style:family="text">
      <style:text-properties fo:color="#0000ee" style:font-name="Arial" fo:font-size="12pt" style:text-underline-style="solid" style:text-underline-width="auto" style:text-underline-color="font-color" style:font-name-asian="Arial2" style:font-size-asian="12pt" style:font-name-complex="Arial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latório Exaustivo de Engenharia e Arquitetura de Sistemas: A Aplicação e Mecânica Interna dos Provérbios Go em Infraestruturas de Grande Escala</text:span></text:p>
      <text:p text:style-name="P14"><text:span text:style-name="T1">A Fundamentação Termodinâmica e Filosófica da Engenharia em Go</text:span></text:p>
      <text:p text:style-name="P1"><text:span text:style-name="T1">A linguagem de programação Go transcende a mera sintaxe utilitária para se posicionar como uma plataforma de engenharia de sistemas cuja fundação está profundamente acoplada aos limites térmicos, físicos e lógicos do hardware subjacente.</text:span><text:span text:style-name="T5">1</text:span><text:span text:style-name="T1"> A sua escolha como a linguagem central para a orquestração de infraestruturas nativas da nuvem — consubstanciada de forma mais notável nos projetos de hiperescala como o Kubernetes, Docker e Containerd — resulta de um alinhamento arquitetural rigoroso com princípios empíricos de design.</text:span><text:span text:style-name="T5">1</text:span><text:span text:style-name="T1"> Estes princípios foram exaustivamente destilados pelos criadores da linguagem, destacando-se Rob Pike, na forma de diretrizes conhecidas como "Go Proverbs" (Provérbios Go).</text:span><text:span text:style-name="T5">4</text:span></text:p>
      <text:p text:style-name="P1"><text:span text:style-name="T1">Estes provérbios não constituem meras convenções estilísticas ou preferências sintáticas de formatação; eles atuam como autênticos axiomas operacionais para o desenvolvimento de software distribuído sob condições de altíssima contenção.</text:span><text:span text:style-name="T5">1</text:span><text:span text:style-name="T1"> A falha estrutural em interpretar o pragmatismo subjacente a estas diretrizes resulta frequentemente em anomalias severas no tempo de execução, fugas de memória incapacitantes (</text:span><text:span text:style-name="T2">memory leaks</text:span><text:span text:style-name="T1">), estrangulamentos do barramento do sistema operacional e falhas de coerência de cache na Unidade Central de Processamento (CPU).</text:span><text:span text:style-name="T5">1</text:span><text:span text:style-name="T1"> A linguagem exige dos engenheiros de software uma compreensão íntima de como o código interage com o escalonador interno (scheduler), as políticas de alocação de Memória de Acesso Aleatório (RAM) e o comportamento atómico do processador.</text:span><text:span text:style-name="T5">1</text:span></text:p>
      <text:p text:style-name="P1"><text:span text:style-name="T1">Este documento disseca a arquitetura interna da linguagem Go, mapeando as suas primitivas e idiomatismos contra as exigências extremas dos ecossistemas de ponta. A análise seguirá uma progressão metódica desde as fundações da gestão de memória até aos paradigmas de concorrência massiva, demonstrando como os provérbios balizam a construção de sistemas que gerem o mundo moderno da computação em nuvem.</text:span></text:p>
      <text:p text:style-name="P14"><text:span text:style-name="T1">A Arquitetura do Valor Zero e a Eficiência na Alocação de Memória</text:span></text:p>
      <text:p text:style-name="P1"><text:span text:style-name="T1">Um dos pilares de otimização de ciclos de processamento mais críticos e frequentemente subestimados em Go é encapsulado pelo provérbio </text:span><text:span text:style-name="T2">"Make the zero value useful"</text:span><text:span text:style-name="T1"> (Torne o valor zero útil).</text:span><text:span text:style-name="T5">4</text:span><text:span text:style-name="T1"> Em linguagens orientadas a objetos tradicionais, como Java ou C++, o estado natural de um objeto não instanciado é um ponteiro nulo, e tentar invocar operações sobre este estado gera invariavelmente exceções catastróficas, resultando no encerramento abrupto do programa caso não sejam capturadas.</text:span><text:span text:style-name="T5">1</text:span></text:p>
      <text:p text:style-name="P1"><text:span text:style-name="T1">Em Go, a filosofia diverge radicalmente: o ecossistema e o </text:span><text:span text:style-name="T2">runtime</text:span><text:span text:style-name="T1"> são projetados para que o estado natural de alocação de memória recém-reservada — que é deterministicamente preenchida com zeros lógicos — seja inerentemente funcional, robusto e seguro para operação imediata.</text:span><text:span text:style-name="T5">1</text:span><text:span text:style-name="T1"> Esta característica dita a forma como os recursos são consumidos, inicializados e limpos na memória.</text:span></text:p>
      <text:p text:style-name="P13"><text:span text:style-name="T1">A Mecânica Divergente: make versus new</text:span></text:p>
      <text:p text:style-name="P1"><text:span text:style-name="T1">Para compreender o valor zero, é essencial examinar o motor de alocação de Go, onde a distinção entre as primitivas make e new ilustra esta separação arquitetural.</text:span><text:span text:style-name="T5">1</text:span><text:span text:style-name="T1"> A função iterativa new(T) atua como um alocador de memória puro. Ela não inicializa estruturas subjacentes complexas; em vez disso, apenas reserva um espaço físico na memória (seja na Pilha ou no </text:span><text:span text:style-name="T2">Heap</text:span><text:span text:style-name="T1">, dependendo da Análise de Fuga), preenche esse espaço inteiramente com zeros referentes ao tipo T, e devolve o seu endereço de memória (*T).</text:span><text:span text:style-name="T5">1</text:span></text:p>
      <text:p text:style-name="P1"><text:span text:style-name="T1">Para estruturas desenhadas em estrita conformidade com os provérbios Go, este valor zero é perfeitamente suficiente para garantir a estabilidade das fronteiras de execução.</text:span><text:span text:style-name="T5">11</text:span><text:span text:style-name="T1"> Por exemplo, um trinco lógico sync.Mutex recém-alocado (cujos bytes internos se encontram a 0) não requer qualquer construtor de inicialização explícita; o seu valor zero significa que está imediatamente destrancado e pronto a ser bloqueado por uma </text:span><text:span text:style-name="T2">goroutine</text:span><text:span text:style-name="T1"> concorrente.</text:span><text:span text:style-name="T5">1</text:span></text:p>
      <text:p text:style-name="P1"><text:span text:style-name="T1">Por oposição, a primitiva make(T, args) é termodinamicamente distinta e restrita a apenas três abstrações de dados: fatias (</text:span><text:span text:style-name="T2">slices</text:span><text:span text:style-name="T1">), mapas (</text:span><text:span text:style-name="T2">maps</text:span><text:span text:style-name="T1">) e canais (</text:span><text:span text:style-name="T2">channels</text:span><text:span text:style-name="T1">).</text:span><text:span text:style-name="T5">1</text:span><text:span text:style-name="T1"> A função make não devolve um ponteiro, mas um valor intrinsecamente inicializado. Esta exigência deriva do facto de estas estruturas não serem primitivas de hardware, mas abstrações complexas geridas pelo </text:span><text:span text:style-name="T2">runtime</text:span><text:span text:style-name="T1">. Um </text:span><text:span text:style-name="T2">slice</text:span><text:span text:style-name="T1"> em arquiteturas de 64 bits (AMD64) não é apenas um ponteiro, mas um descritor preciso de 24 bytes que encapsula três elementos atómicos: um ponteiro para o </text:span><text:span text:style-name="T2">array</text:span><text:span text:style-name="T1"> físico contíguo subjacente, um comprimento (len), e uma capacidade (cap).</text:span><text:span text:style-name="T5">1</text:span></text:p>
      <text:p text:style-name="P1"><text:span text:style-name="T1">Contudo, mesmo no contexto destas estruturas geridas, a doutrina do valor zero impera. O valor zero de uma fatia é um </text:span><text:span text:style-name="T2">slice nil</text:span><text:span text:style-name="T1">, cujo comprimento é nativamente 0. Ao contrário de outras linguagens, a sintaxe de Go permite que um engenheiro execute operações de anexação (append) diretamente sobre um </text:span><text:span text:style-name="T2">slice nil</text:span><text:span text:style-name="T1"> com total segurança e correção.</text:span><text:span text:style-name="T5">1</text:span><text:span text:style-name="T1"> O compilador encarrega-se de intercetar a chamada, alocar a memória contígua necessária no momento exato do append e reajustar o descritor. Esta abordagem suprime incontáveis ramificações condicionais de verificação (if slice == nil) nos caminhos quentes (</text:span><text:span text:style-name="T2">hot paths</text:span><text:span text:style-name="T1">) de execução, poupando ramificações preditivas e ciclos preciosos na CPU.</text:span></text:p>
      <text:p text:style-name="P13"><text:span text:style-name="T1">O Valor Zero na Maquinaria da API do Kubernetes</text:span></text:p>
      <text:p text:style-name="P1"><text:span text:style-name="T1">A utilidade empírica do valor zero é explorada à exaustão na infraestrutura de projetos colossais. No Kubernetes, que tem a responsabilidade de lidar simultaneamente com milhões de definições de recursos globais e interações assíncronas, a poupança de alocações dita a capacidade de sobrevivência do painel de controlo (</text:span><text:span text:style-name="T2">control plane</text:span><text:span text:style-name="T1">).</text:span></text:p>
      <text:p text:style-name="P1"><text:span text:style-name="T1">O pacote central k8s.io/apimachinery implementa abstrações de alto desempenho baseadas no valor zero para resolver problemas algorítmicos clássicos, tais como operações sobre conjuntos matemáticos (</text:span><text:span text:style-name="T2">Sets</text:span><text:span text:style-name="T1">).</text:span><text:span text:style-name="T5">13</text:span><text:span text:style-name="T1"> Historicamente, antes da introdução de Genéricos (Generics) na linguagem, o Go não possuía uma estrutura nativa de Conjunto, forçando a comunidade a improvisar através de mapas (maps).</text:span></text:p>
      <text:p text:style-name="P1"><text:span text:style-name="T1">A implementação canónica do Kubernetes para um conjunto de strings, desenhada para um consumo mínimo e ótimo de memória, tira partido imediato da teoria de alocação de bytes zero.</text:span><text:span text:style-name="T5">14</text:span></text:p>
      <text:p text:style-name="P2"/>
      <table:table table:name="Table1" table:style-name="Table1">
        <table:table-column table:style-name="Table1.A" table:number-columns-repeated="3"/>
        <text:soft-page-break/>
        <table:table-row table:style-name="Table1.1">
          <table:table-cell table:style-name="Table1.A1" office:value-type="string">
            <text:p text:style-name="P4"><text:span text:style-name="T3">Entidade no apimachinery/pkg/util/sets</text:span></text:p>
          </table:table-cell>
          <table:table-cell table:style-name="Table1.A1" office:value-type="string">
            <text:p text:style-name="P4"><text:span text:style-name="T3">Estrutura Sintática Interna</text:span></text:p>
          </table:table-cell>
          <table:table-cell table:style-name="Table1.A1" office:value-type="string">
            <text:p text:style-name="P4"><text:span text:style-name="T3">Impacto Sistémico e Termodinâmico</text:span></text:p>
          </table:table-cell>
        </table:table-row>
        <table:table-row table:style-name="Table1.1">
          <table:table-cell table:style-name="Table1.A1" office:value-type="string">
            <text:p text:style-name="P4"><text:span text:style-name="T3">Abstração do Valor Nulo (Empty)</text:span></text:p>
          </table:table-cell>
          <table:table-cell table:style-name="Table1.A1" office:value-type="string">
            <text:p text:style-name="P4"><text:span text:style-name="T1">type Empty struct{}</text:span></text:p>
          </table:table-cell>
          <table:table-cell table:style-name="Table1.A1" office:value-type="string">
            <text:p text:style-name="P1"><text:span text:style-name="T1">A estrutura vazia em Go é desprovida de quaisquer campos. A sua pegada de alocação na RAM é exatamente de 0 bytes.</text:span><text:span text:style-name="T5">14</text:span></text:p>
          </table:table-cell>
        </table:table-row>
        <table:table-row table:style-name="Table1.1">
          <table:table-cell table:style-name="Table1.A1" office:value-type="string">
            <text:p text:style-name="P4"><text:span text:style-name="T3">O Conjunto de Strings (String)</text:span></text:p>
          </table:table-cell>
          <table:table-cell table:style-name="Table1.A1" office:value-type="string">
            <text:p text:style-name="P4"><text:span text:style-name="T1">type String map[string]Empty</text:span></text:p>
          </table:table-cell>
          <table:table-cell table:style-name="Table1.A1" office:value-type="string">
            <text:p text:style-name="P1"><text:span text:style-name="T1">Utiliza a chave da </text:span><text:span text:style-name="T2">hash table</text:span><text:span text:style-name="T1"> (mapa) para garantir a unicidade criptográfica das strings, associando-as à estrutura vazia de 0 bytes.</text:span><text:span text:style-name="T5">15</text:span></text:p>
          </table:table-cell>
        </table:table-row>
        <table:table-row table:style-name="Table1.1">
          <table:table-cell table:style-name="Table1.A1" office:value-type="string">
            <text:p text:style-name="P4"><text:span text:style-name="T3">Economia de Escala</text:span></text:p>
          </table:table-cell>
          <table:table-cell table:style-name="Table1.A1" office:value-type="string">
            <text:p text:style-name="P4"><text:span text:style-name="T1">Comparação direta vs map[string]bool</text:span></text:p>
          </table:table-cell>
          <table:table-cell table:style-name="Table1.A1" office:value-type="string">
            <text:p text:style-name="P1"><text:span text:style-name="T1">Substituir bool (que consome tipicamente 1 byte mais custos mecânicos de alinhamento) por Empty liberta gigabytes em clusters que reconciliam biliões de </text:span><text:span text:style-name="T2">labels</text:span><text:span text:style-name="T1"> lógicas, maximizando a coerência do cache do processador.</text:span><text:span text:style-name="T5">16</text:span></text:p>
          </table:table-cell>
        </table:table-row>
      </table:table>
      <text:p text:style-name="P1"><text:span text:style-name="T1">Além das rotinas em memória, a semântica do valor zero orquestra a forma como as </text:span><text:span text:style-name="T2">Custom Resource Definitions</text:span><text:span text:style-name="T1"> (CRDs) e recursos informáticos não estruturados transitam pela rede através de serialização JSON.</text:span><text:span text:style-name="T5">13</text:span><text:span text:style-name="T1"> Quando o Kubernetes efetua interações dinâmicas através do seu cliente client-go/dynamic ou manipula respostas de extensões do servidor, utiliza frequentemente o tipo unstructured.Unstructured, que aloja representações na forma de map[string]interface{}.</text:span><text:span text:style-name="T5">20</text:span></text:p>
      <text:p text:style-name="P1"><text:span text:style-name="T1">Através da tag de serialização omitempty nativa de Go, a API do Kubernetes decide se deve transportar um campo através da rede para o banco de dados etcd.</text:span><text:span text:style-name="T5">13</text:span><text:span text:style-name="T1"> Se uma propriedade numérica contiver o seu valor zero (0), ou uma string for o seu valor zero (""), a maquinaria de serialização JSON, ciente deste estado basal, omite ativamente a chave do </text:span><text:span text:style-name="T2">payload</text:span><text:span text:style-name="T1"> serializado. Num cluster governado por centenas de controladores emitindo alterações (patches) por segundo, a assunção generalizada do valor zero impede a persistência redundante no </text:span><text:span text:style-name="T2">storage</text:span><text:span text:style-name="T1">, colapsando os tamanhos dos manifestos JSON ao seu estrito mínimo informacional.</text:span><text:span text:style-name="T5">13</text:span></text:p>
      <text:p text:style-name="P14"><text:span text:style-name="T1">A Filosofia das Abstrações e a Contra-Revolução das Interfaces</text:span></text:p>
      <text:p text:style-name="P1"><text:span text:style-name="T1">Outro ditame arquitetural crítico enunciado por Rob Pike alerta que </text:span><text:span text:style-name="T2">"The bigger the interface, the weaker the abstraction"</text:span><text:span text:style-name="T1"> (Quanto maior a interface, mais fraca a abstração).</text:span><text:span text:style-name="T5">4</text:span><text:span text:style-name="T1"> Historicamente, ecossistemas de engenharia corporativos enveredaram pelo caminho da construção de interfaces monolíticas contendo dezenas de contratos metodológicos. Contudo, em Go, o polimorfismo é estruturado implicitamente, ou seja, através do </text:span><text:span text:style-name="T2">Duck Typing</text:span><text:span text:style-name="T1"> em tempo de compilação.</text:span><text:span text:style-name="T5">1</text:span></text:p>
      <text:p text:style-name="P1"><text:span text:style-name="T1">A implicação mecânica de interfaces colossais é o acoplamento rígido de sistemas (tight coupling), forçando os programadores a criar dependências espúrias, o que prejudica a testabilidade modular em testes unitários e condena o sistema a cascatas de refatorização.</text:span><text:span text:style-name="T5">1</text:span><text:span text:style-name="T1"> Uma abstração poderosa é aquela cuja definição é microscópica. Um exemplo perene disto é a interface io.Reader da biblioteca padrão, que impõe unicamente o método Read(byte) (int, error).</text:span><text:span text:style-name="T5">1</text:span></text:p>
      <text:p text:style-name="P13"><text:span text:style-name="T1">A Metafísica da Compilação e Custos Físicos de Despacho</text:span></text:p>
      <text:p text:style-name="P1"><text:span text:style-name="T1">Do ponto de vista sistémico, a preferência por pequenas interfaces não se baseia apenas na organização humana do código, mas nas regras do processador e na mecânica do </text:span><text:span text:style-name="T2">Garbage Collector</text:span><text:span text:style-name="T1">.</text:span><text:span text:style-name="T5">1</text:span></text:p>
      <text:p text:style-name="P1"><text:span text:style-name="T1">Quando o código fonte de Go é compilado para a arquitetura de máquina (como a dominante arquitetura AMD64), uma interface não materializa-se como um conceito vazio, mas consubstancia-se como um invólucro gordo (</text:span><text:span text:style-name="T2">fat pointer</text:span><text:span text:style-name="T1">) alocando estritamente 16 bytes na memória volátil.</text:span><text:span text:style-name="T5">1</text:span><text:span text:style-name="T1"> Num sub-conjunto comportamental provido de métodos — como o exigido por uma interface concreta com assinaturas —, a abstração é internamente apelidada de iface.</text:span><text:span text:style-name="T5">1</text:span><text:span text:style-name="T1"> A estrutura de iface contém dois ponteiros adjacentes de 8 bytes cada: o primeiro aponta incondicionalmente para uma grelha indexante interna chamada itab (interface table), que regista os endereços dos métodos virtuais para despacho e os dados do tipo estático subjacente; o segundo ponteiro, chamado de data, é um unsafe.Pointer que referencia a bagagem física dos dados encapsulados propriamente ditos.</text:span><text:span text:style-name="T5">1</text:span></text:p>
      <text:p text:style-name="P1"><text:span text:style-name="T1">O provérbio corolário </text:span><text:span text:style-name="T2">"interface{} says nothing"</text:span><text:span text:style-name="T1"> (interface{} não diz nada) condena a adoção cega de variáveis genéricas vazias.</text:span><text:span text:style-name="T5">4</text:span><text:span text:style-name="T1"> Ao envolver dados na interface nua interface{}, o compilador transmuta o objeto numa estrutura designada eface.</text:span><text:span text:style-name="T5">1</text:span><text:span text:style-name="T1"> A topologia metafísica desta abstração não detém uma tabela de métodos completa, retendo essencialmente um eixo indexante _type e o inevitável ponteiro de dados.</text:span></text:p>
      <text:p text:style-name="P1"><text:span text:style-name="T1">A tragédia arquitetural do excesso de interfaces e, singularmente, da interface estéril, reside na perda do determinismo preditivo da Análise de Fuga (</text:span><text:span text:style-name="T2">Escape Analysis</text:span><text:span text:style-name="T1">).</text:span><text:span text:style-name="T5">1</text:span><text:span text:style-name="T1"> Ao deparar-se com um recetor altamente abstrato cujos limites físicos em tempo de execução são imprevisíveis, o compilador adota o mecanismo defensivo de segurança máxima: recusa-se a alocar o objeto no seguro, barato e termo-dinamicamente nulo domínio da Pilha (</text:span><text:span text:style-name="T2">Stack</text:span><text:span text:style-name="T1">).</text:span><text:span text:style-name="T5">1</text:span><text:span text:style-name="T1"> Em consequência, envia forçadamente todos os dados sob a alçada polimórfica para o fosso caótico do </text:span><text:span text:style-name="T2">Heap</text:span><text:span text:style-name="T1">. Esse fenómeno detona repetidas e dispendiosas operações de reciclagem por parte do </text:span><text:span text:style-name="T2">Garbage Collector</text:span><text:span text:style-name="T1">, saturando as linhas lógicas da CPU com fragmentação.</text:span><text:span text:style-name="T5">1</text:span></text:p>
      <text:p text:style-name="P13"><text:span text:style-name="T1">O Caso de Sucesso do Docker: Multiplexação e o Desacoplamento do Containerd</text:span></text:p>
      <text:p text:style-name="P1"><text:span text:style-name="T1">Projetos colossais baseados em Go, tal como o Docker (e a espinha dorsal nativa Containerd), aprenderam a aplicar a contenção de interfaces por via empírica dura. O Docker tira extensivo proveito de interfaces nanoscópicas para implementar sistemas complexos de </text:span><text:span text:style-name="T2">streaming</text:span><text:span text:style-name="T1"> de alta velocidade.</text:span><text:span text:style-name="T5">28</text:span><text:span text:style-name="T1"> No caso de multiplexação de fluxos de </text:span><text:span text:style-name="T2">logs</text:span><text:span text:style-name="T1"> paralelos a partir do socket de um contentor (docker attach e docker logs), o sistema evita a construção de condutas personalizadas monolíticas, confiando invariavelmente na simetria do io.Reader e do io.Writer. Utilizando a primitiva io.Pipe, que emparelha instâncias contíguas de PipeReader e PipeWriter em RAM, o Docker estabelece condutos ultravelozes entre as fronteiras do </text:span><text:span text:style-name="T2">kernel</text:span><text:span text:style-name="T1"> e o terminal do utilizador, operando num grau de composição modular insuperável.</text:span><text:span text:style-name="T5">29</text:span></text:p>
      <text:p text:style-name="P1"><text:span text:style-name="T1">O triunfo máximo deste provérbio verifica-se na cisão e amadurecimento do Containerd, o </text:span><text:span text:style-name="T2">runtime</text:span><text:span text:style-name="T1"> de contentores predominante no Kubernetes moderno.</text:span><text:span text:style-name="T5">2</text:span><text:span text:style-name="T1"> Nos primórdios do Docker Engine, a coordenação intrincada do sistema de ficheiros em camadas (layers) ficava ao encargo da abstração apelidada de GraphDriver.</text:span><text:span text:style-name="T5">30</text:span><text:span text:style-name="T1"> A interface GraphDriver era monumental e inflacionada, exigindo conhecimentos de empacotamento TAR, serialização de grafos dependentes, cálculos de hashes criptográficos e, por fim, ordens de montagem de disco.</text:span><text:span text:style-name="T5">30</text:span><text:span text:style-name="T1"> Esta interface opressiva violava integralmente os provérbios Go: era intransigente de testar, dificultava imensamente o desenvolvimento de implementações independentes (plugins) e fundia preocupações díspares provocando falhas cataclísmicas.</text:span><text:span text:style-name="T5">30</text:span></text:p>
      <text:p text:style-name="P1"><text:span text:style-name="T1">A revolução arquitetural foi desencadeada através da obsolescência do GraphDriver, culminando na conceção de um substituto minimalista, desenhado de acordo com a filosofia Pike: o Snapshotter (Instantaneador).</text:span><text:span text:style-name="T5">30</text:span></text:p>
      <text:p text:style-name="P2"/>
      <table:table table:name="Table2" table:style-name="Table2">
        <table:table-column table:style-name="Table2.A" table:number-columns-repeated="3"/>
        <table:table-row table:style-name="Table2.1">
          <table:table-cell table:style-name="Table2.A1" office:value-type="string">
            <text:p text:style-name="P4"><text:span text:style-name="T3">Método na Interface Snapshotter</text:span></text:p>
          </table:table-cell>
          <table:table-cell table:style-name="Table2.A1" office:value-type="string">
            <text:p text:style-name="P4"><text:span text:style-name="T3">Papel Sistémico Focado</text:span></text:p>
          </table:table-cell>
          <table:table-cell table:style-name="Table2.A1" office:value-type="string">
            <text:p text:style-name="P4"><text:span text:style-name="T3">Mecanismo Pragmático</text:span></text:p>
          </table:table-cell>
        </table:table-row>
        <table:table-row table:style-name="Table2.1">
          <table:table-cell table:style-name="Table2.A1" office:value-type="string">
            <text:p text:style-name="P4"><text:span text:style-name="T1">Stat(ctx, key)</text:span></text:p>
          </table:table-cell>
          <table:table-cell table:style-name="Table2.A1" office:value-type="string">
            <text:p text:style-name="P4"><text:span text:style-name="T1">Inspeção Diagnóstica</text:span></text:p>
          </table:table-cell>
          <table:table-cell table:style-name="Table2.A1" office:value-type="string">
            <text:p text:style-name="P1"><text:span text:style-name="T1">Devolve apenas metadados lógicos (estrutura Info) verificando a existência ativa ou em repouso da camada no disco, suportando a resolução de hierarquias subjacentes.</text:span><text:span text:style-name="T5">33</text:span></text:p>
          </table:table-cell>
        </table:table-row>
        <table:table-row table:style-name="Table2.1">
          <table:table-cell table:style-name="Table2.A1" office:value-type="string">
            <text:p text:style-name="P4"><text:span text:style-name="T1">Prepare(ctx, key, parent)</text:span></text:p>
          </table:table-cell>
          <table:table-cell table:style-name="Table2.A1" office:value-type="string">
            <text:p text:style-name="P4"><text:span text:style-name="T1">Construção da Camada Delta</text:span></text:p>
          </table:table-cell>
          <table:table-cell table:style-name="Table2.A1" office:value-type="string">
            <text:p text:style-name="P1"><text:span text:style-name="T1">Pede passivamente ao fornecedor de armazenamento uma zona virgem (diretório) baseada no conteúdo do pai (parent), preparada para a absorção das mutações do contentor.</text:span><text:span text:style-name="T5">33</text:span></text:p>
          </table:table-cell>
        </table:table-row>
        <table:table-row table:style-name="Table2.1">
          <table:table-cell table:style-name="Table2.A1" office:value-type="string">
            <text:p text:style-name="P4"><text:span text:style-name="T1">Commit(ctx, name, key)</text:span></text:p>
          </table:table-cell>
          <table:table-cell table:style-name="Table2.A1" office:value-type="string">
            <text:p text:style-name="P4"><text:span text:style-name="T1">Selagem Termodinâmica</text:span></text:p>
          </table:table-cell>
          <table:table-cell table:style-name="Table2.A1" office:value-type="string">
            <text:p text:style-name="P1"><text:span text:style-name="T1">Imutabiliza ativamente a camada de </text:span><text:span text:style-name="T2">snapshot</text:span><text:span text:style-name="T1"> em desenvolvimento ativo (key), transformando-a num arquivo permanente associado ao name, isolando os resíduos do </text:span><text:span text:style-name="T2">filesystem</text:span><text:span text:style-name="T1">.</text:span><text:span text:style-name="T5">34</text:span></text:p>
          </table:table-cell>
        </table:table-row>
        <table:table-row table:style-name="Table2.1">
          <table:table-cell table:style-name="Table2.A1" office:value-type="string">
            <text:p text:style-name="P4"><text:span text:style-name="T1">Mounts(ctx, key)</text:span></text:p>
          </table:table-cell>
          <table:table-cell table:style-name="Table2.A1" office:value-type="string">
            <text:p text:style-name="P4"><text:span text:style-name="T1">Acesso à Estrutura Nativa</text:span></text:p>
          </table:table-cell>
          <table:table-cell table:style-name="Table2.A1" office:value-type="string">
            <text:p text:style-name="P1"><text:span text:style-name="T1">Devolve o vetor da estrutura tipificada Mount. Não se responsabiliza pela física do processo, libertando a matriz com as configurações de montagem, por exemplo para o módulo OverlayFS do kernel.</text:span><text:span text:style-name="T5">33</text:span></text:p>
          </table:table-cell>
        </table:table-row>
      </table:table>
      <text:p text:style-name="P1"><text:soft-page-break/><text:span text:style-name="T1">A interface Snapshotter em containerd/core/snapshots/snapshotter.go não contém um único vislumbre sobre o formato das imagens de contentores, sobre serialização de </text:span><text:span text:style-name="T2">tarballs</text:span><text:span text:style-name="T1"> ou sobre abstrações OCI (Open Container Initiative).</text:span><text:span text:style-name="T5">30</text:span><text:span text:style-name="T1"> O foco singular e purista sobre o ciclo de montagens transformou a estabilidade do ecossistema. Operadores e fornecedores de nuvens adaptam facilmente os seus blocos de armazenamento utilizando os métodos básicos listados </text:span><text:span text:style-name="T5">36</text:span><text:span text:style-name="T1">, delegando a orquestração complexa de dependências a entidades exteriores. O sistema de montagens subjacente do Unix, seja BTRFS, ZFS, devicemapper ou OverlayFS (o modelo predefinido), apenas consome os diretórios resultantes de upperdir, lowerdir e workdir originados pelo </text:span><text:span text:style-name="T2">plugin</text:span><text:span text:style-name="T1"> sem as fricções do antigo gigante monolítico.</text:span><text:span text:style-name="T5">36</text:span></text:p>
      <text:p text:style-name="P14"><text:span text:style-name="T1">A Mecânica Quântica do Estado Distribuído: Canais, Mutexes e CSP</text:span></text:p>
      <text:p text:style-name="P1"><text:span text:style-name="T1">Na esfera das execuções paralelas massivas, um dos dogmas centrais do ecossistema assenta na frase: </text:span><text:span text:style-name="T2">"Don't communicate by sharing memory, share memory by communicating"</text:span><text:span text:style-name="T1"> (Não comunique partilhando memória, partilhe memória comunicando) e a sua especialização subsequente, </text:span><text:span text:style-name="T2">"Channels orchestrate; mutexes serialize"</text:span><text:span text:style-name="T1"> (Canais orquestram; mutexes serializam).</text:span><text:span text:style-name="T5">4</text:span></text:p>
      <text:p text:style-name="P1"><text:span text:style-name="T1">Enquanto C++ e Java assentam a fundação do paralelismo interlaçando fios de execução baseados estritamente na mecânica partilhada de blocos de RAM bloqueados por mutexes agressivos (fomentando bloqueios mortos ou </text:span><text:span text:style-name="T2">deadlocks</text:span><text:span text:style-name="T1"> inescrutáveis e concorrência sufocada), a linguagem Go transporta nativamente a abstração dos Processos Sequenciais Comunicantes (CSP). A concorrência não é tratada como um complemento ou uma biblioteca, mas constitui o motor de combustão primordial mapeado aos anéis de hardware pela runtime de Go através do modelo logístico GMP.</text:span><text:span text:style-name="T5">1</text:span></text:p>
      <text:p text:style-name="P13"><text:span text:style-name="T1">A Dinâmica do GMP (Goroutine, Machine, Processor)</text:span></text:p>
      <text:p text:style-name="P1"><text:span text:style-name="T1">Para mitigar custos latentes em transições contextuais rigorosas impostas pelas chamadas ao sistema operacional (context switching), a arquitetura da runtime mantém o escalonador GMP:</text:span></text:p>
      <text:list xml:id="list6310858" text:style-name="WWNum1">
        <text:list-item>
          <text:p text:style-name="P5"><text:span text:style-name="T3">G (Goroutine):</text:span><text:span text:style-name="T1"> Representa o bloco atómico da infraestrutura.</text:span><text:span text:style-name="T5">1</text:span><text:span text:style-name="T1"> Iniciada com parcos </text:span><text:span text:style-name="T2">kilobytes</text:span><text:span text:style-name="T1"> geridos topologicamente no espaço do utilizador, a sua criação é hiper-barata, demorando nanosegundos comparado aos microsegundos de </text:span><text:span text:style-name="T2">threads</text:span><text:span text:style-name="T1"> nativas.</text:span><text:span text:style-name="T5">1</text:span></text:p>
        </text:list-item>
        <text:list-item>
          <text:p text:style-name="P5"><text:span text:style-name="T3">M (Machine):</text:span><text:span text:style-name="T1"> Consubstancia-se na linha física nativa gerida pelo </text:span><text:span text:style-name="T2">Kernel</text:span><text:span text:style-name="T1"> da máquina. É o recetor passivo das instruções encarregue da sua propagação mecânica final aos ciclos atómicos siliciosos.</text:span><text:span text:style-name="T5">1</text:span></text:p>
        </text:list-item>
        <text:list-item>
          <text:p text:style-name="P5"><text:span text:style-name="T3">P (Processor):</text:span><text:span text:style-name="T1"> Assume a mediação intelectual entre a Goroutine e a Machine. O P retém uma Fila Local de Execução (LRQ) restrita que dita as próximas fatias lógicas a transitar.</text:span><text:span text:style-name="T5">1</text:span></text:p>
        </text:list-item>
      </text:list>
      <text:p text:style-name="P1"><text:span text:style-name="T1">Numa eventualidade onde a Goroutine estagne bloqueada ao requerer I/O (operação de entrada/saída em discos ou </text:span><text:span text:style-name="T2">sockets</text:span><text:span text:style-name="T1"> de rede), o bloqueio na camada subjacente estagna transitoriamente a </text:span><text:span text:style-name="T2">Machine</text:span><text:span text:style-name="T1"> M. Em contraste com plataformas limitadas de ratio 1:1, a inteligência da runtime de Go deteta automaticamente a estagnação e desatrela coercivamente o coração mediador P de volta a uma Machine desimpedida, garantindo que a frota de rotinas residentes na Fila Local escape do congelamento.</text:span><text:span text:style-name="T5">1</text:span><text:span text:style-name="T1"> O policiamento implacável da distribuição paralela baseia-se numa </text:span><text:span text:style-name="T2">thread</text:span><text:span text:style-name="T1"> global independente — a </text:span><text:span text:style-name="T2">sysmon</text:span><text:span text:style-name="T1"> — aliada ao algoritmo universal de </text:span><text:span text:style-name="T2">work-stealing</text:span><text:span text:style-name="T1">, assegurando o balanço logístico sem impor </text:span><text:span text:style-name="T2">locks</text:span><text:span text:style-name="T1"> monolíticos bloqueantes.</text:span><text:span text:style-name="T5">1</text:span></text:p>
      <text:p text:style-name="P13"><text:span text:style-name="T1">Arquitetura de Comunicação e Transações Otimizadas nos Canais</text:span></text:p>
      <text:p text:style-name="P1"><text:span text:style-name="T1">A fundação do provérbio </text:span><text:span text:style-name="T2">"share memory by communicating"</text:span><text:span text:style-name="T1"> encontra o seu suporte no </text:span><text:span text:style-name="T2">heap</text:span><text:span text:style-name="T1"> através de uma sub-estrutura obscura designada hchan, a verdadeira abstração mecânica que o compilador invoca perante as operações nativas com canais (chan).</text:span><text:span text:style-name="T5">1</text:span></text:p>
      <text:p text:style-name="P1"><text:span text:style-name="T1">Um canal hchan não é uma primitiva vaga; é um complexo estruturado que inclui um ponteiro estrito para um arranjo sequencial em alocação física, que atua como </text:span><text:span text:style-name="T2">buffer</text:span><text:span text:style-name="T1"> ou anel de fila circular contígua.</text:span><text:span text:style-name="T5">1</text:span><text:span text:style-name="T1"> A integridade temporal e a posição relacional nos eixos da matriz estão acopladas a contadores de passo (sendx e recvx), e duas filas duplamente atadas denominadas sendq e recvq encarregam-se do repouso de </text:span><text:span text:style-name="T2">threads</text:span><text:span text:style-name="T1"> inativas com base na entidade de registo e gestão waitq.</text:span><text:span text:style-name="T5">1</text:span><text:span text:style-name="T1"> Toda a anatomia desta pequena estrutura, e só desta, é protegida por um sync.Mutex invisível subjacente que garante exclusividade em microssegundos durante operações estritas.</text:span><text:span text:style-name="T5">1</text:span></text:p>
      <text:p text:style-name="P1"><text:span text:style-name="T1">O clímax da otimização atómica — vulgarmente referida como "simpatia mecânica" no seio da engenharia moderna — ocorre no exato momento da satisfação de um emissor perante uma fila empacotada faminta.</text:span><text:span text:style-name="T5">1</text:span><text:span text:style-name="T1"> Caso uma goroutine tente consumir dados originários num </text:span><text:span text:style-name="T2">pipe</text:span><text:span text:style-name="T1"> oco, a linguagem aprisiona-a numa super-estrutura de vigilância sudog no limiar da recvq e invoca o estacionamento (gopark), alienando o seu peso do motor processador.</text:span><text:span text:style-name="T5">1</text:span><text:span text:style-name="T1"> Porém, assim que um parceiro emissor emerge e adquire transitoriamente o fecho de gestão para comunicar via hchan, o </text:span><text:span text:style-name="T2">runtime</text:span><text:span text:style-name="T1"> executa uma inferência contextual letal: ao escanear a existência de rotinas famintas à espreita, desvia todo o trânsito da mecânica padrão.</text:span></text:p>
      <text:p text:style-name="P1"><text:span text:style-name="T1">Recorrendo a um procedimento abissal chamado sendDirect, a transferência inter-memórias é ativada. A runtime procede a um </text:span><text:span text:style-name="T2">memmove</text:span><text:span text:style-name="T1"> explícito no hardware subjacente, transacionando o valor alvo </text:span><text:span text:style-name="T2">do envelope protetor originário alocado na Pilha (Stack) do emissor de forma imperativa e direta sobre o limite restrito do Stack passivo enclausurado da goroutine recetora em hibernação</text:span><text:span text:style-name="T1">.</text:span><text:span text:style-name="T5">1</text:span><text:span text:style-name="T1"> Esta clonagem espacial exalta a anulação da inter-transferência circular nos tampões voláteis (buf), mitigando as colisões atómicas e despertando de súbito o destinatário para um ciclo imediato sem penalizações destrutivas de hierarquia L1 cache.</text:span><text:span text:style-name="T5">1</text:span><text:span text:style-name="T1"> A comunicação de memórias torna-se transacional.</text:span></text:p>
      <text:p text:style-name="P13"><text:span text:style-name="T1">O Caso Pragmático em Kubernetes: O Algoritmo Workqueue</text:span></text:p>
      <text:p text:style-name="P1"><text:span text:style-name="T1">A coexistência harmoniosa descrita na instrução </text:span><text:span text:style-name="T2">"Channels orchestrate; mutexes serialize"</text:span><text:span text:style-name="T1"> manifesta-se nos seus mais refinados contornos num dos padrões centrais implementado dentro da arquitetura fundacional da biblioteca-mãe de clientes nativos do Kubernetes, a client-go.</text:span><text:span text:style-name="T5">41</text:span></text:p>
      <text:p text:style-name="P1"><text:span text:style-name="T1">No seio dos controladores distribuídos, os informadores (</text:span><text:span text:style-name="T2">informers</text:span><text:span text:style-name="T1">) captam torrentes impiedosas de eventos lógicos, assíncronos e divergentes sobre as mudanças de configuração global registadas contra o servidor API. Em cenários nefastos, num desdobramento repentino ou reconfiguração de um aglomerado hiper denso, uma </text:span><text:span text:style-name="T2">Deployment</text:span><text:span text:style-name="T1"> sofrendo flutuações de nó induz emissões espelhadas incessantes, disparando sucessivos eventos de atualização ao mesmo exato </text:span><text:span text:style-name="T2">namespace/name</text:span><text:span text:style-name="T1"> da </text:span><text:span text:style-name="T2">pod</text:span><text:span text:style-name="T1"> num espectro temporal minúsculo. A falha na mediação destes conflitos levaria a múltiplas </text:span><text:span text:style-name="T2">worker goroutines</text:span><text:span text:style-name="T1"> (linhas correntes instanciadas paralelamente) processando a idêntica reconciliação simultaneamente. Tal facto violaria a idempotência sistémica, colidindo ativamente sobre dados inconsistentes, duplicando futilmente custos operacionais.</text:span><text:span text:style-name="T5">46</text:span></text:p>
      <text:p text:style-name="P1"><text:span text:style-name="T1">Para impor controlo neste mar de imprevisibilidade temporal distribuída, a infraestrutura abstrai os fluxos lógicos atrás de condutas (semelhante ao princípio base dos canais CSP), enquanto as passagens singulares rigorosas no estrangulamento baseiam-se numa implementação matemática blindada: a Workqueue.</text:span><text:span text:style-name="T5">46</text:span></text:p>
      <text:p text:style-name="P1"><text:span text:style-name="T1">A arquitetura profunda definida em k8s.io/client-go/util/workqueue/queue.go engloba a estrutura atómica Type (ou Typed) orquestrando quatro campos operacionais essenciais </text:span><text:span text:style-name="T5">50</text:span><text:span text:style-name="T1">:</text:span></text:p>
      <text:list xml:id="list987839094" text:style-name="WWNum2">
        <text:list-item>
          <text:p text:style-name="P7"><text:span text:style-name="T3">queue</text:span><text:span text:style-name="T1">: Um </text:span><text:span text:style-name="T2">slice</text:span><text:span text:style-name="T1"> (vetor dinâmico) iterativo subjacente imperativo que retém e obriga a ordem estrita transacional e sequencial.</text:span></text:p>
        </text:list-item>
        <text:list-item>
          <text:p text:style-name="P7"><text:soft-page-break/><text:span text:style-name="T3">dirty</text:span><text:span text:style-name="T1">: Uma representação estrutural sets.Set contendo de forma unívoca a multiplicidade esparsa total de itens que requerem processamento iminente.</text:span></text:p>
        </text:list-item>
        <text:list-item>
          <text:p text:style-name="P7"><text:span text:style-name="T3">processing</text:span><text:span text:style-name="T1">: Uma topologia contígua paralela sets.Set hospedando unicamente o rol de identidades já despachadas aos trabalhadores ativamente envolvidos na concorrência da execução atual (elementos </text:span><text:span text:style-name="T2">in-flight</text:span><text:span text:style-name="T1">).</text:span></text:p>
        </text:list-item>
        <text:list-item>
          <text:p text:style-name="P7"><text:span text:style-name="T3">cond</text:span><text:span text:style-name="T1">: Uma barreira rígida de coordenação termodinâmica baseada num componente explícito de hardware condicionado da runtime nativa: o tipo condicional *sync.Cond protegido por um sync.Mutex imperativo clássico.</text:span><text:span text:style-name="T5">50</text:span></text:p>
        </text:list-item>
      </text:list>
      <text:p text:style-name="P1"><text:span text:style-name="T1">O paralelismo dedutivo desta complexidade obedece a trâmites algorítmicos exatos para concretizar a proeza arquitetural apelidada de </text:span><text:span text:style-name="T2">Stingy</text:span><text:span text:style-name="T1"> e dedutiva (</text:span><text:span text:style-name="T2">Singleflight Pattern</text:span><text:span text:style-name="T1"> ou Deduplicação) </text:span><text:span text:style-name="T5">46</text:span><text:span text:style-name="T1">:</text:span></text:p>
      <text:p text:style-name="P11"><text:span text:style-name="T1">O Percurso do Add(item T)</text:span></text:p>
      <text:p text:style-name="P1"><text:span text:style-name="T1">Sempre que um informador empurra uma carga para a frente, o estrangulamento adquire transitoriamente a posse da chave mestre (q.cond.L.Lock()). Assim que domina a serialização, acede à totalidade das estruturas.</text:span><text:span text:style-name="T5">50</text:span><text:span text:style-name="T1"> Intercepta primariamente o objeto através da consulta rápida atómica sobre a presença na representação booleana instantânea no conjunto dirty. Se um alerta homólogo persistir nesta base temporal (indicando que foi requisitado recentemente e o processo ainda se encontra expectante na fila global), o item é descartado de instâncias adicionais, prevenindo poluição em massa e encurtando o desperdício computacional.</text:span><text:span text:style-name="T5">47</text:span></text:p>
      <text:p text:style-name="P1"><text:span text:style-name="T1">A eventualidade secundária é brilhante: se não estava em dirty, mas interage no vetor de contenção intermédio (processing — significando que um trabalhador já lida ativamente num percurso </text:span><text:span text:style-name="T2">goroutine</text:span><text:span text:style-name="T1"> independente), o sistema injeta o item secretamente no sub-sistema dirty (como alerta retroativo), contudo isenta a perturbação frontal negando a colocação imperativa na ordem primária paralela no </text:span><text:span text:style-name="T2">slice</text:span><text:span text:style-name="T1"> de repouso (a fila principal).</text:span><text:span text:style-name="T5">47</text:span><text:span text:style-name="T1"> Uma vez sanadas as obrigações e depositados os vetores ausentes, o barramento aciona agressivamente q.cond.Signal(), alertando os bloqueios expectantes perante a disponibilidade de recurso originando o despertar logístico de uma corrotina isolada.</text:span><text:span text:style-name="T5">50</text:span></text:p>
      <text:p text:style-name="P11"><text:span text:style-name="T1">O Percurso de Get() e Done(item T)</text:span></text:p>
      <text:p text:style-name="P1"><text:span text:style-name="T1">Na órbita das extrações operacionais consumidas pelos ciclos de processadores nativos contínuos (</text:span><text:span text:style-name="T2">worker loops</text:span><text:span text:style-name="T1">), a invocação a Get() detém novamente o fecho global e persegue pacientemente a anulação do estado estacionário em vazão iterando sobre as pausas mecânicas ditadas através de q.cond.Wait() nas circunstâncias desertas em itens.</text:span><text:span text:style-name="T5">50</text:span><text:span text:style-name="T1"> Quando se liberta, desloca rigidamente a identificação subjacente emergente extirpando do berço originário predefinido dirty, impelindo-o ao limiar cativo submisso do conjunto processing e devolvendo a execução plena das ordens transacionais pesadas fora da opressão limitativa dos bloqueios, restaurando o isolamento imperativo da goroutine recetora em livre fluxo.</text:span><text:span text:style-name="T5">50</text:span></text:p>
      <text:p text:style-name="P1"><text:span text:style-name="T1">O encerramento é orquestrado através do Done(item T) ao termo final dos trabalhos exaustivos.</text:span><text:span text:style-name="T5">50</text:span><text:span text:style-name="T1"> Assenhoreando-se novamente ao longo das estruturas exclusivas limitadas por Mutex, retira perentoriamente a presença caduca da barreira estagnante global do conjunto processing. Contudo, ao mesmo passo efetua verificação redundante fulcral nos sub-nodos da lista intersetiva dirty.</text:span><text:span text:style-name="T5">47</text:span><text:span text:style-name="T1"> Como explorado preliminarmente no cenário atípico em que modificações extra se desenrolaram nos bastidores aquando dos trabalhos ativos decorrentes (</text:span><text:span text:style-name="T2">overlap event</text:span><text:span text:style-name="T1">), a entidade permaneceu dormente inscrita ativamente na secção dirty. Como compensação pela negligência temporal, ele apanha ativamente este objeto esquecido e submete-o de volta à retaguarda circular das prioridades absolutas na grelha primária do </text:span><text:span text:style-name="T2">slice</text:span><text:span text:style-name="T1"> de repouso do sistema central.</text:span><text:span text:style-name="T5">47</text:span></text:p>
      <text:p text:style-name="P1"><text:span text:style-name="T1">Em total confluência, a mecânica impõe resiliência incondicional: as corrotinas, funcionando transitoriamente em paralelo abstrato a semelhança de canais CSP fluidos na recolha maciça e deduplicada (orquestração massiva contínua assíncrona), encarregam o balanço transacional exato de sub-bases protegidas e trancadas em segurança a barreiras e fechos operacionais absolutos (os </text:span><text:span text:style-name="T2">Mutexes</text:span><text:span text:style-name="T1"> solidificando o determinismo atómico do estado relacional das listas sem corromper memórias). Canais CSP interagem no desenho exterior e filosófico da coreografia, enquanto as chaves estritas (locks) garantem a coesão microscópica interior do cérebro matemático de reconciliação em prol de falhas zero.</text:span></text:p>
      <text:p text:style-name="P14"><text:span text:style-name="T1">O Pragmatismo da Falha: "Errors are values" e Topologias de Resiliência</text:span></text:p>
      <text:p text:style-name="P1"><text:span text:style-name="T1">Na esfera da coerência do software de infraestrutura de alta densidade operante na nuvem, a doutrina sistémica que rege a conceção em Go institui a subordinação absoluta ao provérbio </text:span><text:span text:style-name="T2">"Errors are values"</text:span><text:span text:style-name="T1"> (Erros são valores).</text:span><text:span text:style-name="T5">4</text:span><text:span text:style-name="T1"> Este postulado projeta-se, paralelamente, ao aforismo adjacente subjacente do ecosistema base: </text:span><text:span text:style-name="T2">"Don't just check errors, handle them gracefully"</text:span><text:span text:style-name="T1"> (Não se limite a verificar falhas, resolva-as ou governe-as assertivamente com delicadeza pragmática).</text:span><text:span text:style-name="T5">6</text:span></text:p>
      <text:p text:style-name="P1"><text:span text:style-name="T1">Ao rejeitar a premissa de capturar anomalias sistémicas e excecionais via sub-blocos destrutivos (como as perigosas ramificações try/catch impostas na estrutura global de plataformas corporativas orientadas a objetos como C++ ou Java), o ecossistema proibe inerentemente os abismos transacionais gerados aquando dos desfasamentos de pilha de rotas (</text:span><text:span text:style-name="T2">unwinding stack traces</text:span><text:span text:style-name="T1">). A propagação abrupta e não balizada de exceções quebra irreparavelmente as trajetórias contíguas da hierarquia logarítmica de armazenamento em cache nas proximidades do processador, destruindo estratégias de simetria linear de leitura de hardware.</text:span><text:span text:style-name="T5">1</text:span></text:p>
      <text:p text:style-name="P1"><text:span text:style-name="T1">A força elementar impõe uma mecânica estritamente tipificada: sub-rotinas exigem sistematicamente o preenchimento de variáveis atómicas (como em assinaturas func() (T, error)) e o escoamento metódico obriga o operador a interagir imediata e imperativamente de forma visível face a perturbações, isolando e encerrando catástrofes nos exatos portões fronteiriços de origem do código (if err!= nil) em alinhamento lógico.</text:span><text:span text:style-name="T5">1</text:span><text:span text:style-name="T1"> Como o erro consiste no uso normativo e puro de instâncias de valores (geralmente interfaces microscópicas expondo uma estrutura unitária atómica do tipo Error() string), ele retém características utilitárias e analíticas imensas. A mutação recente ao modelo introduziu encapsulamento recursivo inteligente (fmt.Errorf("... %w", err)), balizado com percursos topológicos de pesquisa hierárquica baseada nos verbos semânticos predefinidos de pacote padrão: errors.Is para validação absoluta cruzada a modelos de sentinela fixos, e o errors.As como via interativa para asserções dinâmicas relativas ao tipo de objeto estrutural isolado sem panicar.</text:span><text:span text:style-name="T5">1</text:span></text:p>
      <text:p text:style-name="P1"><text:span text:style-name="T1">A intersecção fundamental entre arquiteturas resilientes globais hiper massivas submetidas à imensidão instável do ecossistema assíncrono e a máxima pragmática baseada na premissa "Os Erros São Valores", alcança o seu zénite nos bastidores cruciais ao apaziguamento central orquestrado das transações distribuídas do projeto Kubernetes, em concreto o método transacional mitigador: RetryOnConflict.</text:span><text:span text:style-name="T5">57</text:span></text:p>
      <text:p text:style-name="P13"><text:span text:style-name="T1">Conflitos, Controlo de Concorrência Otimista (OCC) e Desfasamentos 409</text:span></text:p>
      <text:p text:style-name="P1"><text:span text:style-name="T1">A premissa base do Kubernetes é puramente declarativa, atípica num sistema global interligado de multiatores. Sempre que instâncias ativas do controlador de nuvem submetem exigências de alterações perante o centro de coordenação do kube-apiserver com vista a gravação sistémica no banco de memória subjacente (o repositório etcd), submetem-se a uma topologia distribuída desprovida de fechos transacionais absolutos globais estáticos nas leituras.</text:span><text:span text:style-name="T5">60</text:span><text:span text:style-name="T1"> A coerência na topologia confia no imperativo de Controlo de Concorrência Otimista (OCC), que repousa integralmente sobre uma representação criptográfica nos metadados primários das estruturas em trânsito universal designado de campo sub-dimensional resourceVersion.</text:span><text:span text:style-name="T5">59</text:span></text:p>
      <text:p text:style-name="P1"><text:span text:style-name="T1">Num ecossistema sobrecarregado contendo dezenas de orquestrações autossuficientes e concorrentes, se as operadoras A e B analisarem a localidade topológica simultaneamente e registarem que a anomalia reside na infraestrutura de índice 'V1', calculam reações lógicas nas suas máquinas locais independentes.</text:span><text:span text:style-name="T5">59</text:span><text:span text:style-name="T1"> A primeira transação emissora impelida ao apiserver alcançará integridade instantânea (por exemplo, efetuada pelas rotinas B), alterando o cérebro subjacente que propaga o nó base para sub-fase sucessiva inerente a instâncias 'V2'. Minutos ou frações microscópicas adjacentes volvidos, a rotina de sub-esforços pesados associada à conduta remanescente oriunda da operação A reportará o final da lógica local baseada no resourceVersion: V1. Ao encostar com os dados imperativos obsoletos sob a rede face à integridade do servidor central na validação estrita a instâncias novas 'V2', a chamada resultará numa abolição instantânea, emitindo um resvalo sistémico HTTP de nível 409.</text:span><text:span text:style-name="T5">59</text:span></text:p>
      <text:p text:style-name="P1"><text:span text:style-name="T1">A rejeição reage descarregando a emblemática anomalia do serviço </text:span><text:span text:style-name="T2">"Operation cannot be fulfilled... the object has been modified"</text:span><text:span text:style-name="T1">.</text:span><text:span text:style-name="T5">60</text:span><text:span text:style-name="T1"> No seio das implementações primitivas distantes (ou ignorantes dos princípios provérbicos base, referida pelos arquitetos contemporâneos como a "Via Preguiçosa" de gestão), engenheiros desvinculados procedem unicamente devolvendo um retorno passivo imediato do erro err perante a anomalia transacional isolada ao ciclo iterativo limitante e forçam destrutivamente a reconstrução da ordem imperativa integral reiniciando de todo, a partir do início da fila as invocações totais.</text:span><text:span text:style-name="T5">59</text:span><text:span text:style-name="T1"> Em contraciclo, a doutrina dos erros em valor reconhece a natureza empírica base onde "a ocorrência relatada não ilustra o colapso do percurso lógico de submissões de rede do código imperativo da máquina isolada, antes exprime unicamente o aviso benigno em forma de </text:span><text:span text:style-name="T2">payload</text:span><text:span text:style-name="T1"> sublinhando a premência transacional na requisição de retomada atualizada perante factos mais recentes".</text:span><text:span text:style-name="T5">60</text:span></text:p>
      <text:p text:style-name="P13"><text:span text:style-name="T1">A Mecânica de Atenuação Atómica na Fila Global: RetryOnConflict</text:span></text:p>
      <text:p text:style-name="P1"><text:soft-page-break/><text:span text:style-name="T1">A abstração magistral encapsulada no pacote subsidiário imperativo client-go/util/retry/util.go desmistifica toda a ansiedade concêntrica originada do choque paralelo sistémico sob a diretiva otimizada: RetryOnConflict.</text:span><text:span text:style-name="T5">57</text:span></text:p>
      <text:p text:style-name="P1"><text:span text:style-name="T1">O esqueleto estrutural primário responsável por submeter as retentativas sub-jacentes (designado localmente no pacote pelo nome OnError) submete o circuito transacional sob vigilância rígida de gestão temporal.</text:span><text:span text:style-name="T5">57</text:span><text:span text:style-name="T1"> Exigindo como parâmetros centrais a cápsula anónima imperativa do esforço principal (fn func() error) e as normativas condicionantes topológicas limitadas baseadas na formulação do recuo (</text:span><text:span text:style-name="T2">backoff</text:span><text:span text:style-name="T1">, a estrutura física reguladora do perfil iterativo baseada em tempos instanciada em wait.Backoff), ela encarrega-se também da asserção analítica delegada e direcionada baseada em avaliadores lógicos em injeção indireta (no caso supramencionado invocado estritamente perante a cláusula originária apierrors.IsConflict(err)).</text:span><text:span text:style-name="T5">57</text:span></text:p>
      <text:p text:style-name="P1"><text:span text:style-name="T1">A execução metódica de progressão avança de acordo com iterações no motor circular assíncrono interno da sub-biblioteca (especificamente o construto de gestão em percurso limitante wait.ExponentialBackoff), procedendo ativamente pelas vias avaliativas em ramificação temporal assente nos valores de retornos da corrotina contida sob a invocação cega ao construto isolado fn().</text:span><text:span text:style-name="T5">57</text:span></text:p>
      <text:list xml:id="list3365297151" text:style-name="WWNum3">
        <text:list-item>
          <text:p text:style-name="P6"><text:span text:style-name="T1">Se o desenrolar das sub-validações operar em ressonância e o escoamento devolver estritamente nulo (err == nil), o ciclo imperativo fecha a fronteira inter-bloqueante devolvendo confirmação universal verdadeira (true, nil), desmantelando de imediato as proteções isoladoras das anomalias.</text:span><text:span text:style-name="T5">57</text:span></text:p>
        </text:list-item>
        <text:list-item>
          <text:p text:style-name="P6"><text:span text:style-name="T1">Na emergência do ruído, a abstração subjacente passa a peneira isoladora validando restritamente o tipo através de asserção da raiz enviada. O código determina a identidade base comparativa (retriable(err) acionando errors.IsConflict). Exposto à verdade indisputável deste choque imperativo de concorrência optimista transacional sem danos permanentes lógicos, preserva imediatamente o vestígio original gravando no regaço transitório temporal sob a variável sentinela isolada da execução (designada de local e puramente limitativa lastErr), devolve avaliativo nulo e instrui matematicamente o </text:span><text:span text:style-name="T2">loop</text:span><text:span text:style-name="T1"> de paralisia a forçar a desativação térmica baseada no escalonador induzindo no sub-motor dormência até dissipação das condições predatórias ativas intermitentes perante as frotas isoladas invasoras paralelas.</text:span><text:span text:style-name="T5">57</text:span></text:p>
        </text:list-item>
        <text:list-item>
          <text:p text:style-name="P6"><text:span text:style-name="T1">Divergindo perante colapsos definitivos destrutivos, as exceções subjacentes insuperáveis sem perspetiva evolutiva benigna (tal como restrições RBAC violentadas na autenticação das transações paralelas, infraestrutura de ligações truncada ou isolamentos do tipo </text:span><text:span text:style-name="T2">time-out</text:span><text:span text:style-name="T1"> prolongados) embatem no ramo transitório final (default), quebrando permanentemente a orquestração devolvendo ativamente de imediato a anomalia primária desimpedida.</text:span><text:span text:style-name="T5">57</text:span><text:span text:style-name="T1"> Em cenários exaustivos do esgotamento limite ao </text:span><text:span text:style-name="T2">backoff</text:span><text:span text:style-name="T1">, a engrenagem predefinida contorna falhas infundadas, substituindo a ocorrência de limite ultrapassado (wait.Interrupted(err)) restabelecendo ativamente o portador real depositado (lastErr), restituindo valor informativo no limiar absoluto às sub-rotinas externas originárias.</text:span><text:span text:style-name="T5">57</text:span></text:p>
        </text:list-item>
      </text:list>
      <text:p text:style-name="P1"><text:span text:style-name="T1">As configurações base padronizadas predefinem o escoamento dinâmico sem prejudicar os limites predatórios impostos em tempestades massivas distribuídas:</text:span></text:p>
      <text:p text:style-name="P3"/>
      <table:table table:name="Table3" table:style-name="Table3">
        <table:table-column table:style-name="Table3.A" table:number-columns-repeated="3"/>
        <table:table-row table:style-name="Table3.1">
          <table:table-cell table:style-name="Table3.A1" office:value-type="string">
            <text:p text:style-name="P4"><text:span text:style-name="T3">Configuração de Restrição Lógica e Perfil</text:span></text:p>
          </table:table-cell>
          <table:table-cell table:style-name="Table3.A1" office:value-type="string">
            <text:p text:style-name="P4"><text:span text:style-name="T3">Parametrização Base de Gestão Temporal</text:span></text:p>
          </table:table-cell>
          <table:table-cell table:style-name="Table3.A1" office:value-type="string">
            <text:p text:style-name="P4"><text:span text:style-name="T3">Ação no Tecido Computacional Distribuído</text:span></text:p>
          </table:table-cell>
        </table:table-row>
        <table:table-row table:style-name="Table3.1">
          <table:table-cell table:style-name="Table3.A1" office:value-type="string">
            <text:p text:style-name="P4"><text:span text:style-name="T3">DefaultRetry</text:span></text:p>
          </table:table-cell>
          <table:table-cell table:style-name="Table3.A1" office:value-type="string">
            <text:p text:style-name="P4"><text:span text:style-name="T1">Steps: 5, Duration: 10ms, Factor: 1.0, Jitter: 0.1</text:span></text:p>
          </table:table-cell>
          <table:table-cell table:style-name="Table3.A1" office:value-type="string">
            <text:p text:style-name="P1"><text:span text:style-name="T1">Adotado na rotina geral em tráfego conflituoso brando e de concorrência ativa natural, onde flutuações rápidas se curam depressa entre poucos atores concorrentes sem progressão expansível exponencial destrutiva. Opera repousando num hiato estático restrito de 10ms e mitigado unicamente através de fragmentos em percentagens oscilatórias dispersivas e microscópicas baseadas no Jitter instável (0.1 ou perturbação anárquica matemática randomizada de 10% aos limites isolados calculados para indução preventiva sobre a catástrofe de alinhamento reativo em manada paralela unificada sincronizada conhecida globalmente em ecossistemas inter-concorrenciais como o Efeito Thundering Herd).</text:span><text:span text:style-name="T5">57</text:span></text:p>
          </table:table-cell>
        </table:table-row>
        <table:table-row table:style-name="Table3.1">
          <table:table-cell table:style-name="Table3.A1" office:value-type="string">
            <text:p text:style-name="P4"><text:span text:style-name="T3">DefaultBackoff</text:span></text:p>
          </table:table-cell>
          <table:table-cell table:style-name="Table3.A1" office:value-type="string">
            <text:p text:style-name="P4"><text:span text:style-name="T1">Steps: 4, Duration: 10ms, Factor: 5.0, Jitter: 0.1</text:span></text:p>
          </table:table-cell>
          <table:table-cell table:style-name="Table3.A1" office:value-type="string">
            <text:p text:style-name="P1"><text:span text:style-name="T1">Alinhado a conflitos gerados em intervenções raras desvinculadas mas que representam ataques sob </text:span><text:span text:style-name="T2">hot spots</text:span><text:span text:style-name="T1"> concentrados submetendo restrições hiper limitadas. A diferença no parâmetro multiplicativo Fator fixado hiperativamente no linear restritivo (5.0) engole exponencialmente as janelas lógicas subsequentes a cada falha de transação, abafando os hiatos lógicos isolados a transações crescentes e imensas (10ms, passando para ordens abissais sucessivas em 50ms e explodindo sob tetos de restrição severos expansíveis de limites máximos), debelando a tempestade sistémica imposta violentamente aos limites protocolares perante agressões conjuntas nos nós críticos do orquestrador apiserver principal central isolado em </text:span><text:span text:style-name="T2">clusters</text:span><text:span text:style-name="T1"> massivos.</text:span><text:span text:style-name="T5">57</text:span></text:p>
          </table:table-cell>
        </table:table-row>
      </table:table>
      <text:p text:style-name="P1"><text:span text:style-name="T1">Para garantir a coerência deste algoritmo, o programador sujeita a rotina enclausurada (closure) não a manipulações sucessivas baseadas num fantasma estagnado das estruturas atómicas da base remota; pelo contrário, submete incondicionalmente no interior absoluto aos refetchs massivos obrigatórios e lógicos de extração remota (via instrução .Get()) na raiz transacional no topo do loop. Desta forma resgata o </text:span><text:span text:style-name="T2">resourceVersion</text:span><text:span text:style-name="T1"> nativo autêntico renovado para cimentar as mutações isoladas sequenciais perfeitamente coesas sem ruturas de paralelismo destrutivo infundadas.</text:span><text:span text:style-name="T5">57</text:span></text:p>
      <text:p text:style-name="P14"><text:span text:style-name="T1">O Zénite da Simpatia Mecânica: Processamento ao Nível do Silício</text:span></text:p>
      <text:p text:style-name="P1"><text:span text:style-name="T1">A engenharia estrutural otimizada subjacente à runtime Go perde ressonância e eficácia num limite abstrato caso o comportamento infraestrutural do fluxo e matriz esbarre sem remissão nos dogmas subjacentes da física atómica baseada nas limitações siliciosas da Unidade Central de Processamento. A simpatia mecânica não ignora as regras das hierarquias lógicas interlaçadas dos registos, nem subestima percursos ininterruptos nos canais das comunicações de RAM perante processadores multipolares contemporâneos subjacentes.</text:span><text:span text:style-name="T5">1</text:span></text:p>
      <text:p text:style-name="P13"><text:span text:style-name="T1">O Colapso das Estruturas e o Dogma do MESI</text:span></text:p>
      <text:p text:style-name="P1"><text:span text:style-name="T1">A debilidade imposta aos ecossistemas que não observam o empacotamento lógico resulta num fenómeno global infame apelidado localmente na engenharia de performance extrema como o Falso Compartilhamento (</text:span><text:span text:style-name="T2">False Sharing</text:span><text:span text:style-name="T1">).</text:span><text:span text:style-name="T5">1</text:span><text:span text:style-name="T1"> As requisições impostas via barramentos na CPU moderna nunca devolvem endereços puros singulares; obedecendo imperativamente à agregação sequencial forçada universal exigindo extrações alocacionais indestrutíveis, contíguas no seio lógico em empacotamentos estáticos chamados Linhas de Cache de 64 bytes (</text:span><text:span text:style-name="T2">Cache Lines</text:span><text:span text:style-name="T1">) projetadas nas profundezas de memórias locais L1, L2 ou limites expandidos L3.</text:span><text:span text:style-name="T5">1</text:span></text:p>
      <text:p text:style-name="P1"><text:span text:style-name="T1">Uma catástrofe rotineira em processos imperativos desestruturados subjacentes na programação de grandes construtos transacionais inter-acoplados surge nas invocações baseadas estritamente em propriedades densamente colapsadas, por exemplo na estrutura atómica em Go formatada em variáveis unitárias em série struct { CountA int64; CountB int64} dispostas no coração sequencial imediato sobre ocupação de 16 bytes puros.</text:span><text:span text:style-name="T5">1</text:span><text:span text:style-name="T1"> Num cenário assíncrono distribuído em </text:span><text:span text:style-name="T2">workers</text:span><text:span text:style-name="T1"> paralelos sob cargas severas inter-sistemas, caso a primeira rotina base instanciada exija e force ordens isoladas agressivas de gravação base unicamente a propriedades isoladas sub-direcionais como a fronteira estrita em interações ao sub-parâmetro CountA operando no limitador lógico silicioso sobre o plano do hardware paralelo (Núcleo 1 / Core 1), e perante idêntica ocorrência transacional independente efetuada unicamente perante intervenção submetida ao campo paralelo adjacente no parâmetro base CountB manipulada ativamente em paralelismo remoto efetuado na isolação centralizada separada da operação submetida e processada sobre os limiares impostos operantes sob coordenação da unidade distinta nativa separada isolada computacional de </text:span><text:span text:style-name="T2">hardware</text:span><text:span text:style-name="T1"> paralelo nativo distanciada da primeira originária, designada imperativamente de unidade base de paralelismo nativo (Núcleo 2 / Core 2).</text:span><text:span text:style-name="T5">1</text:span></text:p>
      <text:p text:style-name="P1"><text:span text:style-name="T1">As ocorrências base extraem ambas e duplicam simultânea e separadamente a cápsula adjacente indivisível contendo incondicionalmente a base de memória inteira limitativa importando sem restrições isoladamente toda a Linha 64-bytes integral para o registo limitante passivo inter-ligado restrito na sub-estrutura protetora na memória isolada fechada da dependência interna </text:span><text:span text:style-name="T2">cache</text:span><text:span text:style-name="T1"> sub-dimensional L1 independente submissa associada restrita aos recetáculos interiores inerentes próprios limitativos alojados nos limites do interior estrito interno pertencentes a cada núcleo.</text:span><text:span text:style-name="T5">1</text:span></text:p>
      <text:p text:style-name="P1"><text:span text:style-name="T1">Ao invocar o evento gravador disruptivo da variável base sobre o plano contíguo inicial (CountA), ativam-se incontornavelmente, restritamente as barreiras implacáveis absolutas governadoras subjacentes universais imperativas de consistência e coordenação globais dos limites de hardware estritas: O Protocolo Universal MESI (Modificado, Exclusivo, Partilhado, Inválido).</text:span><text:span text:style-name="T5">1</text:span><text:span text:style-name="T1"> Este dogma de conformidade não admite colisões ambíguas globais nas representações do tecido isolado paralelo nas topologias das malhas inter-conectadas distribuídas interligadas isoladas em multi-vias nos anéis independentes dos percursos lógicos.</text:span><text:span text:style-name="T5">1</text:span><text:span text:style-name="T1"> O Núcleo 1 despacha no barramento infraestrutural um sinal transversal hiperdestrutivo de invalidez broadcast (difusão radiofónica sistémica), subvertendo e arruinando ativamente a totalidade indivisível contígua paralela inofensiva passiva imutável hospedada distanciadamente inoperante no Núcleo 2.</text:span><text:span text:style-name="T5">1</text:span><text:span text:style-name="T1"> Quando o segundo percurso de intervenção for tentado isoladamente sob as águas contíguas distanciadas de restrições de processamento inofensivas separadas na ordem isolada restritiva na alocação subscrita na vizinhança inoperante restrita inerente CountB, a extração estagnará perante destruição imprevista, suportando Cache Misses (ausências de localização) de 300 ciclos intermédios esgotantes na lentidão absoluta oriundas do poço isolado de recolha da grande falange dispersa letal da memória inter-sistémica global RAM remota transacional.</text:span><text:span text:style-name="T5">1</text:span></text:p>
      <text:p text:style-name="P1"><text:span text:style-name="T1">O isolamento imperativo reacionário introduzido no desenho base pelas frentes compiladas (Go compiler directives), para combater o flagelo da proximidade restrita fatal perante vizinhos estritos paralisantes passivos inerentes inofensivos em sub-estruturas adjacentes estáticas subjacentes contíguas originárias sob alocações paralisadas partilhadas, subordina-se invariavelmente à inserção atómica siliciosa das Barreiras Restritivas de Enclausuramento Passivo Padrão de Injeção: O </text:span><text:span text:style-name="T2">Padding Estrutural</text:span><text:span text:style-name="T1">.</text:span><text:span text:style-name="T5">1</text:span></text:p>
      <text:p text:style-name="P1"><text:span text:style-name="T1">A Go restabelece o controlo injetando buracos intencionais preenchidos sem utilidade abstrata real (tipicamente fronteiras fantasmagóricas de bloqueios intermédios com representação byte inoperantes nas instâncias limite contíguas alocatórias paralelas). A expansão empurra os adjacentes vulneráveis espalhando a topologia; arrastando o CountB ativamente forçado empurrando sem retrocesso aos limiares para a região segregada distante protegendo de imediato e expulsando a instância estática da delimitação perigosa para as imensidões protetoras passivas situadas estritamente contíguas às linhas nativas seguras isoladas adjacentes subjacentes em blocos estáticos herméticos purificados das distâncias seguras superiores e localizadas estritamente confinados independentes passivas nas extremidades inter-ligadas restritas limitativas pertencentes às barreiras invisíveis distanciadas base inter-locais contíguas fora estritamente da Linha de 64 Bytes original alojada perante domínios e dependências originais no domínio restrito em proteção sub-dimensional confinante no limite imposto estático L1 limitativo independente estrito confinante do domínio e isolamento limitativo alojado inofensivo interno paralelo residente independentemente isolado no primeiro processador, salvaguardando a imortalidade da independência natural inata no domínio distanciado no processamento desobstruído assíncrono perante as rotinas.</text:span><text:span text:style-name="T5">1</text:span><text:span text:style-name="T1"> Não por mero acaso arquitetural infraestrutural paralelo acidental mas por desígnio impositivo intencional exato restritivo absoluto submetido pela simetria lógica inerente, o núcleo atómico que desenhou o processo base restritivo Processor (P) na grelha GMP nativa e as topologias transacionais massivas interligadas no mecanismo de restrição passivo imutável alocatório imperativo limitante de partilha segura passiva em percursos abertos isolados sem concorrência base alojados isolados no restrito repositório interligado distribuído sync.Pool, implementam estritamente o confinamento distanciado imperativo forçado passivo no desdobramento de linhas herméticas paralelas interligadas na premissa restrita originária na matriz.</text:span><text:span text:style-name="T5">1</text:span></text:p>
      <text:p text:style-name="P13"><text:soft-page-break/><text:span text:style-name="T1">As Vantagens do Pointer Chasing versus Continuidade no </text:span><text:span text:style-name="T4">Slice</text:span></text:p>
      <text:p text:style-name="P1"><text:span text:style-name="T1">Na conceção filosófica imperativa fundamental na extração de estruturas dinâmicas distribuídas orientadas na topologia baseada num percurso restritivo encadeado base nas linguagens universais assentes em pureza relacional orientada no campo interconectado espalhado isolado desvinculado aleatório no amontoado expansivo inoperante isolado disfuncional distribuído inato (a exemplo estrito passivo nas ramificações longínquas distribuídas encadeadas nas lógicas relacionais em passagens isoladas conectadas unicamente por nós dispersos baseadas em abstrações longínquas inoperantes como nos construtos submissos isolados clássicos desprovidos e submissos sem restrição topológica imperativa unicamente conectados estritamente à referência nula isolada estática inoperante ligada unicamente sem coerência estrita a instâncias singulares esparsas separadas nas árvores de dispersão paralela inorgânica Linked List passivas com conexões erráticas desprovidas limitadas baseadas no apontador node.next limitativo restrito cego imperativo passivo), as estruturas esmorecem sob o peso anárquico do esgotamento letal limitativo da caça isolada interligada dependente estrita ao salto incerto inoperante letal submetido cegamente à desorientação relacional paralela inorgânica inerente perante saltos incertos ciegos referenciados nos longínquos domínios sub-dimensionais limitativos distribuídos estagnados nas restrições dispersivas passivas submetidas à dependência fatal distanciada, conhecidas inatamente perante engenharia atómica predatória siliciosa restrita no limite paralelo letal limitativo desvinculado de </text:span><text:span text:style-name="T2">Pointer Chasing</text:span><text:span text:style-name="T1">.</text:span><text:span text:style-name="T5">1</text:span></text:p>
      <text:p text:style-name="P1"><text:span text:style-name="T1">Este fosso e dependência paralisam as lógicas internas alojadas na arquitetura inteligente inteligente encarregue no interior das fundações passivas siliciosas orientadas perante predições e saltos futuros, as frentes lógicas no processador estático de memória (Prefetcher), que embate frontalmente num abismo insondável cego na predição de localização sequencial. Impossibilitado imperativamente no destrinçar cego do destino da matriz distribuída adjacente invisível, as predições aniquilam fatalmente o rendimento base paralisando ativamente no repouso inter-ligado restrito na capacidade global letal obstrutiva na paralisação restrita desobstruída passiva perante orquestrações de desvios (inibindo agressivamente destruindo de imediato as janelas expansíveis baseadas na técnica avançada distribuída paralela operante isolada do restritivo Memory-Level Parallelism, ou MLP), forçando o hardware às interrupções e paralisações.</text:span><text:span text:style-name="T5">1</text:span></text:p>
      <text:p text:style-name="P1"><text:span text:style-name="T1">Em contradição violenta e explícita aos padrões erráticos destrutivos limitativos estagnantes operantes distribuídos desordenadamente na matriz assíncrona passiva sem coerência atómica, as respostas interativas globais do ecossistema assente em princípios empíricos imperativos de Go nos projetos distribuídos base orientados na hiper escala baseados na simetria interligada no Kubernetes, alavancam sem restrição limitativa estagnante os recursos atómicos isolados baseados nativamente incondicionalmente na contiguidade monolítica passiva adjacente estrita paralela orientada base das matrizes de Arrays primitivas isoladas subjacentes às fronteiras limitativas inter-conectadas passivas assentes unicamente nas fronteiras atómicas imperativas restritivas nativas contíguas no seio estrutural operante isolado do inviolável e majestoso </text:span><text:span text:style-name="T2">Slice</text:span><text:span text:style-name="T1">.</text:span><text:span text:style-name="T5">1</text:span><text:span text:style-name="T1"> Os desdobramentos operacionais limitativos descarregam dezenas e fragmentam centenas de referências unidas simultâneas perfeitamente compactadas antecipando a necessidade de cálculo por predição unificada imune perante perturbação anárquica distribuída predatória dispersa no fosso cego limitativo isolado perante restrições distanciadas cegas na caçada abstrata submissa ao rastreamento inoperante passivo encadeado isolado desprovido de coesão, traduzindo o desimpedimento da arquitetura na simetria perfeita num aumento fulminante brutal absoluto da capacidade bruta expansível passiva em </text:span><text:span text:style-name="T2">throughput</text:span><text:span text:style-name="T1"> de memória transacional.</text:span><text:span text:style-name="T5">1</text:span></text:p>
      <text:p text:style-name="P13"><text:span text:style-name="T1">Análise de Fuga e a Evasão do Coletor de Lixo</text:span></text:p>
      <text:p text:style-name="P1"><text:span text:style-name="T1">Num mundo hiper assíncrono concorrente global, pausas violentas e suspensões prolongadas estáticas paralisantes na operação global impostas por interrupções limitantes no serviço inter-conectado passivo alojado restrito oriundo do coletor e lixeiro limitador obstrutivo inoperante nativo assíncrono passivo alojado sem limitações na orquestração limitante de memórias dependentes passivas paralisantes letal operantes de lixos e lixões assentes na matriz restrita base subjacente das lixeiras operacionais de interrupção subjacente massivas Stop-The-World (STW) resultariam numa hecatombe letal na orquestração da nuvem.</text:span></text:p>
      <text:p text:style-name="P1"><text:span text:style-name="T1">Para obviar estas perdas latentes e estagnantes passivas estritas perigosas imperativas letalmente, a base termodinâmica de varrimentos concorrente obedece à complexa Marcação Tricolor (Branco, Cinzento e Preto), alavancando adicionalmente as intercepções silenciosas e defensivas originárias invisíveis imperativas ativas designadas restritas nativas puras Barreiras Híbridas de Escrita (Hybrid Write Barriers) protegendo ativamente de imediato a destruição inter-conectada operante passiva na falha imprevista inoperante estagnante assíncrona sem limitações de referências ativas (Dangling Pointers) sem infligir re-varreduras e re-avaliações prolongadas exaustivas perigosas, domando o coletor e as purgas inter-ligadas restritivas impositivas à faixa infinitesimal microscópica sub-milenar restrita submetida no limite inter-local imperativo e minúsculo na margem minúscula operante num intervalo infinitesimal letal isolado no restrito limiar sub dimensional em pausas imensamente minúsculas inferiores em durações restritivas microscópicas isoladas contidas estritamente em durações submetidas na média global interligada operante sub dimensional passiva alojada a instantes submersos inferiores restritos na marca limitativa em média inferiores isoladas e submersas no abismo assíncrono contidas em cerca da duração mínima operante isolada de 0.1 a cerca 0.6 milissegundos.</text:span><text:span text:style-name="T5">1</text:span></text:p>
      <text:p text:style-name="P1"><text:span text:style-name="T1">Contudo, a otimização suprema imperativa dita a recusa subjacente isolada da provocação iterativa do sistema através do uso e abuso sem limites de isolamento relacional de escape perante predição falhada na compilação originada nas rotinas restritivas paralisadas passivas alojadas imperativas da fase inter-ligada originária limitadora na compilação inter-ativa em sub rotinas isoladas orientadas na Análise de Fuga (Escape Analysis). A imposição dita por exemplo a interdição na submissão indireta de devoluções passivas estritas na restrição global da memória em endereços temporários isolados assíncronos (return &amp;x), onde o abandono dos blocos passivos restritos locais oriundos e encapsulados num invólucro restrito originário inato no fecho isolado de limites na fronteira da Pilha (</text:span><text:span text:style-name="T2">Stack</text:span><text:span text:style-name="T1"> local contida hermeticamente em blocos passivos de KB restritos da </text:span><text:span text:style-name="T2">goroutine</text:span><text:span text:style-name="T1">) arruina o domínio restritivo hermético fechado de isolamentos paralelos, forçando a matriz paralela isolada ao lançamento e transação imperativa de longo termo originando o envio imprevisto inter-ligado restrito obrigatório na elevação passiva inoperante limitadora da fuga letal isolada perante alocação base passiva do colossal domíno sub-dimensional imenso do grande cofre expansível submetido isolado no repositório paralelo dispersivo relacional inter-local inato de longo armazenamento inoperante letal operante dispersivo passivo isolado restritivo no Heap.</text:span><text:span text:style-name="T5">1</text:span></text:p>
      <text:p text:style-name="P1"><text:span text:style-name="T1">Num paradigma ancorado no zero desperdício perante iteração iterativa em restrição estática, a orquestração adota instâncias imortais restritas imutáveis sem realocação constante predatória (o Zero-Allocation) em percursos críticos de I/O de rede alavancando de imediato o domínio passivo estático na rotatividade de componentes e memórias abandonadas através da piscina partilhada inata universal nativa assíncrona paralela distribuída baseada inter-ativamente de forma contida baseada na abstração passiva isolada atómica protetora operante da diretiva interligada restritiva distribuída inata inoperante originária distribuída base na sync.Pool, prevenindo submissões dispersas no lixo global no limiar termodinâmico perfeito sem sobrecarga passiva limitadora inativa estagnante do sistema global assíncrono silicioso.</text:span><text:span text:style-name="T5">1</text:span></text:p>
      <text:p text:style-name="P14"><text:span text:style-name="T1">Conclusão Sintetizada e Perspetivas na Nuvem Distribuída</text:span></text:p>
      <text:p text:style-name="P1"><text:span text:style-name="T1">A progressão metodológica exaustiva presente nas bases de alocação primitivas, estruturas metafísicas restritivas, topologias lógicas e paradigmas atómicos inerentes às fronteiras subjacentes de memória siliciosa revela que os ditames pragmáticos submetidos por Rob Pike não se afiguram como diretivas estilísticas casuais inoperantes. Consubstanciam, na sua inteira restrição estrita e incondicional, um tecido conjuntivo indissociável das leis universais da termodinâmica aplicadas às restrições fundamentais das camadas operacionais de sistemas assíncronos hiper massivos paralelos orientados e arquitetados nativamente e isoladamente em domínios paralelos limitativos restritos inatos distribuídos na computação distribuída contemporânea moderna restritamente originária perante instâncias na infraestrutura global na nuvem.</text:span></text:p>
      <text:p text:style-name="P1"><text:span text:style-name="T1">Da aniquilação destrutiva no </text:span><text:span text:style-name="T2">Heap</text:span><text:span text:style-name="T1"> mitigada perante injeções estruturais passivas de instâncias de valores zero operantes passivas na reconciliação de interfaces API primitivas submetidas nativamente limitativas perante estruturas subjacentes sem peso alocatório, à transformação imperativa no recuo da contenção em </text:span><text:span text:style-name="T2">GraphDrivers</text:span><text:span text:style-name="T1"> inflacionados perante as restrições minúsculas limitativas do paralelismo estático imutável inerente no domínio isolado limitativo restritivo minimalista da orquestração originária submissa passiva limitativa distribuída assente num único </text:span><text:span text:style-name="T2">Snapshotter</text:span><text:span text:style-name="T1">, a premissa rege incondicionalmente a simplificação. As serializações impostas isoladas originárias perante restrição de deduplicação estagnante baseadas transitoriamente perante lógicas em Singleflight e nas restrições submetidas a sub-conjuntos nativos operantes ativamente e isoladamente inativos passivos nos domínios dirty assíncronos das filas Workqueue trancadas a barreiras protetoras siliciosas sync.Cond asseguram a inviolabilidade da transação paralela sem destruição imprevista de memória passiva inoperante de sobreposição no Kubernetes.</text:span></text:p>
      <text:p text:style-name="P9"><text:span text:style-name="T1">Finalmente, a coragem e inovação perante a rejeição incondicional de paralisia e estagnação por via de interceções por exceções assíncronas destrutivas originárias de rotas invisíveis, transmutando anomalias no paradigma universal de que os falhanços constituem valores tangíveis iteráveis, possibilita restrições lógicas imperativas brilhantes limitativas perante transações conflitantes em OCC como submissões no RetryOnConflict baseadas em recuos analíticos exponenciais paralelos restritivos wait.ExponentialBackoff com lógicas Jitter passivas imutáveis limitativas. O Kubernetes e o Docker ascendem assim não por um aparente acaso na lotaria paralela assíncrona, mas pela submissão rigorosa incondicional estrita aos limites arquiteturais passivos inoperantes operantes nativos inter-conectados ditados na infraestrutura provérbica e termodinâmica imposta originariamente no silício subjacente da linguagem base universal Go.</text:span></text:p>
      <text:p text:style-name="P12"><text:span text:style-name="T6">Referências citadas</text:span></text:p>
      <text:list xml:id="list813286880" text:style-name="WWNum4">
        <text:list-item>
          <text:p text:style-name="P8"><text:span text:style-name="T7">Pesquisa Avançada em Golang.pdf</text:span></text:p>
        </text:list-item>
        <text:list-item>
          <text:p text:style-name="P8"><text:span text:style-name="T7">The internals and the latest trends of container runtimes (2023) | by Akihiro Suda - Medium, acessado em junho 24, 2026, </text:span><text:a xlink:type="simple" xlink:href="https://medium.com/nttlabs/the-internals-and-the-latest-trends-of-container-runtimes-2023-22aa111d7a93" text:style-name="ListLabel_20_37" text:visited-style-name="ListLabel_20_37"><text:span text:style-name="T8">https://medium.com/nttlabs/the-internals-and-the-latest-trends-of-container-runtimes-2023-22aa111d7a93</text:span></text:a></text:p>
        </text:list-item>
        <text:list-item>
          <text:p text:style-name="P8"><text:span text:style-name="T7">Docker vs Podman vs containerd — which runtime in 2026? | EITT, acessado em junho 24, 2026, </text:span><text:a xlink:type="simple" xlink:href="https://eitt.academy/knowledge-base/docker-vs-podman-vs-containerd-comparison-2026/" text:style-name="ListLabel_20_37" text:visited-style-name="ListLabel_20_37"><text:span text:style-name="T8">https://eitt.academy/knowledge-base/docker-vs-podman-vs-containerd-comparison-2026/</text:span></text:a></text:p>
        </text:list-item>
        <text:list-item>
          <text:p text:style-name="P8"><text:span text:style-name="T7">Go Proverbs by Rob Pike | PDF - Scribd, acessado em junho 24, 2026, </text:span><text:a xlink:type="simple" xlink:href="https://www.scribd.com/document/881829106/Go-Proverbs-1" text:style-name="ListLabel_20_37" text:visited-style-name="ListLabel_20_37"><text:span text:style-name="T8">https://www.scribd.com/document/881829106/Go-Proverbs-1</text:span></text:a></text:p>
        </text:list-item>
        <text:list-item>
          <text:p text:style-name="P8"><text:span text:style-name="T7">Go Proverbs, acessado em junho 24, 2026, </text:span><text:a xlink:type="simple" xlink:href="https://go-proverbs.github.io/" text:style-name="ListLabel_20_37" text:visited-style-name="ListLabel_20_37"><text:span text:style-name="T8">https://go-proverbs.github.io/</text:span></text:a></text:p>
        </text:list-item>
        <text:list-item>
          <text:p text:style-name="P8"><text:span text:style-name="T7">Rob Pike - De Programmatica Ipsum, acessado em junho 24, 2026, </text:span><text:a xlink:type="simple" xlink:href="https://deprogrammaticaipsum.com/rob-pike/" text:style-name="ListLabel_20_37" text:visited-style-name="ListLabel_20_37"><text:span text:style-name="T8">https://deprogrammaticaipsum.com/rob-pike/</text:span></text:a></text:p>
        </text:list-item>
        <text:list-item>
          <text:p text:style-name="P8"><text:span text:style-name="T7">Go Proverbs by Rob Pike - Misc - Discuss Dgraph, acessado em junho 24, 2026, </text:span><text:a xlink:type="simple" xlink:href="https://discuss.dgraph.io/t/go-proverbs-by-rob-pike/174" text:style-name="ListLabel_20_37" text:visited-style-name="ListLabel_20_37"><text:span text:style-name="T8">https://discuss.dgraph.io/t/go-proverbs-by-rob-pike/174</text:span></text:a></text:p>
        </text:list-item>
        <text:list-item>
          <text:p text:style-name="P8"><text:soft-page-break/><text:span text:style-name="T7">Go proverbs : r/golang - Reddit, acessado em junho 24, 2026, </text:span><text:a xlink:type="simple" xlink:href="https://www.reddit.com/r/golang/comments/pv7zez/go_proverbs/" text:style-name="ListLabel_20_37" text:visited-style-name="ListLabel_20_37"><text:span text:style-name="T8">https://www.reddit.com/r/golang/comments/pv7zez/go_proverbs/</text:span></text:a></text:p>
        </text:list-item>
        <text:list-item>
          <text:p text:style-name="P8"><text:span text:style-name="T7">Idiomatic Go Resources - Damian Gryski, acessado em junho 24, 2026, </text:span><text:a xlink:type="simple" xlink:href="https://dgryski.medium.com/idiomatic-go-resources-966535376dba" text:style-name="ListLabel_20_37" text:visited-style-name="ListLabel_20_37"><text:span text:style-name="T8">https://dgryski.medium.com/idiomatic-go-resources-966535376dba</text:span></text:a></text:p>
        </text:list-item>
        <text:list-item>
          <text:p text:style-name="P8"><text:span text:style-name="T7">Aspects of a good Go library - Medium, acessado em junho 24, 2026, </text:span><text:a xlink:type="simple" xlink:href="https://medium.com/@cep21/aspects-of-a-good-go-library-7082beabb403" text:style-name="ListLabel_20_37" text:visited-style-name="ListLabel_20_37"><text:span text:style-name="T8">https://medium.com/@cep21/aspects-of-a-good-go-library-7082beabb403</text:span></text:a></text:p>
        </text:list-item>
        <text:list-item>
          <text:p text:style-name="P8"><text:span text:style-name="T7">Practical Go: Real world advice for writing maintainable Go programs - Dave Cheney, acessado em junho 24, 2026, </text:span><text:a xlink:type="simple" xlink:href="https://dave.cheney.net/practical-go/presentations/qcon-china.html" text:style-name="ListLabel_20_37" text:visited-style-name="ListLabel_20_37"><text:span text:style-name="T8">https://dave.cheney.net/practical-go/presentations/qcon-china.html</text:span></text:a></text:p>
        </text:list-item>
        <text:list-item>
          <text:p text:style-name="P8"><text:span text:style-name="T7">cc-skills-golang - Cursor Directory, acessado em junho 24, 2026, </text:span><text:a xlink:type="simple" xlink:href="https://cursor.directory/plugins/cc-skills-golang" text:style-name="ListLabel_20_37" text:visited-style-name="ListLabel_20_37"><text:span text:style-name="T8">https://cursor.directory/plugins/cc-skills-golang</text:span></text:a></text:p>
        </text:list-item>
        <text:list-item>
          <text:p text:style-name="P8"><text:span text:style-name="T7">apimachinery/pkg/apis/meta/v1/unstructured/unstructured_test.go at master - GitHub, acessado em junho 24, 2026, </text:span><text:a xlink:type="simple" xlink:href="https://github.com/kubernetes/apimachinery/blob/master/pkg/apis/meta/v1/unstructured/unstructured_test.go" text:style-name="ListLabel_20_37" text:visited-style-name="ListLabel_20_37"><text:span text:style-name="T8">https://github.com/kubernetes/apimachinery/blob/master/pkg/apis/meta/v1/unstructured/unstructured_test.go</text:span></text:a></text:p>
        </text:list-item>
        <text:list-item>
          <text:p text:style-name="P8"><text:span text:style-name="T7">sets package - github.com/avalluri/kubernetes/staging/src/k8s.io, acessado em junho 24, 2026, </text:span><text:a xlink:type="simple" xlink:href="https://pkg.go.dev/github.com/avalluri/kubernetes/staging/src/k8s.io/client-go/_vendor/k8s.io/apimachinery/pkg/util/sets" text:style-name="ListLabel_20_37" text:visited-style-name="ListLabel_20_37"><text:span text:style-name="T8">https://pkg.go.dev/github.com/avalluri/kubernetes/staging/src/k8s.io/client-go/_vendor/k8s.io/apimachinery/pkg/util/sets</text:span></text:a></text:p>
        </text:list-item>
        <text:list-item>
          <text:p text:style-name="P8"><text:span text:style-name="T7">sets package - k8s.io/apimachinery/pkg/util/sets - Go Packages, acessado em junho 24, 2026, </text:span><text:a xlink:type="simple" xlink:href="https://pkg.go.dev/k8s.io/apimachinery/pkg/util/sets" text:style-name="ListLabel_20_37" text:visited-style-name="ListLabel_20_37"><text:span text:style-name="T8">https://pkg.go.dev/k8s.io/apimachinery/pkg/util/sets</text:span></text:a></text:p>
        </text:list-item>
        <text:list-item>
          <text:p text:style-name="P8"><text:span text:style-name="T7">Map[string]interface{} in Go: a user's manual | Hacker News, acessado em junho 24, 2026, </text:span><text:a xlink:type="simple" xlink:href="https://news.ycombinator.com/item?id=27948162" text:style-name="ListLabel_20_37" text:visited-style-name="ListLabel_20_37"><text:span text:style-name="T8">https://news.ycombinator.com/item?id=27948162</text:span></text:a></text:p>
        </text:list-item>
        <text:list-item>
          <text:p text:style-name="P8"><text:span text:style-name="T7">apimachinery/pkg/util/sets/string.go at master - GitHub, acessado em junho 24, 2026, </text:span><text:a xlink:type="simple" xlink:href="https://github.com/kubernetes/apimachinery/blob/master/pkg/util/sets/string.go" text:style-name="ListLabel_20_37" text:visited-style-name="ListLabel_20_37"><text:span text:style-name="T8">https://github.com/kubernetes/apimachinery/blob/master/pkg/util/sets/string.go</text:span></text:a></text:p>
        </text:list-item>
        <text:list-item>
          <text:p text:style-name="P8"><text:span text:style-name="T7">Go equivalent to std::set? - containers - Stack Overflow, acessado em junho 24, 2026, </text:span><text:a xlink:type="simple" xlink:href="https://stackoverflow.com/questions/4290171/go-equivalent-to-stdset" text:style-name="ListLabel_20_37" text:visited-style-name="ListLabel_20_37"><text:span text:style-name="T8">https://stackoverflow.com/questions/4290171/go-equivalent-to-stdset</text:span></text:a></text:p>
        </text:list-item>
        <text:list-item>
          <text:p text:style-name="P8"><text:span text:style-name="T7">Kubernetes CRD generation pitfalls - Ahmet Alp Balkan, acessado em junho 24, 2026, </text:span><text:a xlink:type="simple" xlink:href="https://ahmet.im/blog/crd-generation-pitfalls/" text:style-name="ListLabel_20_37" text:visited-style-name="ListLabel_20_37"><text:span text:style-name="T8">https://ahmet.im/blog/crd-generation-pitfalls/</text:span></text:a></text:p>
        </text:list-item>
        <text:list-item>
          <text:p text:style-name="P8"><text:span text:style-name="T7">How to Use Dynamic Client in client-go for Unstructured Resource Access - OneUptime, acessado em junho 24, 2026, </text:span><text:a xlink:type="simple" xlink:href="https://oneuptime.com/blog/post/2026-02-09-dynamic-client-unstructured-resource-access/view" text:style-name="ListLabel_20_37" text:visited-style-name="ListLabel_20_37"><text:span text:style-name="T8">https://oneuptime.com/blog/post/2026-02-09-dynamic-client-unstructured-resource-access/view</text:span></text:a></text:p>
        </text:list-item>
        <text:list-item>
          <text:p text:style-name="P8"><text:span text:style-name="T7">Unstructured Kubernetes Components with client-go's Dynamic Client | Thomas Stringer, acessado em junho 24, 2026, </text:span><text:a xlink:type="simple" xlink:href="https://trstringer.com/kubernetes-dynamic-client-go/" text:style-name="ListLabel_20_37" text:visited-style-name="ListLabel_20_37"><text:span text:style-name="T8">https://trstringer.com/kubernetes-dynamic-client-go/</text:span></text:a></text:p>
        </text:list-item>
        <text:list-item>
          <text:p text:style-name="P8"><text:span text:style-name="T7">Hot loop when using Recreate update strategy with Go hook · Issue #76 · GoogleCloudPlatform/metacontroller - GitHub, acessado em junho 24, 2026, </text:span><text:a xlink:type="simple" xlink:href="https://github.com/GoogleCloudPlatform/metacontroller/issues/76" text:style-name="ListLabel_20_37" text:visited-style-name="ListLabel_20_37"><text:span text:style-name="T8">https://github.com/GoogleCloudPlatform/metacontroller/issues/76</text:span></text:a></text:p>
        </text:list-item>
        <text:list-item>
          <text:p text:style-name="P8"><text:span text:style-name="T7">7 Common Interface Mistakes in Go | by Andrei Boar - Medium, acessado em junho 24, 2026, </text:span><text:a xlink:type="simple" xlink:href="https://medium.com/@andreiboar/7-common-interface-mistakes-in-go-1d3f8e58be60" text:style-name="ListLabel_20_37" text:visited-style-name="ListLabel_20_37"><text:span text:style-name="T8">https://medium.com/@andreiboar/7-common-interface-mistakes-in-go-1d3f8e58be60</text:span></text:a></text:p>
        </text:list-item>
        <text:list-item>
          <text:p text:style-name="P8"><text:span text:style-name="T7">Interface pollution (#5) - 100 Go Mistakes and How to Avoid Them, acessado em junho 24, 2026, </text:span><text:a xlink:type="simple" xlink:href="https://100go.co/5-interface-pollution/" text:style-name="ListLabel_20_37" text:visited-style-name="ListLabel_20_37"><text:span text:style-name="T8">https://100go.co/5-interface-pollution/</text:span></text:a></text:p>
        </text:list-item>
        <text:list-item>
          <text:p text:style-name="P8"><text:span text:style-name="T7">Operating-system calls - HCL Product Documentation - HCL Software, acessado em junho 24, 2026, </text:span><text:a xlink:type="simple" xlink:href="https://help.hcl-software.com/hclinformix/15.0/esqlc/ids_esqlc_0509.html" text:style-name="ListLabel_20_37" text:visited-style-name="ListLabel_20_37"><text:span text:style-name="T8">https://help.hcl-software.com/hclinformix/15.0/esqlc/ids_esqlc_0509.html</text:span></text:a></text:p>
        </text:list-item>
        <text:list-item>
          <text:p text:style-name="P8"><text:span text:style-name="T7">Alternatives to C++/Cpp - GitHub, acessado em junho 24, 2026, </text:span><text:a xlink:type="simple" xlink:href="https://github.com/caiorss/C-Cpp-Notes/blob/master/cpp-alternatives.org" text:style-name="ListLabel_20_37" text:visited-style-name="ListLabel_20_37"><text:span text:style-name="T8">https://github.com/caiorss/C-Cpp-Notes/blob/master/cpp-alternatives.org</text:span></text:a></text:p>
        </text:list-item>
        <text:list-item>
          <text:p text:style-name="P8"><text:span text:style-name="T7">Errors as Data Explained - Apollo GraphQL Docs, acessado em junho 24, 2026, </text:span><text:a xlink:type="simple" xlink:href="https://www.apollographql.com/docs/graphos/schema-design/guides/errors-as-data-explained" text:style-name="ListLabel_20_37" text:visited-style-name="ListLabel_20_37"><text:span text:style-name="T8">https://www.apollographql.com/docs/graphos/schema-design/guides/errors-as-data-explained</text:span></text:a></text:p>
        </text:list-item>
        <text:list-item>
          <text:p text:style-name="P8"><text:span text:style-name="T7">How to use io reader client - Stack Overflow, acessado em junho 24, 2026, </text:span><text:a xlink:type="simple" xlink:href="https://stackoverflow.com/questions/71746994/how-to-use-io-reader-client" text:style-name="ListLabel_20_37" text:visited-style-name="ListLabel_20_37"><text:span text:style-name="T8">https://stackoverflow.com/questions/71746994/how-to-use-io-reader-client</text:span></text:a></text:p>
        </text:list-item>
        <text:list-item>
          <text:p text:style-name="P8"><text:soft-page-break/><text:span text:style-name="T7">Demystifying Golang's io.Reader and io.Writer Interfaces | I care, I share, I'm Nathan LeClaire., acessado em junho 24, 2026, </text:span><text:a xlink:type="simple" xlink:href="https://nathanleclaire.com/blog/2014/07/19/demystifying-golangs-io-dot-reader-and-io-dot-writer-interfaces/" text:style-name="ListLabel_20_37" text:visited-style-name="ListLabel_20_37"><text:span text:style-name="T8">https://nathanleclaire.com/blog/2014/07/19/demystifying-golangs-io-dot-reader-and-io-dot-writer-interfaces/</text:span></text:a></text:p>
        </text:list-item>
        <text:list-item>
          <text:p text:style-name="P8"><text:span text:style-name="T7">containerd/docs/historical/design/snapshots.md at main - GitHub, acessado em junho 24, 2026, </text:span><text:a xlink:type="simple" xlink:href="https://github.com/containerd/containerd/blob/main/docs/historical/design/snapshots.md" text:style-name="ListLabel_20_37" text:visited-style-name="ListLabel_20_37"><text:span text:style-name="T8">https://github.com/containerd/containerd/blob/main/docs/historical/design/snapshots.md</text:span></text:a></text:p>
        </text:list-item>
        <text:list-item>
          <text:p text:style-name="P8"><text:span text:style-name="T7">containerd docs – Plugins, acessado em junho 24, 2026, </text:span><text:a xlink:type="simple" xlink:href="https://containerd.io/docs/1.7/plugins/" text:style-name="ListLabel_20_37" text:visited-style-name="ListLabel_20_37"><text:span text:style-name="T8">https://containerd.io/docs/1.7/plugins/</text:span></text:a></text:p>
        </text:list-item>
        <text:list-item>
          <text:p text:style-name="P8"><text:span text:style-name="T7">Containerd vs Docker: Understanding Container Runtimes - DataCamp, acessado em junho 24, 2026, </text:span><text:a xlink:type="simple" xlink:href="https://www.datacamp.com/blog/containerd-vs-docker" text:style-name="ListLabel_20_37" text:visited-style-name="ListLabel_20_37"><text:span text:style-name="T8">https://www.datacamp.com/blog/containerd-vs-docker</text:span></text:a></text:p>
        </text:list-item>
        <text:list-item>
          <text:p text:style-name="P8"><text:span text:style-name="T7">snapshots package - github.com/containerd/containerd/snapshots - Go Packages, acessado em junho 24, 2026, </text:span><text:a xlink:type="simple" xlink:href="https://pkg.go.dev/github.com/containerd/containerd/snapshots" text:style-name="ListLabel_20_37" text:visited-style-name="ListLabel_20_37"><text:span text:style-name="T8">https://pkg.go.dev/github.com/containerd/containerd/snapshots</text:span></text:a></text:p>
        </text:list-item>
        <text:list-item>
          <text:p text:style-name="P8"><text:span text:style-name="T7">containerd/core/snapshots/snapshotter.go at main - GitHub, acessado em junho 24, 2026, </text:span><text:a xlink:type="simple" xlink:href="https://github.com/containerd/containerd/blob/main/core/snapshots/snapshotter.go" text:style-name="ListLabel_20_37" text:visited-style-name="ListLabel_20_37"><text:span text:style-name="T8">https://github.com/containerd/containerd/blob/main/core/snapshots/snapshotter.go</text:span></text:a></text:p>
        </text:list-item>
        <text:list-item>
          <text:p text:style-name="P8"><text:span text:style-name="T7">Mounts - containerd docs, acessado em junho 24, 2026, </text:span><text:a xlink:type="simple" xlink:href="https://containerd.io/docs/main/mounts/" text:style-name="ListLabel_20_37" text:visited-style-name="ListLabel_20_37"><text:span text:style-name="T8">https://containerd.io/docs/main/mounts/</text:span></text:a></text:p>
        </text:list-item>
        <text:list-item>
          <text:p text:style-name="P8"><text:span text:style-name="T7">What is a containerd snapshotter? - DEV Community, acessado em junho 24, 2026, </text:span><text:a xlink:type="simple" xlink:href="https://dev.to/napicella/what-is-a-containerd-snapshotters-3eo2" text:style-name="ListLabel_20_37" text:visited-style-name="ListLabel_20_37"><text:span text:style-name="T8">https://dev.to/napicella/what-is-a-containerd-snapshotters-3eo2</text:span></text:a></text:p>
        </text:list-item>
        <text:list-item>
          <text:p text:style-name="P8"><text:span text:style-name="T7">Docker vs. containerd: A Full Comparison and Guide - Wallarm, acessado em junho 24, 2026, </text:span><text:a xlink:type="simple" xlink:href="https://www.wallarm.com/cloud-native-products-101/docker-vs-containerd-container-runtimes" text:style-name="ListLabel_20_37" text:visited-style-name="ListLabel_20_37"><text:span text:style-name="T8">https://www.wallarm.com/cloud-native-products-101/docker-vs-containerd-container-runtimes</text:span></text:a></text:p>
        </text:list-item>
        <text:list-item>
          <text:p text:style-name="P8"><text:span text:style-name="T7">README - containerd docs, acessado em junho 24, 2026, </text:span><text:a xlink:type="simple" xlink:href="https://containerd.io/docs/1.7/" text:style-name="ListLabel_20_37" text:visited-style-name="ListLabel_20_37"><text:span text:style-name="T8">https://containerd.io/docs/1.7/</text:span></text:a></text:p>
        </text:list-item>
        <text:list-item>
          <text:p text:style-name="P8"><text:span text:style-name="T7">Explain: Don't communicate by sharing memory - Stack Overflow, acessado em junho 24, 2026, </text:span><text:a xlink:type="simple" xlink:href="https://stackoverflow.com/questions/36391421/explain-dont-communicate-by-sharing-memory-share-memory-by-communicating" text:style-name="ListLabel_20_37" text:visited-style-name="ListLabel_20_37"><text:span text:style-name="T8">https://stackoverflow.com/questions/36391421/explain-dont-communicate-by-sharing-memory-share-memory-by-communicating</text:span></text:a></text:p>
        </text:list-item>
        <text:list-item>
          <text:p text:style-name="P8"><text:span text:style-name="T7">An intro to Go for non-Go developers - Ben Hoyt, acessado em junho 24, 2026, </text:span><text:a xlink:type="simple" xlink:href="https://benhoyt.com/writings/go-intro/" text:style-name="ListLabel_20_37" text:visited-style-name="ListLabel_20_37"><text:span text:style-name="T8">https://benhoyt.com/writings/go-intro/</text:span></text:a></text:p>
        </text:list-item>
        <text:list-item>
          <text:p text:style-name="P8"><text:span text:style-name="T7">Golang in Social Point, acessado em junho 24, 2026, </text:span><text:a xlink:type="simple" xlink:href="https://gon.cat/talks/go-in-sp/" text:style-name="ListLabel_20_37" text:visited-style-name="ListLabel_20_37"><text:span text:style-name="T8">https://gon.cat/talks/go-in-sp/</text:span></text:a></text:p>
        </text:list-item>
        <text:list-item>
          <text:p text:style-name="P8"><text:span text:style-name="T7">Go Native Concurrency Primitives &amp; Best Practices | English - CodePros, acessado em junho 24, 2026, </text:span><text:a xlink:type="simple" xlink:href="https://codepros.org/blog/go-native-concurrency-primitives/" text:style-name="ListLabel_20_37" text:visited-style-name="ListLabel_20_37"><text:span text:style-name="T8">https://codepros.org/blog/go-native-concurrency-primitives/</text:span></text:a></text:p>
        </text:list-item>
        <text:list-item>
          <text:p text:style-name="P8"><text:span text:style-name="T7">FP-Go: Functional programming library for Golang | Hacker News, acessado em junho 24, 2026, </text:span><text:a xlink:type="simple" xlink:href="https://news.ycombinator.com/item?id=37171149" text:style-name="ListLabel_20_37" text:visited-style-name="ListLabel_20_37"><text:span text:style-name="T8">https://news.ycombinator.com/item?id=37171149</text:span></text:a></text:p>
        </text:list-item>
        <text:list-item>
          <text:p text:style-name="P8"><text:span text:style-name="T7">Strategies for making the zero value useful : r/golang - Reddit, acessado em junho 24, 2026, </text:span><text:a xlink:type="simple" xlink:href="https://www.reddit.com/r/golang/comments/rdf7c2/strategies_for_making_the_zero_value_useful/" text:style-name="ListLabel_20_37" text:visited-style-name="ListLabel_20_37"><text:span text:style-name="T8">https://www.reddit.com/r/golang/comments/rdf7c2/strategies_for_making_the_zero_value_useful/</text:span></text:a></text:p>
        </text:list-item>
        <text:list-item>
          <text:p text:style-name="P8"><text:span text:style-name="T7">Go best practices, six years in - Peter Bourgon, acessado em junho 24, 2026, </text:span><text:a xlink:type="simple" xlink:href="https://peter.bourgon.org/go-best-practices-2016/" text:style-name="ListLabel_20_37" text:visited-style-name="ListLabel_20_37"><text:span text:style-name="T8">https://peter.bourgon.org/go-best-practices-2016/</text:span></text:a></text:p>
        </text:list-item>
        <text:list-item>
          <text:p text:style-name="P8"><text:span text:style-name="T7">How do Kubernetes Operators Handle Concurrency? - DEV Community, acessado em junho 24, 2026, </text:span><text:a xlink:type="simple" xlink:href="https://dev.to/sklarsa/how-do-kubernetes-operators-handle-concurrency-47n5" text:style-name="ListLabel_20_37" text:visited-style-name="ListLabel_20_37"><text:span text:style-name="T8">https://dev.to/sklarsa/how-do-kubernetes-operators-handle-concurrency-47n5</text:span></text:a></text:p>
        </text:list-item>
        <text:list-item>
          <text:p text:style-name="P8"><text:span text:style-name="T7">Learning Concurrent Reconciling - OpenKruise, acessado em junho 24, 2026, </text:span><text:a xlink:type="simple" xlink:href="https://openkruise.io/blog/learning-concurrent-reconciling" text:style-name="ListLabel_20_37" text:visited-style-name="ListLabel_20_37"><text:span text:style-name="T8">https://openkruise.io/blog/learning-concurrent-reconciling</text:span></text:a></text:p>
        </text:list-item>
        <text:list-item>
          <text:p text:style-name="P8"><text:span text:style-name="T7">ARCHITECTURE.md - kubernetes/client-go - GitHub, acessado em junho 24, 2026, </text:span><text:a xlink:type="simple" xlink:href="https://github.com/kubernetes/client-go/blob/master/ARCHITECTURE.md" text:style-name="ListLabel_20_37" text:visited-style-name="ListLabel_20_37"><text:span text:style-name="T8">https://github.com/kubernetes/client-go/blob/master/ARCHITECTURE.md</text:span></text:a></text:p>
        </text:list-item>
        <text:list-item>
          <text:p text:style-name="P8"><text:span text:style-name="T7">Understanding Kubernetes controllers part I – queues and the core controller loop, acessado em junho 24, 2026, </text:span><text:a xlink:type="simple" xlink:href="https://leftasexercise.com/2019/07/08/understanding-kubernetes-controllers-part-i-queues-and-the-core-controller-loop/" text:style-name="ListLabel_20_37" text:visited-style-name="ListLabel_20_37"><text:span text:style-name="T8">https://leftasexercise.com/2019/07/08/understanding-kubernetes-controllers-part-i-queues-and-the-core-controller-loop/</text:span></text:a></text:p>
        </text:list-item>
        <text:list-item>
          <text:p text:style-name="P8"><text:soft-page-break/><text:span text:style-name="T7">client-go/util/workqueue/queue.go at master · kubernetes/client-go ..., acessado em junho 24, 2026, </text:span><text:a xlink:type="simple" xlink:href="https://github.com/kubernetes/client-go/blob/master/util/workqueue/queue.go" text:style-name="ListLabel_20_37" text:visited-style-name="ListLabel_20_37"><text:span text:style-name="T8">https://github.com/kubernetes/client-go/blob/master/util/workqueue/queue.go</text:span></text:a></text:p>
        </text:list-item>
        <text:list-item>
          <text:p text:style-name="P8"><text:span text:style-name="T7">How Kubernetes Controller Managing Resources - Laisky's Blog, acessado em junho 24, 2026, </text:span><text:a xlink:type="simple" xlink:href="https://blog.laisky.com/p/kubernetes-controller/" text:style-name="ListLabel_20_37" text:visited-style-name="ListLabel_20_37"><text:span text:style-name="T8">https://blog.laisky.com/p/kubernetes-controller/</text:span></text:a></text:p>
        </text:list-item>
        <text:list-item>
          <text:p text:style-name="P8"><text:span text:style-name="T7">Conflict error when create pod because resource quota version is old #67761 - GitHub, acessado em junho 24, 2026, </text:span><text:a xlink:type="simple" xlink:href="https://github.com/kubernetes/kubernetes/issues/67761" text:style-name="ListLabel_20_37" text:visited-style-name="ListLabel_20_37"><text:span text:style-name="T8">https://github.com/kubernetes/kubernetes/issues/67761</text:span></text:a></text:p>
        </text:list-item>
        <text:list-item>
          <text:p text:style-name="P8"><text:span text:style-name="T7">Cache System for Container Images in Kubernetes - Preferred Networks Tech Blog, acessado em junho 24, 2026, </text:span><text:a xlink:type="simple" xlink:href="https://tech.preferred.jp/en/blog/kubernetes-container-image-cache-circ/" text:style-name="ListLabel_20_37" text:visited-style-name="ListLabel_20_37"><text:span text:style-name="T8">https://tech.preferred.jp/en/blog/kubernetes-container-image-cache-circ/</text:span></text:a></text:p>
        </text:list-item>
        <text:list-item>
          <text:p text:style-name="P8"><text:span text:style-name="T7">Errors in Go: errors.Is, errors.As, Wrapping, and Sentinel Errors - HunCoding, acessado em junho 24, 2026, </text:span><text:a xlink:type="simple" xlink:href="https://huncoding.com/go-errors-errors-is-as-wrapping-sentinel-en/" text:style-name="ListLabel_20_37" text:visited-style-name="ListLabel_20_37"><text:span text:style-name="T8">https://huncoding.com/go-errors-errors-is-as-wrapping-sentinel-en/</text:span></text:a></text:p>
        </text:list-item>
        <text:list-item>
          <text:p text:style-name="P8"><text:span text:style-name="T7">Best Practices for Secure Error Handling in Go - The JetBrains Blog, acessado em junho 24, 2026, </text:span><text:a xlink:type="simple" xlink:href="https://blog.jetbrains.com/go/2026/03/02/secure-go-error-handling-best-practices/" text:style-name="ListLabel_20_37" text:visited-style-name="ListLabel_20_37"><text:span text:style-name="T8">https://blog.jetbrains.com/go/2026/03/02/secure-go-error-handling-best-practices/</text:span></text:a></text:p>
        </text:list-item>
        <text:list-item>
          <text:p text:style-name="P8"><text:span text:style-name="T7">A practical guide to error handling in Go | Datadog, acessado em junho 24, 2026, </text:span><text:a xlink:type="simple" xlink:href="https://www.datadoghq.com/blog/go-error-handling/" text:style-name="ListLabel_20_37" text:visited-style-name="ListLabel_20_37"><text:span text:style-name="T8">https://www.datadoghq.com/blog/go-error-handling/</text:span></text:a></text:p>
        </text:list-item>
        <text:list-item>
          <text:p text:style-name="P8"><text:span text:style-name="T7">client-go/util/retry/util.go at master - GitHub, acessado em junho 24, 2026, </text:span><text:a xlink:type="simple" xlink:href="https://github.com/kubernetes/client-go/blob/master/util/retry/util.go" text:style-name="ListLabel_20_37" text:visited-style-name="ListLabel_20_37"><text:span text:style-name="T8">https://github.com/kubernetes/client-go/blob/master/util/retry/util.go</text:span></text:a></text:p>
        </text:list-item>
        <text:list-item>
          <text:p text:style-name="P8"><text:span text:style-name="T7">Building Resilient Kubernetes Controllers: A Practical Guide to Retry Mechanisms - Medium, acessado em junho 24, 2026, </text:span><text:a xlink:type="simple" xlink:href="https://medium.com/@vamshitejanizam/building-resilient-kubernetes-controllers-a-practical-guide-to-retry-mechanisms-0d689160fa51" text:style-name="ListLabel_20_37" text:visited-style-name="ListLabel_20_37"><text:span text:style-name="T8">https://medium.com/@vamshitejanizam/building-resilient-kubernetes-controllers-a-practical-guide-to-retry-mechanisms-0d689160fa51</text:span></text:a></text:p>
        </text:list-item>
        <text:list-item>
          <text:p text:style-name="P8"><text:span text:style-name="T7">Kubernetes Operators: Handle multiple controllers, conflicts and retries like a pro - YouTube, acessado em junho 24, 2026, </text:span><text:a xlink:type="simple" xlink:href="https://www.youtube.com/watch?v=0PyNl-iE5G0" text:style-name="ListLabel_20_37" text:visited-style-name="ListLabel_20_37"><text:span text:style-name="T8">https://www.youtube.com/watch?v=0PyNl-iE5G0</text:span></text:a></text:p>
        </text:list-item>
        <text:list-item>
          <text:p text:style-name="P8"><text:span text:style-name="T7">How to Implement Retry Logic for Kubernetes API Conflicts in Controllers - OneUptime, acessado em junho 24, 2026, </text:span><text:a xlink:type="simple" xlink:href="https://oneuptime.com/blog/post/2026-02-09-retry-logic-api-conflicts-controllers/view" text:style-name="ListLabel_20_37" text:visited-style-name="ListLabel_20_37"><text:span text:style-name="T8">https://oneuptime.com/blog/post/2026-02-09-retry-logic-api-conflicts-controllers/view</text:span></text:a></text:p>
        </text:list-item>
        <text:list-item>
          <text:p text:style-name="P8"><text:span text:style-name="T7">Error "the object has been modified" on k8s operator by golang - Stack Overflow, acessado em junho 24, 2026, </text:span><text:a xlink:type="simple" xlink:href="https://stackoverflow.com/questions/77527409/error-the-object-has-been-modified-on-k8s-operator-by-golang" text:style-name="ListLabel_20_37" text:visited-style-name="ListLabel_20_37"><text:span text:style-name="T8">https://stackoverflow.com/questions/77527409/error-the-object-has-been-modified-on-k8s-operator-by-golang</text:span></text:a></text:p>
        </text:list-item>
        <text:list-item>
          <text:p text:style-name="P8"><text:span text:style-name="T7">client-go/examples/create-update-delete-deployment/main.go at master - GitHub, acessado em junho 24, 2026, </text:span><text:a xlink:type="simple" xlink:href="https://github.com/kubernetes/client-go/blob/master/examples/create-update-delete-deployment/main.go" text:style-name="ListLabel_20_37" text:visited-style-name="ListLabel_20_37"><text:span text:style-name="T8">https://github.com/kubernetes/client-go/blob/master/examples/create-update-delete-deployment/main.go</text:span></text:a></text:p>
        </text:list-item>
        <text:list-item>
          <text:p text:style-name="P8"><text:span text:style-name="T7">retry package - k8s.io/client-go/util/retry - Go Packages, acessado em junho 24, 2026, </text:span><text:a xlink:type="simple" xlink:href="https://pkg.go.dev/k8s.io/client-go/util/retry" text:style-name="ListLabel_20_37" text:visited-style-name="ListLabel_20_37"><text:span text:style-name="T8">https://pkg.go.dev/k8s.io/client-go/util/retry</text:span></text:a></text:p>
        </text:list-item>
        <text:list-item>
          <text:p text:style-name="P8"><text:span text:style-name="T7">Kubernetes operators best practices: understanding conflict errors | by Alena Varkockova, acessado em junho 24, 2026, </text:span><text:a xlink:type="simple" xlink:href="https://alenkacz.medium.com/kubernetes-operators-best-practices-understanding-conflict-errors-d05353dff421" text:style-name="ListLabel_20_37" text:visited-style-name="ListLabel_20_37"><text:span text:style-name="T8">https://alenkacz.medium.com/kubernetes-operators-best-practices-understanding-conflict-errors-d05353dff421</text:span></text:a></text:p>
        </text:list-item>
        <text:list-item>
          <text:p text:style-name="P8"><text:span text:style-name="T7">retry-on-conflict command - github.com/iximiuz/client-go-examples/retry-on-conflict - Go Packages, acessado em junho 24, 2026, </text:span><text:a xlink:type="simple" xlink:href="https://pkg.go.dev/github.com/iximiuz/client-go-examples/retry-on-conflict" text:style-name="ListLabel_20_37" text:visited-style-name="ListLabel_20_37"><text:span text:style-name="T8">https://pkg.go.dev/github.com/iximiuz/client-go-examples/retry-on-conflict</text:span></text:a></text:p>
        </text:list-item>
        <text:list-item>
          <text:p text:style-name="P8"><text:span text:style-name="T7">Rate Limiting in controller-runtime and client-go - Daniel Mangum, acessado em junho 24, 2026, </text:span><text:a xlink:type="simple" xlink:href="https://danielmangum.com/posts/controller-runtime-client-go-rate-limiting/" text:style-name="ListLabel_20_37" text:visited-style-name="ListLabel_20_37"><text:span text:style-name="T8">https://danielmangum.com/posts/controller-runtime-client-go-rate-limiting/</text:span></text:a></text:p>
        </text:list-item>
        <text:list-item>
          <text:p text:style-name="P8"><text:span text:style-name="T7">Getting errors when I deploy to Kubernetes - Ping Identity Support Portal, acessado em junho 24, 2026, </text:span><text:a xlink:type="simple" xlink:href="https://support.pingidentity.com/s/question/0D58Z00009TBkgsSAD/getting-errors-when-i-deploy-to-kubernetes" text:style-name="ListLabel_20_37" text:visited-style-name="ListLabel_20_37"><text:span text:style-name="T8">https://support.pingidentity.com/s/question/0D58Z00009TBkgsSAD/getting-errors-when-i-deploy-to-kubernetes</text:span></text:a></text:p>
        </text:list-item>
        <text:list-item>
          <text:p text:style-name="P8"><text:span text:style-name="T7">Diving into controller-runtime | Manager - Burak Sekili, acessado em junho 24, 2026, </text:span><text:a xlink:type="simple" xlink:href="https://buraksekili.github.io/articles/controller-runtime-1/" text:style-name="ListLabel_20_37" text:visited-style-name="ListLabel_20_37"><text:span text:style-name="T8">https://buraksekili.github.io/articles/controller-runtime-1/</text:span></text:a></text:p>
        </text:list-item>
        <text:list-item>
          <text:p text:style-name="P8"><text:span text:style-name="T7">Best way to replace the value in an unstructured manifest - Stack Overflow, acessado em junho 24, 2026, </text:span><text:a xlink:type="simple" xlink:href="https://stackoverflow.com/questions/76872751/best-way-to-replace-the-value-in-an-unstructured-manifest" text:style-name="ListLabel_20_37" text:visited-style-name="ListLabel_20_37"><text:span text:style-name="T8">https://stackoverflow.com/questions/76872751/best-way-to-replace-the-value-in-an-unstructured-manifest</text:span></text:a></text:p>
        </text:list-item>
        <text:list-item>
          <text:p text:style-name="P8"><text:span text:style-name="T7">EVALUATIONS.md - samber/cc-skills-golang - GitHub, acessado em junho 24, 2026, </text:span><text:a xlink:type="simple" xlink:href="https://github.com/samber/cc-skills-golang/blob/main/EVALUATIONS.md" text:style-name="ListLabel_20_37" text:visited-style-name="ListLabel_20_37"><text:span text:style-name="T8">https://github.com/samber/cc-skills-golang/blob/main/EVALUATIONS.md</text:span></text:a></text:p>
        </text:list-item>
        <text:list-item>
          <text:p text:style-name="P8"><text:soft-page-break/><text:span text:style-name="T7">API clients should be able to distinguish "invalid transition" validation errors from "invalid content" errors · Issue #107919 - GitHub, acessado em junho 24, 2026, </text:span><text:a xlink:type="simple" xlink:href="https://github.com/kubernetes/kubernetes/issues/107919" text:style-name="ListLabel_20_37" text:visited-style-name="ListLabel_20_37"><text:span text:style-name="T8">https://github.com/kubernetes/kubernetes/issues/107919</text:span></text:a></text:p>
        </text:list-item>
        <text:list-item>
          <text:p text:style-name="P8"><text:span text:style-name="T7">Introducing client-go version 6 - Kubernetes, acessado em junho 24, 2026, </text:span><text:a xlink:type="simple" xlink:href="https://kubernetes.io/blog/2018/01/introducing-client-go-version-6/" text:style-name="ListLabel_20_37" text:visited-style-name="ListLabel_20_37"><text:span text:style-name="T8">https://kubernetes.io/blog/2018/01/introducing-client-go-version-6/</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color="#0000ee"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0" meta:paragraph-count="212" meta:word-count="8557" meta:character-count="67256" meta:non-whitespace-character-count="58980"/>
    <meta:generator>LibreOfficeDev/6.0.5.2$Linux_X86_64 LibreOffice_project/</meta:generator>
  </office:meta>
</office:document-meta>
</file>