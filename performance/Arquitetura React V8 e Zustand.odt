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left="0.125in" fo:padding-right="0.125in" fo:padding-top="0.0833in" fo:padding-bottom="0.0833in" fo:border="0.75pt solid #c4c7c5"/>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left="0.125in" fo:padding-right="0.125in" fo:padding-top="0.0833in" fo:padding-bottom="0.0833in" fo:border="0.75pt solid #c4c7c5"/>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padding-left="0.125in" fo:padding-right="0.125in" fo:padding-top="0.0833in" fo:padding-bottom="0.0833in" fo:border="0.75pt solid #c4c7c5"/>
    </style:style>
    <style:style style:name="P1" style:family="paragraph" style:parent-style-name="Standard">
      <style:paragraph-properties fo:line-height="114%" fo:padding="0in" fo:border="none"/>
    </style:style>
    <style:style style:name="P2" style:family="paragraph" style:parent-style-name="Standard">
      <style:paragraph-properties fo:margin-top="0.0835in" fo:margin-bottom="0.0835in" loext:contextual-spacing="false" fo:line-height="114%" fo:padding="0in" fo:border="none"/>
    </style:style>
    <style:style style:name="P3" style:family="paragraph" style:parent-style-name="Standard">
      <style:paragraph-properties fo:margin-top="0.3335in" fo:margin-bottom="0in" loext:contextual-spacing="false" fo:line-height="114%" fo:padding="0in" fo:border="none"/>
    </style:style>
    <style:style style:name="P4" style:family="paragraph" style:parent-style-name="Standard" style:list-style-name="WWNum1">
      <style:paragraph-properties fo:margin-left="0.4165in" fo:margin-right="0in" fo:line-height="114%" fo:text-indent="-0.25in" style:auto-text-indent="false" fo:padding="0in" fo:border="none"/>
    </style:style>
    <style:style style:name="P5" style:family="paragraph" style:parent-style-name="Standard" style:list-style-name="WWNum2">
      <style:paragraph-properties fo:margin-left="0.4165in" fo:margin-right="0in" fo:line-height="114%" fo:text-indent="-0.25in" style:auto-text-indent="false" fo:padding="0in" fo:border="none"/>
    </style:style>
    <style:style style:name="P6" style:family="paragraph" style:parent-style-name="Standard" style:list-style-name="WWNum3">
      <style:paragraph-properties fo:margin-left="0.4165in" fo:margin-right="0in" fo:text-indent="-0.25in" style:auto-text-indent="false" fo:padding="0in" fo:border="none"/>
    </style:style>
    <style:style style:name="P7" style:family="paragraph" style:parent-style-name="Standard">
      <style:paragraph-properties fo:margin-left="0.3335in" fo:margin-right="0in" fo:line-height="114%" fo:text-indent="0in" style:auto-text-indent="false" fo:padding="0in" fo:border="none"/>
      <style:text-properties fo:color="#1f1f1f" style:font-name="Google Sans" style:font-name-asian="Google Sans1" style:font-name-complex="Google Sans1"/>
    </style:style>
    <style:style style:name="P8" style:family="paragraph" style:parent-style-name="Standard">
      <style:paragraph-properties fo:margin-left="0.3335in" fo:margin-right="0in" fo:line-height="114%" fo:text-indent="0in" style:auto-text-indent="false" fo:padding="0in" fo:border="none"/>
    </style:style>
    <style:style style:name="P9" style:family="paragraph" style:parent-style-name="Standard">
      <style:paragraph-properties fo:margin-left="0.3335in" fo:margin-right="0in" fo:margin-top="0.2709in" fo:margin-bottom="0.3335in" loext:contextual-spacing="false" fo:line-height="114%" fo:text-indent="0in" style:auto-text-indent="false" fo:padding="0in" fo:border="none"/>
      <style:text-properties fo:color="#1f1f1f" style:font-name="Google Sans" style:font-name-asian="Google Sans1" style:font-name-complex="Google Sans1"/>
    </style:style>
    <style:style style:name="P10" style:family="paragraph" style:parent-style-name="Standard">
      <style:paragraph-properties fo:margin-left="0.3335in" fo:margin-right="0.1146in" fo:line-height="114%" fo:text-indent="0in" style:auto-text-indent="false" fo:padding="0in" fo:border="none"/>
      <style:text-properties fo:color="#1f1f1f" style:font-name="Google Sans" style:font-name-asian="Google Sans1" style:font-name-complex="Google Sans1"/>
    </style:style>
    <style:style style:name="P11" style:family="paragraph" style:parent-style-name="Standard">
      <style:paragraph-properties fo:margin-left="0.3335in" fo:margin-right="0.1146in" fo:line-height="114%" fo:text-indent="0in" style:auto-text-indent="false" fo:padding="0in" fo:border="none"/>
    </style:style>
    <style:style style:name="P12" style:family="paragraph" style:parent-style-name="Standard">
      <style:paragraph-properties fo:margin-top="0in" fo:margin-bottom="0.1772in" loext:contextual-spacing="false" fo:line-height="114%" fo:padding="0in" fo:border="none"/>
    </style:style>
    <style:style style:name="P13" style:family="paragraph" style:parent-style-name="Heading_20_1" style:master-page-name="Standard">
      <style:paragraph-properties fo:margin-top="0in" fo:margin-bottom="0.0835in" loext:contextual-spacing="false" fo:line-height="114%" style:page-number="1" fo:padding="0in" fo:border="none"/>
    </style:style>
    <style:style style:name="P14" style:family="paragraph" style:parent-style-name="Heading_20_4">
      <style:paragraph-properties fo:margin-top="0in" fo:margin-bottom="0.1772in" loext:contextual-spacing="false" fo:line-height="100%" fo:padding="0in" fo:border="none"/>
    </style:style>
    <style:style style:name="P15" style:family="paragraph" style:parent-style-name="Heading_20_3">
      <style:paragraph-properties fo:margin-top="0in" fo:margin-bottom="0.0835in" loext:contextual-spacing="false" fo:line-height="114%" fo:padding="0in" fo:border="none"/>
    </style:style>
    <style:style style:name="P16" style:family="paragraph" style:parent-style-name="Heading_20_3">
      <style:paragraph-properties fo:margin-top="0.3335in" fo:margin-bottom="0.0835in" loext:contextual-spacing="false" fo:line-height="114%" fo:padding="0in" fo:border="none"/>
    </style:style>
    <style:style style:name="P17" style:family="paragraph" style:parent-style-name="Heading_20_2">
      <style:paragraph-properties fo:margin-top="0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style:font-name-asian="Google Sans1" style:font-name-complex="Google Sans1" fo:background-color="#000000"/>
    </style:style>
    <style:style style:name="T3" style:family="text">
      <style:text-properties fo:color="#1f1f1f" style:font-name="Google Sans" fo:font-style="italic" style:font-name-asian="Google Sans1" style:font-style-asian="italic" style:font-name-complex="Google Sans1" style:font-style-complex="italic"/>
    </style:style>
    <style:style style:name="T4" style:family="text">
      <style:text-properties fo:color="#1f1f1f" style:font-name="Google Sans" fo:font-style="italic" fo:font-weight="bold" style:font-name-asian="Google Sans1" style:font-style-asian="italic" style:font-weight-asian="bold" style:font-name-complex="Google Sans1" style:font-style-complex="italic" style:font-weight-complex="bold"/>
    </style:style>
    <style:style style:name="T5" style:family="text">
      <style:text-properties fo:color="#1f1f1f" style:font-name="Google Sans" fo:font-weight="bold" style:font-name-asian="Google Sans1" style:font-weight-asian="bold" style:font-name-complex="Google Sans1" style:font-weight-complex="bold"/>
    </style:style>
    <style:style style:name="T6" style:family="text">
      <style:text-properties fo:color="#444746" style:text-position="super 58%" style:font-name="Google Sans" fo:font-size="12pt" style:font-name-asian="Google Sans1" style:font-size-asian="12pt" style:font-name-complex="Google Sans1" style:font-size-complex="12pt"/>
    </style:style>
    <style:style style:name="T7" style:family="text">
      <style:text-properties fo:color="#ffffff" style:font-name="Google Sans" style:font-name-asian="Google Sans1" style:font-name-complex="Google Sans1" fo:background-color="#000000"/>
    </style:style>
    <style:style style:name="T8" style:family="text">
      <style:text-properties fo:color="#ffffff" style:font-name="Google Sans" fo:font-size="10pt" fo:font-style="normal" style:font-name-asian="Google Sans1" style:font-size-asian="10pt" style:font-style-asian="normal" style:font-name-complex="Google Sans1" style:font-size-complex="10pt" style:font-style-complex="normal" fo:background-color="#000000"/>
    </style:style>
    <style:style style:name="T9" style:family="text">
      <style:text-properties fo:color="#969dff" style:font-name="Google Sans" fo:font-size="10pt" fo:font-style="normal" style:font-name-asian="Google Sans1" style:font-size-asian="10pt" style:font-style-asian="normal" style:font-name-complex="Google Sans1" style:font-size-complex="10pt" style:font-style-complex="normal" fo:background-color="#000000"/>
    </style:style>
    <style:style style:name="T10" style:family="text">
      <style:text-properties fo:color="#60d673" style:font-name="Google Sans" fo:font-size="10pt" fo:font-style="normal" style:font-name-asian="Google Sans1" style:font-size-asian="10pt" style:font-style-asian="normal" style:font-name-complex="Google Sans1" style:font-size-complex="10pt" style:font-style-complex="normal" fo:background-color="#000000"/>
    </style:style>
    <style:style style:name="T11" style:family="text">
      <style:text-properties fo:color="#808080" style:font-name="Google Sans" fo:font-size="10pt" fo:font-style="normal" style:font-name-asian="Google Sans1" style:font-size-asian="10pt" style:font-style-asian="normal" style:font-name-complex="Google Sans1" style:font-size-complex="10pt" style:font-style-complex="normal" fo:background-color="#000000"/>
    </style:style>
    <style:style style:name="T12" style:family="text">
      <style:text-properties fo:color="#ff5a59" style:font-name="Google Sans" fo:font-size="10pt" fo:font-style="normal" style:font-name-asian="Google Sans1" style:font-size-asian="10pt" style:font-style-asian="normal" style:font-name-complex="Google Sans1" style:font-size-complex="10pt" style:font-style-complex="normal" fo:background-color="#000000"/>
    </style:style>
    <style:style style:name="T13" style:family="text">
      <style:text-properties style:font-name="Google Sans" style:font-name-asian="Google Sans1" style:font-name-complex="Google Sans1"/>
    </style:style>
    <style:style style:name="T14" style:family="text">
      <style:text-properties style:font-name="Google Sans" fo:font-size="12pt" style:font-name-asian="Google Sans1" style:font-size-asian="12pt" style:font-name-complex="Google Sans1" style:font-size-complex="12pt"/>
    </style:style>
    <style:style style:name="T15"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Engenharia de Alta Performance em Aplicações Web: Da Optimização de Máquina ao Micro-Renderização em React</text:span></text:p>
      <text:p text:style-name="P17"><text:span text:style-name="T1">1. Fundamentos Arquitecturais da Máquina: JavaScript, V8 e a Simbiose de Desempenho com TypeScript</text:span></text:p>
      <text:p text:style-name="P1"><text:span text:style-name="T1">A compreensão profunda do desempenho em aplicações web modernas exige uma análise minuciosa da camada fundamental de execução: o motor JavaScript. Historicamente, o JavaScript foi concebido como uma linguagem interpretada e de tipagem dinâmica. Embora a dinamicidade ofereça imensa flexibilidade arquitectónica no nível do código-fonte, ela impõe desafios severos e complexos no tempo de execução (runtime), uma vez que a estrutura dos objectos e os tipos de dados podem mutar de forma imprevisível ao longo do ciclo de vida da aplicação. É neste ecossistema caótico que o motor V8 e o TypeScript estabelecem uma relação intrínseca de performance, onde a tipagem estática actua como um catalisador vital para as optimizações de baixo nível executadas pela máquina virtual</text:span><text:span text:style-name="T6">1</text:span><text:span text:style-name="T1">.</text:span></text:p>
      <text:p text:style-name="P15"><text:span text:style-name="T1">1.1 A Arquitectura do Motor V8 e a Gestão de Memória</text:span></text:p>
      <text:p text:style-name="P1"><text:span text:style-name="T1">O motor V8, desenvolvido pela Google em C++, não é um mero interpretador linear; ele opera como uma máquina virtual altamente sofisticada que compila JavaScript para código de máquina nativo de forma contínua e adaptativa através da compilação </text:span><text:span text:style-name="T3">Just-In-Time</text:span><text:span text:style-name="T1"> (JIT). O V8 controla a execução do JavaScript, a recolha de lixo (Garbage Collection), a disposição dos objectos em memória e a geração do código de máquina</text:span><text:span text:style-name="T6">2</text:span><text:span text:style-name="T1">.</text:span></text:p>
      <text:p text:style-name="P1"><text:span text:style-name="T1">A gestão de memória no V8 baseia-se na "hipótese geracional", um princípio que postula que a esmagadora maioria dos objectos alocados tem um tempo de vida muito curto (morrem jovens)</text:span><text:span text:style-name="T6">1</text:span><text:span text:style-name="T1">. Para explorar esta premissa, o V8 divide a </text:span><text:span text:style-name="T3">Heap</text:span><text:span text:style-name="T1"> (a área de alocação dinâmica de memória) em diferentes gerações, optimizando o processo de recolha de lixo. A tabela seguinte detalha esta divisão estrutural:</text:span></text:p>
      <table:table table:name="Table1" table:style-name="Table1">
        <table:table-column table:style-name="Table1.A" table:number-columns-repeated="3"/>
        <table:table-row table:style-name="Table1.1">
          <table:table-cell table:style-name="Table1.A1" office:value-type="string">
            <text:p text:style-name="P2"><text:span text:style-name="T5">Espaço de Memória</text:span></text:p>
          </table:table-cell>
          <table:table-cell table:style-name="Table1.A1" office:value-type="string">
            <text:p text:style-name="P2"><text:span text:style-name="T5">Características de Alocação e Gestão</text:span></text:p>
          </table:table-cell>
          <table:table-cell table:style-name="Table1.A1" office:value-type="string">
            <text:p text:style-name="P2"><text:span text:style-name="T5">Algoritmo de Recolha de Lixo (Garbage Collection)</text:span></text:p>
          </table:table-cell>
        </table:table-row>
        <table:table-row table:style-name="Table1.1">
          <table:table-cell table:style-name="Table1.A1" office:value-type="string">
            <text:p text:style-name="P2"><text:span text:style-name="T5">New Space (Geração Jovem)</text:span></text:p>
          </table:table-cell>
          <table:table-cell table:style-name="Table1.A1" office:value-type="string">
            <text:p text:style-name="P2"><text:span text:style-name="T1">Destinado a objectos recém-criados e efémeros (ex.: objectos temporários gerados durante o processamento de uma requisição HTTP).</text:span></text:p>
          </table:table-cell>
          <table:table-cell table:style-name="Table1.A1" office:value-type="string">
            <text:p text:style-name="P2"><text:span text:style-name="T5">Scavenger:</text:span><text:span text:style-name="T1"> Operação frequente e extremamente rápida que liberta memória em pequenos ciclos, garantindo baixa latência.</text:span></text:p>
          </table:table-cell>
        </table:table-row>
        <table:table-row table:style-name="Table1.1">
          <table:table-cell table:style-name="Table1.A1" office:value-type="string">
            <text:p text:style-name="P2"><text:span text:style-name="T5">Old Space (Geração Velha)</text:span></text:p>
          </table:table-cell>
          <table:table-cell table:style-name="Table1.A1" office:value-type="string">
            <text:p text:style-name="P2"><text:span text:style-name="T1">Acomoda objectos que sobreviveram a múltiplos ciclos de recolha no </text:span><text:span text:style-name="T3">New Space</text:span><text:span text:style-name="T1"> (ex.: sessões de utilizadores activas, dados de cache persistentes, estado global).</text:span></text:p>
          </table:table-cell>
          <table:table-cell table:style-name="Table1.A1" office:value-type="string">
            <text:p text:style-name="P2"><text:span text:style-name="T5">Mark-Sweep-Compact:</text:span><text:span text:style-name="T1"> Operação menos frequente, mais intensiva e abrangente, que defragmenta e compacta a memória remanescente.</text:span></text:p>
          </table:table-cell>
        </table:table-row>
        <table:table-row table:style-name="Table1.1">
          <table:table-cell table:style-name="Table1.A1" office:value-type="string">
            <text:p text:style-name="P2"><text:span text:style-name="T5">Stack (Pilha de Execução)</text:span></text:p>
          </table:table-cell>
          <table:table-cell table:style-name="Table1.A1" office:value-type="string">
            <text:p text:style-name="P2"><text:span text:style-name="T1">Região de memória LIFO (Last In, First Out) usada para armazenar variáveis locais e informação de chamadas de funções.</text:span></text:p>
          </table:table-cell>
          <table:table-cell table:style-name="Table1.A1" office:value-type="string">
            <text:p text:style-name="P2"><text:span text:style-name="T1">Operação directa de </text:span><text:span text:style-name="T3">push</text:span><text:span text:style-name="T1"> e </text:span><text:span text:style-name="T3">pop</text:span><text:span text:style-name="T1"> atrelada ao ciclo de vida da função, sem intervenção do </text:span><text:span text:style-name="T3">Garbage Collector</text:span><text:span text:style-name="T1">.</text:span></text:p>
          </table:table-cell>
        </table:table-row>
      </table:table>
      <text:p text:style-name="P3"><text:span text:style-name="T1">O ciclo de vida do código dentro do V8 atravessa vários estágios de compilação. Inicialmente, o código-fonte é submetido a um analisador léxico e sintático, gerando uma Árvore de Sintaxe Abstracta (Abstract Syntax Tree - AST). A AST é então convertida em </text:span><text:span text:style-name="T3">bytecode</text:span><text:span text:style-name="T6">1</text:span><text:span text:style-name="T1">. O interpretador do V8, denominado </text:span><text:span text:style-name="T5">Ignition</text:span><text:span text:style-name="T1">, executa este </text:span><text:span text:style-name="T3">bytecode</text:span><text:span text:style-name="T1"> imediatamente, minimizando o tempo de inicialização (startup time). O Ignition actua simultaneamente como um observador, recolhendo dados heurísticos sobre o comportamento do código, tais como a forma dos objectos e os tipos de argumentos transmitidos</text:span><text:span text:style-name="T6">1</text:span><text:span text:style-name="T1">.</text:span></text:p>
      <text:p text:style-name="P1"><text:span text:style-name="T1">Em versões modernas, o compilador de base </text:span><text:span text:style-name="T5">Sparkplug</text:span><text:span text:style-name="T1"> intervém rapidamente para emitir código de máquina rudimentar, removendo o </text:span><text:span text:style-name="T3">overhead</text:span><text:span text:style-name="T1"> de processamento do interpretador. Finalmente, o </text:span><text:span text:style-name="T5">TurboFan</text:span><text:span text:style-name="T1">, o compilador optimizador de topo do V8, recolhe as funções identificadas como "quentes" (</text:span><text:span text:style-name="T3">hot paths</text:span><text:span text:style-name="T1">, ou seja, funções executadas repetidamente) e, utilizando as informações de tipo observadas pelo Ignition, gera código de máquina nativo altamente optimizado com base em especulações matemáticas rigorosas</text:span><text:span text:style-name="T6">1</text:span><text:span text:style-name="T1">.</text:span></text:p>
      <text:p text:style-name="P15"><text:span text:style-name="T1">1.2 O Paradigma das Hidden Classes e do Inline Caching</text:span></text:p>
      <text:p text:style-name="P1"><text:span text:style-name="T1">A genialidade do V8 reside na forma como lida com a natureza dinâmica do JavaScript. Como a linguagem carece de estruturas de classes estáticas, o V8 implementa um conceito interno denominado </text:span><text:span text:style-name="T5">Hidden Classes</text:span><text:span text:style-name="T1"> (frequentemente referenciadas no código-fonte como </text:span><text:span text:style-name="T3">Maps</text:span><text:span text:style-name="T1"> ou </text:span><text:span text:style-name="T3">Shapes</text:span><text:span text:style-name="T1">)</text:span><text:span text:style-name="T6">2</text:span><text:span text:style-name="T1">. As </text:span><text:span text:style-name="T3">Hidden Classes</text:span><text:span text:style-name="T1"> são descritores internos que registam os metadados de um objecto, especificando quais as propriedades que ele contém e, crucialmente, os seus exactos </text:span><text:span text:style-name="T3">offsets</text:span><text:span text:style-name="T1"> (deslocamentos) de memória</text:span><text:span text:style-name="T6">6</text:span><text:span text:style-name="T1">.</text:span></text:p>
      <text:p text:style-name="P1"><text:span text:style-name="T1">Cada vez que um objecto é instanciado, o V8 associa a ele uma </text:span><text:span text:style-name="T3">Hidden Class</text:span><text:span text:style-name="T1"> base. Quando o desenvolvedor adiciona propriedades a esse objecto de forma sequencial, o V8 gera novas </text:span><text:span text:style-name="T3">Hidden Classes</text:span><text:span text:style-name="T1"> e estabelece uma árvore de transição (transition chain). Se um objecto vazio herda a classe HC0, a adição de uma propriedade .x provoca a transição para HC1. Adicionar .y transita para HC2</text:span><text:span text:style-name="T6">5</text:span><text:span text:style-name="T1">. O objectivo desta mecânica é partilhar cadeias de transição entre objectos que possuem a mesma topologia, permitindo que o V8 trate o JavaScript dinâmico com o mesmo nível de velocidade que estruturas nativas em C++</text:span><text:span text:style-name="T6">5</text:span><text:span text:style-name="T1">.</text:span></text:p>
      <text:p text:style-name="P1"><text:span text:style-name="T1">Estas </text:span><text:span text:style-name="T3">Hidden Classes</text:span><text:span text:style-name="T1"> alimentam directamente o mecanismo de </text:span><text:span text:style-name="T5">Inline Caching (IC)</text:span><text:span text:style-name="T1">. O </text:span><text:span text:style-name="T3">Inline Cache</text:span><text:span text:style-name="T1"> é uma técnica de optimização em que o V8 memoriza o local de memória onde encontrou uma propriedade durante a última execução de uma função</text:span><text:span text:style-name="T6">7</text:span><text:span text:style-name="T1">. O estado do </text:span><text:span text:style-name="T3">Inline Cache</text:span><text:span text:style-name="T1"> determina de forma drástica a eficiência da execução do código:</text:span></text:p>
      <table:table table:name="Table2" table:style-name="Table2">
        <table:table-column table:style-name="Table2.A" table:number-columns-repeated="3"/>
        <text:soft-page-break/>
        <table:table-row table:style-name="Table2.1">
          <table:table-cell table:style-name="Table2.A1" office:value-type="string">
            <text:p text:style-name="P2"><text:span text:style-name="T5">Estado do Inline Cache</text:span></text:p>
          </table:table-cell>
          <table:table-cell table:style-name="Table2.A1" office:value-type="string">
            <text:p text:style-name="P2"><text:span text:style-name="T5">Definição Heurística no V8</text:span></text:p>
          </table:table-cell>
          <table:table-cell table:style-name="Table2.A1" office:value-type="string">
            <text:p text:style-name="P2"><text:span text:style-name="T5">Impacto na Performance de Execução</text:span></text:p>
          </table:table-cell>
        </table:table-row>
        <table:table-row table:style-name="Table2.1">
          <table:table-cell table:style-name="Table2.A1" office:value-type="string">
            <text:p text:style-name="P2"><text:span text:style-name="T5">Não Inicializado</text:span></text:p>
          </table:table-cell>
          <table:table-cell table:style-name="Table2.A1" office:value-type="string">
            <text:p text:style-name="P2"><text:span text:style-name="T1">A função ou propriedade ainda não foi acedida em tempo de execução. O motor carece de informações sobre o comportamento ou os tipos esperados.</text:span></text:p>
          </table:table-cell>
          <table:table-cell table:style-name="Table2.A1" office:value-type="string">
            <text:p text:style-name="P2"><text:span text:style-name="T1">Lento na primeira iteração (processo de recolha de dados de tipos).</text:span></text:p>
          </table:table-cell>
        </table:table-row>
        <table:table-row table:style-name="Table2.1">
          <table:table-cell table:style-name="Table2.A1" office:value-type="string">
            <text:p text:style-name="P2"><text:span text:style-name="T5">Monomórfico</text:span></text:p>
          </table:table-cell>
          <table:table-cell table:style-name="Table2.A1" office:value-type="string">
            <text:p text:style-name="P2"><text:span text:style-name="T1">O local de invocação encontra sempre a mesma </text:span><text:span text:style-name="T3">Hidden Class</text:span><text:span text:style-name="T1"> (a mesma forma de objecto). O motor regista apenas uma entrada.</text:span></text:p>
          </table:table-cell>
          <table:table-cell table:style-name="Table2.A1" office:value-type="string">
            <text:p text:style-name="P2"><text:span text:style-name="T5">Excelente</text:span><text:span text:style-name="T1">. O acesso é reduzido a uma única comparação de endereço e uma leitura directa de memória.</text:span></text:p>
          </table:table-cell>
        </table:table-row>
        <table:table-row table:style-name="Table2.1">
          <table:table-cell table:style-name="Table2.A1" office:value-type="string">
            <text:p text:style-name="P2"><text:span text:style-name="T5">Polimórfico</text:span></text:p>
          </table:table-cell>
          <table:table-cell table:style-name="Table2.A1" office:value-type="string">
            <text:p text:style-name="P2"><text:span text:style-name="T1">O código encontra um leque reduzido de diferentes </text:span><text:span text:style-name="T3">Hidden Classes</text:span><text:span text:style-name="T1"> (geralmente entre 2 e 4). O motor verifica contra esta lista curta.</text:span></text:p>
          </table:table-cell>
          <table:table-cell table:style-name="Table2.A1" office:value-type="string">
            <text:p text:style-name="P2"><text:span text:style-name="T5">Bom</text:span><text:span text:style-name="T1">. O acesso é marginalmente mais lento devido à necessidade de validar múltiplas opções de topologia conhecidas.</text:span></text:p>
          </table:table-cell>
        </table:table-row>
        <table:table-row table:style-name="Table2.1">
          <table:table-cell table:style-name="Table2.A1" office:value-type="string">
            <text:p text:style-name="P2"><text:span text:style-name="T5">Megamórfico</text:span></text:p>
          </table:table-cell>
          <table:table-cell table:style-name="Table2.A1" office:value-type="string">
            <text:p text:style-name="P2"><text:span text:style-name="T1">O local de invocação observa uma diversidade caótica de formas e </text:span><text:span text:style-name="T3">Hidden Classes</text:span><text:span text:style-name="T1">.</text:span></text:p>
          </table:table-cell>
          <table:table-cell table:style-name="Table2.A1" office:value-type="string">
            <text:p text:style-name="P2"><text:span text:style-name="T5">Pobre</text:span><text:span text:style-name="T1">. O motor abandona a especialização e a compilação JIT, revertendo para uma lenta pesquisa genérica em tabelas </text:span><text:span text:style-name="T3">hash</text:span><text:span text:style-name="T1"> (dictionary lookup).</text:span></text:p>
          </table:table-cell>
        </table:table-row>
      </table:table>
      <text:p text:style-name="P16"><text:span text:style-name="T1">1.3 A Tipagem Estática como Vantagem Mecânica no V8</text:span></text:p>
      <text:p text:style-name="P1"><text:span text:style-name="T1">O TypeScript (TS) é frequentemente descrito como um superconjunto estrito do JavaScript que opera puramente em tempo de compilação (</text:span><text:span text:style-name="T3">compile-time</text:span><text:span text:style-name="T1">), sendo removido no processo de transpilação e não possuindo impacto directo no ficheiro gerado final. Embora o TypeScript não altere os </text:span><text:span text:style-name="T3">opcodes</text:span><text:span text:style-name="T1"> do JavaScript, o seu impacto de desempenho subjacente é profundo devido à disciplina arquitectónica que impõe ao motor V8</text:span><text:span text:style-name="T6">1</text:span><text:span text:style-name="T1">.</text:span></text:p>
      <text:p text:style-name="P1"><text:span text:style-name="T1">No desenvolvimento dinâmico em JavaScript puro, é comum que engenheiros injectem propriedades de forma condicional, utilizem a operação delete para remover chaves de objectos ou iterem sobre dados heterogéneos</text:span><text:span text:style-name="T6">2</text:span><text:span text:style-name="T1">. Tais práticas caóticas quebram instantaneamente as árvores de transição das </text:span><text:span text:style-name="T3">Hidden Classes</text:span><text:span text:style-name="T1">. Por exemplo, o uso da directiva delete destrói a forma optimizada do objecto, forçando o V8 a reverter a estrutura para um "modo de dicionário", onde cada acesso a uma propriedade custa o tempo de uma pesquisa complexa numa tabela de dispersão (</text:span><text:span text:style-name="T3">hash table</text:span><text:span text:style-name="T1">)</text:span><text:span text:style-name="T6">2</text:span><text:span text:style-name="T1">. Consequentemente, o </text:span><text:span text:style-name="T3">Inline Cache</text:span><text:span text:style-name="T1"> degenera para o estado Megamórfico, o que por sua vez desencadeia um processo catastrófico de desoptimização (</text:span><text:span text:style-name="T3">deoptimization</text:span><text:span text:style-name="T1">): o compilador TurboFan descarta o código de máquina altamente especializado e obriga o motor a retroceder para o código de </text:span><text:span text:style-name="T3">bytecode</text:span><text:span text:style-name="T1"> genérico e lento executado pelo Ignition</text:span><text:span text:style-name="T6">1</text:span><text:span text:style-name="T1">.</text:span></text:p>
      <text:p text:style-name="P1"><text:span text:style-name="T1">O TypeScript previne este cenário ao obrigar o engenheiro a definir rigorosamente as Interfaces e os Tipos. Em ambientes TS rigorosos, a mutação da "forma" do objecto em tempo de execução gera um erro estático na IDE. Como consequência arquitectónica desta restrição, o código compilado tende a instanciar todos os membros dos objectos simultaneamente (em construtores previsíveis ou em objectos literais uniformes)</text:span><text:span text:style-name="T6">4</text:span><text:span text:style-name="T1">. Ao passar repetidamente objectos instanciados sob uma mesma interface do TS para uma dada função, o engenheiro garante matematicamente que o V8 verá apenas uma e única </text:span><text:span text:style-name="T3">Hidden Class</text:span><text:span text:style-name="T6">6</text:span><text:span text:style-name="T1">.</text:span></text:p>
      <text:p text:style-name="P1"><text:span text:style-name="T1">Em suma, o TypeScript actua como uma força de normalização e homogeneização do fluxo de dados. Ele alimenta deliberadamente o V8 com estruturas consistentes e invariáveis. Esta previsibilidade garante que os </text:span><text:span text:style-name="T3">Inline Caches</text:span><text:span text:style-name="T1"> mantenham o estado Monomórfico, o que autoriza o TurboFan a gerar o código de máquina C++ mais rápido possível, substituindo rotinas longas de inspecção de chaves por acessos directos a ponteiros de memória</text:span><text:span text:style-name="T6">5</text:span><text:span text:style-name="T1">. É desta forma exacta que a tipagem, uma característica formal teórica, se converte em velocidade pura de processamento de debaixo dos panos.</text:span></text:p>
      <text:p text:style-name="P17"><text:span text:style-name="T1">2. A Camada de Representação Gráfica e a Fronteira do Contexto</text:span></text:p>
      <text:p text:style-name="P1"><text:span text:style-name="T1">Com a execução lógica do motor compreendida, a análise transita para a representação gráfica e os paradigmas de rendering que fundamentam as aplicações web interactivas. É essencial decompor a relação estrita entre as APIs de navegador, as sintaxes virtuais do React e o processo de transposição de dados.</text:span></text:p>
      <text:p text:style-name="P15"><text:span text:style-name="T1">2.1 A Ontologia do DOM e o Papel dos Navegadores Modernos</text:span></text:p>
      <text:p text:style-name="P1"><text:span text:style-name="T1">O Modelo de Objecto de Documentos (Document Object Model, ou DOM) é frequentemente, mas erradamente, compreendido como uma estrutura nativa e inata da linguagem JavaScript. A nível estritamente conceitual, o DOM é uma Interface de Programação de Aplicações (API) universal e agnóstica de linguagem. Ele padroniza a forma como documentos em HTML ou XML são representados internamente pelos navegadores sob a forma de uma árvore hierárquica e lógica de nós manipuláveis</text:span><text:span text:style-name="T6">10</text:span><text:span text:style-name="T1">.</text:span></text:p>
      <text:p text:style-name="P1"><text:span text:style-name="T1">A execução desta representação divide-se funcionalmente dentro da arquitectura de processos dos navegadores modernos. O ecossistema de renderização na web é caracterizado por motores distintos de </text:span><text:span text:style-name="T3">JavaScript</text:span><text:span text:style-name="T1"> e de </text:span><text:span text:style-name="T3">Renderização</text:span><text:span text:style-name="T1"> (Rendering Engines), que interagem num modelo cliente-servidor interno:</text:span></text:p>
      <table:table table:name="Table3" table:style-name="Table3">
        <table:table-column table:style-name="Table3.A" table:number-columns-repeated="3"/>
        <table:table-column table:style-name="Table3.D"/>
        <table:table-row table:style-name="Table3.1">
          <table:table-cell table:style-name="Table3.A1" office:value-type="string">
            <text:p text:style-name="P2"><text:span text:style-name="T5">Navegador Web</text:span></text:p>
          </table:table-cell>
          <table:table-cell table:style-name="Table3.A1" office:value-type="string">
            <text:p text:style-name="P2"><text:span text:style-name="T5">Motor JavaScript (Execução Lógica)</text:span></text:p>
          </table:table-cell>
          <table:table-cell table:style-name="Table3.A1" office:value-type="string">
            <text:p text:style-name="P2"><text:span text:style-name="T5">Motor de Renderização (Implementação C++ do DOM)</text:span></text:p>
          </table:table-cell>
          <table:table-cell table:style-name="Table3.A1" office:value-type="string">
            <text:p text:style-name="P2"><text:span text:style-name="T5">Topologia de Integração</text:span></text:p>
          </table:table-cell>
        </table:table-row>
        <table:table-row table:style-name="Table3.1">
          <table:table-cell table:style-name="Table3.A1" office:value-type="string">
            <text:p text:style-name="P2"><text:span text:style-name="T5">Google Chrome / Chromium / Edge</text:span></text:p>
          </table:table-cell>
          <table:table-cell table:style-name="Table3.A1" office:value-type="string">
            <text:p text:style-name="P2"><text:span text:style-name="T1">V8</text:span></text:p>
          </table:table-cell>
          <table:table-cell table:style-name="Table3.A1" office:value-type="string">
            <text:p text:style-name="P2"><text:span text:style-name="T1">Blink (Fork do WebKit)</text:span></text:p>
          </table:table-cell>
          <table:table-cell table:style-name="Table3.A1" office:value-type="string">
            <text:p text:style-name="P2"><text:span text:style-name="T1">O Blink converte estruturas HTML numa árvore de nós C++ residente fora do ambiente V8.</text:span></text:p>
          </table:table-cell>
        </table:table-row>
        <table:table-row table:style-name="Table3.1">
          <table:table-cell table:style-name="Table3.A1" office:value-type="string">
            <text:p text:style-name="P2"><text:span text:style-name="T5">Apple Safari</text:span></text:p>
          </table:table-cell>
          <table:table-cell table:style-name="Table3.A1" office:value-type="string">
            <text:p text:style-name="P2"><text:span text:style-name="T1">JavaScriptCore (Nitro)</text:span></text:p>
          </table:table-cell>
          <table:table-cell table:style-name="Table3.A1" office:value-type="string">
            <text:p text:style-name="P2"><text:span text:style-name="T1">WebKit</text:span></text:p>
          </table:table-cell>
          <table:table-cell table:style-name="Table3.A1" office:value-type="string">
            <text:p text:style-name="P2"><text:span text:style-name="T1">Semelhante ao Chromium, onde o WebKit constrói os elementos DOM nativos subjacentes.</text:span></text:p>
          </table:table-cell>
        </table:table-row>
        <table:table-row table:style-name="Table3.1">
          <table:table-cell table:style-name="Table3.A1" office:value-type="string">
            <text:p text:style-name="P2"><text:span text:style-name="T5">Mozilla Firefox</text:span></text:p>
          </table:table-cell>
          <table:table-cell table:style-name="Table3.A1" office:value-type="string">
            <text:p text:style-name="P2"><text:span text:style-name="T1">SpiderMonkey</text:span></text:p>
          </table:table-cell>
          <table:table-cell table:style-name="Table3.A1" office:value-type="string">
            <text:p text:style-name="P2"><text:span text:style-name="T1">Gecko (Servo-inspired)</text:span></text:p>
          </table:table-cell>
          <table:table-cell table:style-name="Table3.A1" office:value-type="string">
            <text:p text:style-name="P2"><text:span text:style-name="T1">O Gecko encarrega-se do layout gráfico, comunicando-se com o SpiderMonkey.</text:span></text:p>
          </table:table-cell>
        </table:table-row>
      </table:table>
      <text:p text:style-name="P3"><text:span text:style-name="T1">Nesta arquitectura, os nós físicos da árvore DOM não residem inteiramente na memória (Heap) do motor JavaScript. O DOM é, na sua essência, um conglomerado massivo de dados escrito em linguagens de sistema (como C++ ou Rust) que vive no espaço de memória isolado do processo de renderização do navegador</text:span><text:span text:style-name="T6">11</text:span><text:span text:style-name="T1">.</text:span></text:p>
      <text:p text:style-name="P1"><text:span text:style-name="T1">Para que o código JavaScript manipule o ecrã (por exemplo, ao invocar document.getElementById()), a operação requer a utilização profunda de mecanismos chamados </text:span><text:span text:style-name="T5">Bindings</text:span><text:span text:style-name="T1">. Um Binding é uma ponte (</text:span><text:span text:style-name="T3">bridge</text:span><text:span text:style-name="T1">) sintética e interna que expõe funções nativas C++ para a caixa de areia (</text:span><text:span text:style-name="T3">sandbox</text:span><text:span text:style-name="T1">) do JavaScript</text:span><text:span text:style-name="T6">10</text:span><text:span text:style-name="T1">. Consequentemente, cada elemento DOM manifesta-se em duas metades indissociáveis: um objecto nativo rigoroso mantido em C++ e um objecto "invólucro" (</text:span><text:span text:style-name="T3">wrapper</text:span><text:span text:style-name="T1">) associado na Heap do V8, que actua unicamente como um </text:span><text:span text:style-name="T3">proxy</text:span><text:span text:style-name="T6">11</text:span><text:span text:style-name="T1">.</text:span></text:p>
      <text:p text:style-name="P1"><text:span text:style-name="T1">A comunicação entre estas duas metades impõe a chamada "penalidade da travessia" (</text:span><text:span text:style-name="T3">crossing penalty</text:span><text:span text:style-name="T1">). A serialização de strings, a conversão de parâmetros de tipos dinâmicos do JavaScript para tipos estáticos em C++, e a comutação de contextos lógicos introduzem um overhead considerável de latência. Mutações repetitivas ou não agrupadas no DOM nativo aniquilam a taxa de refrescamento visual da aplicação</text:span><text:span text:style-name="T6">12</text:span><text:span text:style-name="T1">.</text:span></text:p>
      <text:p text:style-name="P15"><text:span text:style-name="T1">2.2 TSX, TypeScript e o Virtual DOM</text:span></text:p>
      <text:p text:style-name="P1"><text:span text:style-name="T1">Para mitigar o atrito fatal do cruzamento contínuo entre o motor JavaScript e o DOM nativo, a biblioteca React popularizou a implementação do Virtual DOM (VDOM). Este conceito descreve a instanciação de uma cópia imaculada, ultraleve e puramente lógica de toda a estrutura do ecrã, construída exclusivamente através de instâncias de objectos nativos do JavaScript. Dado que o Virtual DOM habita unicamente na memória interna do V8, a leitura e mutação das suas propriedades acontecem a velocidades vertiginosas e beneficiam plenamente do </text:span><text:span text:style-name="T3">Inline Caching</text:span><text:span text:style-name="T1"> mencionado anteriormente, dispensando na totalidade a comunicação C++ através da </text:span><text:span text:style-name="T3">bridge</text:span><text:span text:style-name="T6">4</text:span><text:span text:style-name="T1">.</text:span></text:p>
      <text:p text:style-name="P1"><text:span text:style-name="T1">Apenas quando o React conclui o seu algoritmo de reconciliação (React Fiber) — operando um cálculo de diferença iterativo (</text:span><text:span text:style-name="T3">diffing</text:span><text:span text:style-name="T1">) entre a árvore virtual anterior e a versão recém-mutada — é que a biblioteca agrupa as diferenças mínimas ("deltas") e as transpõe numa única incursão agrupada e programada em direcção ao DOM nativo, reduzindo exponencialmente as chamadas à camada C++</text:span><text:span text:style-name="T6">12</text:span><text:span text:style-name="T1">.</text:span></text:p>
      <text:p text:style-name="P1"><text:soft-page-break/><text:span text:style-name="T1">Neste panorama da representação virtual, torna-se necessário diferenciar o TypeScript (TS) do TSX. Como estabelecido, o TypeScript é uma infraestrutura de compilação encarregada de injetar segurança estática através de análises de tipo</text:span><text:span text:style-name="T6">15</text:span><text:span text:style-name="T1">. Contudo, a estruturação visual das árvores de componentes do React sob a forma sintáctica que imita o HTML requer uma Linguagem Específica de Domínio (DSL). O JSX foi inicialmente inventado para o JavaScript. O </text:span><text:span text:style-name="T5">TSX</text:span><text:span text:style-name="T1"> não é nada mais que o JSX fortificado pelo compilador TypeScript</text:span><text:span text:style-name="T6">15</text:span><text:span text:style-name="T1">.</text:span></text:p>
      <text:p text:style-name="P1"><text:span text:style-name="T1">A diferença fundamental entre TS e TSX reside na directiva analítica do compilador. A extensão .tsx instrui explicitamente o compilador (o motor tsc, SWC, ou Babel) de que ele encontrará estruturas de etiquetas (&lt;tag&gt;&lt;/tag&gt;) embutidas na lógica imperativa</text:span><text:span text:style-name="T6">15</text:span><text:span text:style-name="T1">. O compilador transplanta e converte sintacticamente o TSX num emaranhado de chamadas funcionais rígidas de JavaScript, normalmente traduzindo &lt;Badge count={1} /&gt; numa instrução como React.createElement(Badge, { count: 1 }) ou o método moderno jsx(Badge, { count: 1 }).</text:span></text:p>
      <text:p text:style-name="P1"><text:span text:style-name="T1">A mais-valia absoluta do TSX reside no facto de que o compilador aplica as restrições tipológicas da aplicação às próprias propriedades (props) e filhos (children) dos componentes, proibindo que parâmetros não declarados contaminem o ecossistema do React. O TSX funciona como um filtro intransigente antes que o Virtual DOM seja erigido na Heap do V8.</text:span></text:p>
      <text:p text:style-name="P17"><text:span text:style-name="T1">3. O Fluxo e Alocação de Dados de Baixa Latência: WebSockets e a Heap do V8</text:span></text:p>
      <text:p text:style-name="P1"><text:span text:style-name="T1">O processamento eficiente no paradigma front-end necessita da alimentação incessante de dados provenientes do servidor (backend). Quando uma arquitectura de alto nível injecta binários optimizados em Go através de ligações WebSocket para o navegador, a fluidez do processamento baseia-se numa orquestração profunda da memória C++.</text:span></text:p>
      <text:p text:style-name="P15"><text:span text:style-name="T1">3.1 WebSockets e Protocolos Binários vs JSON</text:span></text:p>
      <text:p text:style-name="P1"><text:span text:style-name="T1">O protocolo WebSocket (RFC 6455) faculta uma comunicação interactiva e persistente bidireccional (full-duplex) num único canal TCP entre o cliente e o servidor</text:span><text:span text:style-name="T6">16</text:span><text:span text:style-name="T1">. Contrariamente às restrições do protocolo HTTP clássico ou abordagens como o </text:span><text:span text:style-name="T3">long-polling</text:span><text:span text:style-name="T1">, o WebSocket permite ao servidor remeter estímulos reactivos ao ecrã assim que a nova informação é produzida, anulando os constrangimentos excessivos de latência e cabeçalhos de empacotamento pesados</text:span><text:span text:style-name="T6">17</text:span><text:span text:style-name="T1">.</text:span></text:p>
      <text:p text:style-name="P1"><text:span text:style-name="T1">Em infraestruturas de máxima escalabilidade, o uso de texto JSON é frequentemente substituído pelo envio de estruturas compactas em notações binárias avançadas (ex.: </text:span><text:span text:style-name="T5">Protocol Buffers</text:span><text:span text:style-name="T1"> ou </text:span><text:span text:style-name="T5">FlatBuffers</text:span><text:span text:style-name="T1">). O JSON exige transformações lexicais onerosas de descodificação baseadas em dicionários alfanuméricos de longa extensão. Em contraste, dados formatados como binário consomem tipicamente 30% a 70% menos largura de banda e permitem a ingestão de </text:span><text:span text:style-name="T3">bytes</text:span><text:span text:style-name="T1"> pelo processador da forma mais contígua e rápida possível, baixando drasticamente as exigências computacionais quer do binário Go transmissor, quer do motor V8 receptor</text:span><text:span text:style-name="T6">19</text:span><text:span text:style-name="T1">.</text:span></text:p>
      <text:p text:style-name="P15"><text:span text:style-name="T1">3.2 O ArrayBuffer, a Backing Store e a Magia do Ponteiro na V8 Heap</text:span></text:p>
      <text:p text:style-name="P1"><text:span text:style-name="T1">A mecânica que permite que um navegador absorva as estruturas emitidas por um binário Go otimizado, utilizando o WebSocket sem atrofiar o desempenho com cópias recursivas profundas na memória, é uma maravilha engenhosa da interacção inter-linguagens.</text:span></text:p>
      <text:p text:style-name="P1"><text:span text:style-name="T1">Para activar este mecanismo, é imperativo que o engenheiro configure na camada cliente o WebSocket para a directiva de recepção em bruto mediante a configuração da propriedade correspondente no protocolo: ws.binaryType = "arraybuffer"</text:span><text:span text:style-name="T6">17</text:span><text:span text:style-name="T1">. Sem isto, o padrão do navegador (agora convergido para Blob) impõe semânticas de gestão de ficheiros de mais alto nível e processamento de I/O</text:span><text:span text:style-name="T6">23</text:span><text:span text:style-name="T1">.</text:span></text:p>
      <text:p text:style-name="P1"><text:span text:style-name="T1">Com a intenção explícita de processar os dados por meio de estruturas tipo ArrayBuffer, a cascata de apropriação de memória pelo motor V8 desdobra-se num mecanismo de zero-cópia altamente optimizado, mapeado nos seguintes passos exaustos revelados pelos ficheiros de código-fonte em C++ do Chromium (como o referenciado v8-array-buffer.h)</text:span><text:span text:style-name="T6">28</text:span><text:span text:style-name="T1">:</text:span></text:p>
      <text:list xml:id="list2626377031" text:style-name="WWNum1">
        <text:list-item>
          <text:p text:style-name="P4"><text:span text:style-name="T5">A Chegada do Fluxo e a Alocação C++ Nativa:</text:span><text:span text:style-name="T1"> Quando o motor Chromium subjacente (o Blink) acusa a recepção da carga útil sobre o soquete de rede nativo, a infraestrutura reserva e enche um bloco contíguo puro da RAM bruta mantida pela arquitetura operacional C++. Este bloco recebe a denominação técnica isolada de </text:span><text:span text:style-name="T5">BackingStore</text:span><text:span text:style-name="T6">28</text:span><text:span text:style-name="T1">.</text:span></text:p>
        </text:list-item>
        <text:list-item>
          <text:p text:style-name="P4"><text:span text:style-name="T5">Concessão de Representação ao JavaScript (V8):</text:span><text:span text:style-name="T1"> Simultaneamente, as engrenagens de C++ emitem um alerta ao motor V8 para criar a correspondente reflexão visível no espaço governado pelo </text:span><text:span text:style-name="T3">Garbage Collector</text:span><text:span text:style-name="T1"> – instanciando assim o infame objecto da especificação ECMAScript chamado de ArrayBuffer.</text:span></text:p>
        </text:list-item>
        <text:list-item>
          <text:p text:style-name="P4"><text:span text:style-name="T5">Mecânica do Ponteiro Físico Indireto:</text:span><text:span text:style-name="T1"> A magia da minimização de latência revela-se aqui. O V8 </text:span><text:span text:style-name="T5">não executa uma cópia pesada (deep clone)</text:span><text:span text:style-name="T1"> dos milhares ou milhões de </text:span><text:span text:style-name="T3">bytes</text:span><text:span text:style-name="T1"> transportados para construir o ArrayBuffer. Apenas constrói um pequeno cabeçalho JavaScript no </text:span><text:span text:style-name="T3">New Space</text:span><text:span text:style-name="T1"> da sua Heap. Esse cabeçalho serve para expor unicamente um </text:span><text:span text:style-name="T5">ponteiro directo</text:span><text:span text:style-name="T1"> (pointer) que aponta para o endereço subjacente fixo gerido pelo objecto C++ BackingStore (através do método C++ de alocação referenciado por v8::ArrayBuffer::NewBackingStore)</text:span><text:span text:style-name="T6">28</text:span><text:span text:style-name="T1">.</text:span></text:p>
        </text:list-item>
        <text:list-item>
          <text:p text:style-name="P4"><text:span text:style-name="T5">Sincronização C++ e o Ciclo do </text:span><text:span text:style-name="T4">Garbage Collector</text:span><text:span text:style-name="T5">:</text:span><text:span text:style-name="T1"> Este objecto na heap JS do V8 inclui também </text:span><text:span text:style-name="T3">callbacks</text:span><text:span text:style-name="T1"> C++ estritos, como o mecanismo DeleterCallback do código-fonte. Ele governa o exacto momento final em que, quando o objecto na Heap do V8 perde referências activas do programa JS (ficando orfão), a libertação da memória ramifica-se até à camada nativa, sinalizando o descarte definitivo do BackingStore</text:span><text:span text:style-name="T6">28</text:span><text:span text:style-name="T1">. Em sistemas operacionais a 64-bits com "Compressão de Ponteiros", estas ligações reduzem adicionalmente o gasto referencial, usando pequenos descritores comprimidos limitados dentro de uma "gaiola" perimétrica (memory cage) de 4GB</text:span><text:span text:style-name="T6">33</text:span><text:span text:style-name="T1">.</text:span></text:p>
        </text:list-item>
      </text:list>
      <text:p text:style-name="P1"><text:span text:style-name="T1">Em última instância, quando a ligação de </text:span><text:span text:style-name="T3">callback</text:span><text:span text:style-name="T1"> do WebSockets (onmessage) delega o conteúdo da variável event.data, a aplicação em JavaScript possui o controlo de leitura imediato e cru sobre uma vasta gama de informações puras e nativas do sistema hospedado por meio do encapsulamento de Vistas de Arrays Tipados (Typed Array Views, como o Uint8Array), permitindo inspecções directas indexadas e descodificações precisas de entidades como contadores de notificações (notification badge)</text:span><text:span text:style-name="T6">36</text:span><text:span text:style-name="T1">.</text:span></text:p>
      <text:p text:style-name="P17"><text:span text:style-name="T1">4. Orquestração do Fluxo Assíncrono com Zustand e Closures</text:span></text:p>
      <text:p text:style-name="P1"><text:span text:style-name="T1">O momento em que os dados são processados desde a sua forma em binário e o local de injecção dessa informação constitui uma escolha vital de arquitectura de </text:span><text:span text:style-name="T3">software</text:span><text:span text:style-name="T1">. Transitar a carga extraída de uma decodificação densa do WebSocket directamente no componente React inicial — acedendo às estruturas como Context API ou utilizando de imediato mecanismos como o Hook useState baseados na árvore de montagem — induz o temido colapso de "Context Thrashing"</text:span><text:span text:style-name="T6">38</text:span><text:span text:style-name="T1">. Toda a árvore descendente dos componentes ligados pela cadeia de interdependências será obrigada a reavaliar os seus elementos (virtual reconciliation), destruindo no processo de UI todas as optimizações angariadas pelas infraestruturas de rede C++ delineadas até este momento</text:span><text:span text:style-name="T6">38</text:span><text:span text:style-name="T1">.</text:span></text:p>
      <text:p text:style-name="P1"><text:span text:style-name="T1">A solução canónica a este atrito processual em aplicações empresariais assenta fundamentalmente num modelo centralizado e externo ao React, operado pela biblioteca de gestão baseada no padrão </text:span><text:span text:style-name="T3">Flux</text:span><text:span text:style-name="T1">, designada por </text:span><text:span text:style-name="T5">Zustand</text:span><text:span text:style-name="T6">39</text:span><text:span text:style-name="T1">.</text:span></text:p>
      <text:p text:style-name="P15"><text:span text:style-name="T1">4.1 Captura Léxica (Closure) da Memória Zustand</text:span></text:p>
      <text:p text:style-name="P1"><text:soft-page-break/><text:span text:style-name="T1">A intersecção eficiente da funcionalidade da via assíncrona orientada por eventos proveniente da ligação TCP do WebSocket com a actualização persistente de estado deve ser gerida pelo mecanismo intrínseco fundamental das linguagens de processamento de funções de primeira ordem: A invenção da clausura léxica (Closure).</text:span></text:p>
      <text:p text:style-name="P1"><text:span text:style-name="T1">Quando inicializamos e expomos a biblioteca Zustand através do padrão de exportação de </text:span><text:span text:style-name="T3">hook</text:span><text:span text:style-name="T1"> useStore criado por create(), instanciamos sob o enquadramento de raiz, um objecto global completamente externo que alberga as referências primárias de leitura e mutação do estado – vulgarmente conotadas pelos métodos getState() e setState() – emparelhadas a uma lista de subscrições (geralmente alojada sob a interface JavaScript unívoca de Set&lt;listener&gt;)</text:span><text:span text:style-name="T6">40</text:span><text:span text:style-name="T1">.</text:span></text:p>
      <text:p text:style-name="P1"><text:span text:style-name="T1">Esta instância não reage ou interfere com os ciclos renderizados das interfaces React a não ser quando instruída imperativamente. Portanto, instanciamos a clausura ao associar as chamadas ao receptor de rede nativo, conferindo à ligação o poder abstracto de invocação:</text:span></text:p>
      <text:p text:style-name="P7"/>
      <text:p text:style-name="P9"/>
      <text:p text:style-name="P10"/>
      <text:p text:style-name="P11"><text:span text:style-name="T7">TypeScript</text:span></text:p>
      <text:p text:style-name="P8"><text:span text:style-name="T9">import</text:span><text:span text:style-name="T2"> { useNotificationStore } </text:span><text:span text:style-name="T9">from</text:span><text:span text:style-name="T2"> </text:span><text:span text:style-name="T10">'./store'</text:span><text:span text:style-name="T2">;<text:line-break/></text:span><text:span text:style-name="T9">import</text:span><text:span text:style-name="T2"> { decodeOptimizedGoPayload } </text:span><text:span text:style-name="T9">from</text:span><text:span text:style-name="T2"> </text:span><text:span text:style-name="T10">'./proto-decoder'</text:span><text:span text:style-name="T2">;<text:line-break/><text:line-break/></text:span><text:span text:style-name="T9">const</text:span><text:span text:style-name="T2"> ws = </text:span><text:span text:style-name="T9">new</text:span><text:span text:style-name="T2"> WebSocket(</text:span><text:span text:style-name="T10">"ws://optimized-go-server"</text:span><text:span text:style-name="T2">);<text:line-break/>ws.binaryType = </text:span><text:span text:style-name="T10">"arraybuffer"</text:span><text:span text:style-name="T2">;<text:line-break/><text:line-break/></text:span><text:span text:style-name="T11">// A função anónima atua como uma 'Closure' conservando referência à store</text:span><text:span text:style-name="T2"><text:line-break/>ws.onmessage = </text:span><text:span text:style-name="T8">(event) =&gt;</text:span><text:span text:style-name="T2"> {<text:line-break/> <text:s text:c="3"/></text:span><text:span text:style-name="T11">// 1. Extração microscópica na V8 Heap do BackingStore em O(1)</text:span><text:span text:style-name="T2"><text:line-break/> <text:s text:c="3"/></text:span><text:span text:style-name="T9">const</text:span><text:span text:style-name="T2"> notificationData = decodeOptimizedGoPayload(</text:span><text:span text:style-name="T9">new</text:span><text:span text:style-name="T2"> </text:span><text:span text:style-name="T12">Uint8Array</text:span><text:span text:style-name="T2">(event.data));<text:line-break/> <text:s text:c="3"/><text:line-break/> <text:s text:c="3"/></text:span><text:span text:style-name="T11">// 2. Comunicação directa sem invocar instâncias React</text:span><text:span text:style-name="T2"><text:line-break/> <text:s text:c="3"/>useNotificationStore.getState().setNotificationBadge(notificationData.unreadCount);<text:line-break/>};<text:line-break/></text:span></text:p>
      <text:p text:style-name="P1"><text:span text:style-name="T1">Neste panorama da simbiose arquitectura a união entre a invocação do onmessage do WebSocket e as chamadas expostas na variável global submetem o bloco extraído do C++ à clausura lógica em JS, permitindo o armazenamento dos números sem qualquer sobressalto nas dependências visuais. A mutação executa os mecanismos baseados na imutabilidade no Zustand que constróem uma nova raiz estrutural mantendo referencialmente a antiga e propagam a mutação às referências de subscrições numa janela temporal reduzida a níveis de sub-milissegundos na memória interna do V8</text:span><text:span text:style-name="T6">40</text:span><text:span text:style-name="T1">.</text:span></text:p>
      <text:p text:style-name="P17"><text:span text:style-name="T1">5. A Engenharia do Micro-Renderização (Micro-Render): Zustand, uSES e React</text:span></text:p>
      <text:p text:style-name="P1"><text:span text:style-name="T1">O momento terminal da longa coreografia de optimização ocorre quando as entidades da interface reagem às injecções impostas pelos subsistemas do WebSocket no Zustand, operando e induzindo uma repintura selectiva do modelo gráfico - vulgarmente chamado de um renderizado microscópico ("micro-render"), cujo impacto imperativo consiste em evitar que toda a aplicação seja contaminada</text:span><text:span text:style-name="T6">40</text:span><text:span text:style-name="T1">.</text:span></text:p>
      <text:p text:style-name="P15"><text:span text:style-name="T1">5.1 Renderização Concorrente e a Anatomia do Tearing</text:span></text:p>
      <text:p text:style-name="P1"><text:span text:style-name="T1">Historicamente e em sistemas desactualizados baseados no emprego indiscriminado de abordagens conjuntas de useEffect dependentes da observabilidade assíncrona, existia um problema destrutivo originado pelas filosofias concorrentes introduzidas pelo React versão 18. Nos paradigmas visuais regidos pelas características concorrentes (</text:span><text:span text:style-name="T3">Concurrent Features</text:span><text:span text:style-name="T1">), as acções do processador podem ser intencionalmente pausadas para escalonar prioridades superiores, provocando o indesejado e nocivo efeito de fragmentação visual apelidado de </text:span><text:span text:style-name="T5">Tearing</text:span><text:span text:style-name="T1"> ("Rasgo")</text:span><text:span text:style-name="T6">38</text:span><text:span text:style-name="T1">.</text:span></text:p>
      <text:p text:style-name="P1"><text:span text:style-name="T1">O Tearing é o fenómeno fatal onde o motor base visual inicia um ciclo renderizado extraindo dados persistentes de instâncias velhas de um objecto externo em processos do ecrã e, a meio de ser suspenso por outro processo de evento (como um pacote novo no Websocket), absorve por conseguinte referências completamente desconexas, provocando em tela a anomalia grave em que o ecrã desenha porções que estão incongruentes entre si na mesma interface de visualização</text:span><text:span text:style-name="T6">38</text:span><text:span text:style-name="T1">.</text:span></text:p>
      <text:p text:style-name="P1"><text:span text:style-name="T1">A resolução deste calcanhar de Aquiles consistiu na promulgação pela equipa base do desenvolvimento React de uma primitiva (Hook) imaculada, determinista e extremamente rígida de observação síncrona conhecida globalmente como </text:span><text:span text:style-name="T5">useSyncExternalStore (uSES)</text:span><text:span text:style-name="T6">48</text:span><text:span text:style-name="T1">. Este interface API é adoptado no cerne do código de bibliotecas como Zustand mediante uma versão extensiva equipada de ferramentas dedutíveis de escolha granular referenciada no seu </text:span><text:span text:style-name="T3">shim</text:span><text:span text:style-name="T1"> interno por useSyncExternalStoreWithSelector e injectado na biblioteca base sob o utilitário referencial useStoreWithEqualityFn</text:span><text:span text:style-name="T6">41</text:span><text:span text:style-name="T1">.</text:span></text:p>
      <text:p text:style-name="P15"><text:span text:style-name="T1">5.2 O Mecanismo do Selector, o Object.is e o Agendamento de Otimização no React</text:span></text:p>
      <text:p text:style-name="P1"><text:span text:style-name="T1">O componente de detalhe (como o elemento visual representativo de um ícone que apresenta a quantidade de notificações, chamado notification badge) requer, para sua exclusiva subsistência gráfica e imperativa da aplicação, a subscrição focada na biblioteca Zustand. Para realizar tal facto o componente submete ao Zustand uma declaração abstracta orientada (o </text:span><text:span text:style-name="T3">Selector</text:span><text:span text:style-name="T1">):</text:span></text:p>
      <text:p text:style-name="P7"/>
      <text:p text:style-name="P9"/>
      <text:p text:style-name="P10"/>
      <text:p text:style-name="P11"><text:span text:style-name="T7">TypeScript</text:span></text:p>
      <text:p text:style-name="P8"><text:soft-page-break/><text:span text:style-name="T2">// Registo micro-focado utilizando a extracção orientada ao elemento sub-árvore<text:line-break/>const badgeCount = useStore(state =&gt; state.notificationBadge);<text:line-break/></text:span></text:p>
      <text:p text:style-name="P1"><text:span text:style-name="T1">Sob esta configuração discreta, o encadeamento integral despoleta em harmonia entre a arquitectura Zustand e os processos centrais lógicos de Fiber e os </text:span><text:span text:style-name="T3">hooks</text:span><text:span text:style-name="T1"> reactivos implementados no uSES:</text:span></text:p>
      <text:list xml:id="list4148361284" text:style-name="WWNum2">
        <text:list-item>
          <text:p text:style-name="P5"><text:span text:style-name="T5">A Assinatura Síncrona (subscribe):</text:span><text:span text:style-name="T1"> Ao instanciar as funções da </text:span><text:span text:style-name="T3">store</text:span><text:span text:style-name="T1">, o React providencia de forma nativa e internalizada na estrutura global uma acção reativa chamada </text:span><text:span text:style-name="T3">listener</text:span><text:span text:style-name="T6">45</text:span><text:span text:style-name="T1">. Esta chamada reativa transita para o ecossistema Zustand alimentada pelo </text:span><text:span text:style-name="T3">hook</text:span><text:span text:style-name="T1"> uSES. O Zustand imediatamente anexa esta invocação ao rol exaustivo de subscrições aglomeradas em iteradores de Set contidos na inicialização da memória</text:span><text:span text:style-name="T6">40</text:span><text:span text:style-name="T1">.</text:span></text:p>
        </text:list-item>
        <text:list-item>
          <text:p text:style-name="P5"><text:span text:style-name="T5">Registro de Referência de Memória (getSnapshot):</text:span><text:span text:style-name="T1"> O uSES requisita de imediato a captação imutável estrita dos metadados extraídos apenas sob orientação precisa do modelo de selecção — captando de imediato e em exclusivo a referência absoluta da alocação de registo isolada de variáveis numéricas das notificações</text:span><text:span text:style-name="T6">45</text:span><text:span text:style-name="T1">.</text:span></text:p>
        </text:list-item>
      </text:list>
      <text:p text:style-name="P15"><text:span text:style-name="T1">5.3 Event Emitters e Exclusividade Matemática O(1) do Micro-Componente</text:span></text:p>
      <text:p text:style-name="P1"><text:span text:style-name="T1">O momento final da activação dá-se aquando a emissão assíncrona proveniente do fluxo Go envia sobre a camada WebSocket os comandos para a alteração via as Closures em setState. Esta acção despoleta as capacidades inerentes às máquinas baseadas na publicação passiva do Zustand operando o sistema </text:span><text:span text:style-name="T5">Event Emitter</text:span><text:span text:style-name="T1">.</text:span></text:p>
      <text:p text:style-name="P1"><text:span text:style-name="T1">A biblioteca varre toda a aglomeração isolada das subscrições instanciadas nas suas instâncias, processando de forma ubíqua através das directivas internas de execução das árvores assíncronas listeners.forEach((listener) =&gt; listener())</text:span><text:span text:style-name="T6">41</text:span><text:span text:style-name="T1">. Em resultado deste evento orquestrado pelo Zustand, os componentes registados nos meandros e ramificações base da árvore React (sendo instigados por aquela invocação listener do uSES) sofrem um aviso massivo em que lhes são pedidas avaliações</text:span><text:span text:style-name="T6">52</text:span><text:span text:style-name="T1">.</text:span></text:p>
      <text:p text:style-name="P1"><text:span text:style-name="T1">As directivas rígidas de execução reactivas invocam instâncias sucessivas das selecções das "fotografias" comparadas num algoritmo em tempo real ditado pela função comparativa e subjacente em Javascript nativo Object.is (conhecida coloquialmente como </text:span><text:span text:style-name="T3">Equality Function</text:span><text:span text:style-name="T1">, ou Função de Igualdade Referencial) comparando referências físicas exatas e restritas das sub-árvores seleccionadas entre a antiga cópia residente da renderização pré-estacionária da uSES com a réplica gerada subsequentemente na V8</text:span><text:span text:style-name="T6">38</text:span><text:span text:style-name="T1">.</text:span></text:p>
      <text:p text:style-name="P1"><text:span text:style-name="T5">O Triunfo da Isenção Bailing Out:</text:span><text:span text:style-name="T1"> A extrema e absoluta totalidade esmagadora da interface (conjecturalmente 99% correspondente ao núcleo de apresentação principal que inclui topologias e ramificações dos </text:span><text:span text:style-name="T3">feeds</text:span><text:span text:style-name="T1"> massivos, interfaces modais flutuantes, tabelas e processamentos gráficos que registam os painéis operacionais da </text:span><text:span text:style-name="T3">Dashboard</text:span><text:span text:style-name="T1">) </text:span><text:span text:style-name="T5">continuará a emitir equivalência absoluta no selector subscrito (true)</text:span><text:span text:style-name="T1">, porque os seus </text:span><text:span text:style-name="T3">pointers</text:span><text:span text:style-name="T1"> de memória e as matrizes que representam no V8 </text:span><text:span text:style-name="T5">não sofreram qualquer transição referencial originada pelas instruções de mutação da badge</text:span><text:span text:style-name="T6">38</text:span><text:span text:style-name="T1">. Ao verificar uma compatibilidade positiva com exactidão de semânticas estruturais matemáticas subjacentes, a máquina abstracta (React Fiber) detém instantaneamente dezenas de iterações do processamento, forçando a cessão abrupta de avaliações (fenómeno coloquialmente cognominado </text:span><text:span text:style-name="T3">bailing out</text:span><text:span text:style-name="T1">) abandonando o estado recursivo e rejeitando alocar CPU às renderizações visuais secundárias</text:span><text:span text:style-name="T6">38</text:span><text:span text:style-name="T1">.</text:span></text:p>
      <text:p text:style-name="P1"><text:span text:style-name="T1">Simultaneamente, ao interrogar a exclusiva fracção de componente isolada contida sob os eixos algorítmicos englobando a NotificationBadge, o Object.is assinala com imediata reprovação matemática uma divergência factual de referências</text:span><text:span text:style-name="T6">54</text:span><text:span text:style-name="T1">.</text:span></text:p>
      <text:p text:style-name="P1"><text:span text:style-name="T1">Em resposta à falsidade atómica, a máquina React compele de modo imperativo a instrução técnica de enfileiramento abstracta scheduleUpdateOnFiber de incidência rigorosamente cirúrgica e unicamente direccionada ao elemento respectivo visado</text:span><text:span text:style-name="T6">54</text:span><text:span text:style-name="T1">. O processo constrói com as estruturas nativas optimizadas de Virtual DOM apenas e unicamente o código e as métricas actualizadas baseadas nos atributos provenientes destas estruturas pontuais. O React finaliza a sua incursão, submetendo estas exíguas manipulações aos canais das "C++ Bindings" do ecossistema DOM do navegador, substituindo a integridade lógica da string que reflecte a alteração dos valores das notificações num lapso de sub-milissegundos.</text:span></text:p>
      <text:p text:style-name="P12"><text:span text:style-name="T1">O escopo colossal compreendido entre as intersecções de arquitecturas translinguagens optimizadas a nível molecular, com instâncias estritas geridas sob a jurisdição subjacente destas filosofias concorrentes, estabelece de modo integral o verdadeiro paradigma insubstituível que propaga, desde uma rede TCP instável até as interfaces visuais React isoladas, a melhor eficiência alcançável pela tecnologia do desenvolvimento de aplicações web empresariais contemporâneas.</text:span></text:p>
      <text:p text:style-name="P14"><text:span text:style-name="T13">Referências citadas</text:span></text:p>
      <text:list xml:id="list4158814740" text:style-name="WWNum3">
        <text:list-item>
          <text:p text:style-name="P6"><text:span text:style-name="T14">JavaScript Engines - 33 JavaScript Concepts, </text:span><text:a xlink:type="simple" xlink:href="https://33jsconcepts.com/concepts/javascript-engines" text:style-name="ListLabel_20_28" text:visited-style-name="ListLabel_20_28"><text:span text:style-name="T15">https://33jsconcepts.com/concepts/javascript-engines</text:span></text:a></text:p>
        </text:list-item>
        <text:list-item>
          <text:p text:style-name="P6"><text:span text:style-name="T14">V8 JavaScript Engine in Node.js: Architecture, Tiers, Shapes, and Deoptimization, </text:span><text:a xlink:type="simple" xlink:href="https://www.thenodebook.com/node-arch/v8-engine-intro" text:style-name="ListLabel_20_28" text:visited-style-name="ListLabel_20_28"><text:span text:style-name="T15">https://www.thenodebook.com/node-arch/v8-engine-intro</text:span></text:a></text:p>
        </text:list-item>
        <text:list-item>
          <text:p text:style-name="P6"><text:span text:style-name="T14">Understanding and Tuning Memory | Node.js Learn, </text:span><text:a xlink:type="simple" xlink:href="https://nodejs.org/learn/diagnostics/memory/understanding-and-tuning-memory" text:style-name="ListLabel_20_28" text:visited-style-name="ListLabel_20_28"><text:span text:style-name="T15">https://nodejs.org/learn/diagnostics/memory/understanding-and-tuning-memory</text:span></text:a></text:p>
        </text:list-item>
        <text:list-item>
          <text:p text:style-name="P6"><text:span text:style-name="T14">Performance tips for JavaScript in V8 | Articles - web.dev, </text:span><text:a xlink:type="simple" xlink:href="https://web.dev/articles/speed-v8" text:style-name="ListLabel_20_28" text:visited-style-name="ListLabel_20_28"><text:span text:style-name="T15">https://web.dev/articles/speed-v8</text:span></text:a></text:p>
        </text:list-item>
        <text:list-item>
          <text:p text:style-name="P6"><text:span text:style-name="T14">Hidden Classes: The JavaScript performance secret that changed everything, </text:span><text:a xlink:type="simple" xlink:href="https://dev.to/maxprilutskiy/hidden-classes-the-javascript-performance-secret-that-changed-everything-3p6c" text:style-name="ListLabel_20_28" text:visited-style-name="ListLabel_20_28"><text:span text:style-name="T15">https://dev.to/maxprilutskiy/hidden-classes-the-javascript-performance-secret-that-changed-everything-3p6c</text:span></text:a></text:p>
        </text:list-item>
        <text:list-item>
          <text:p text:style-name="P6"><text:span text:style-name="T14">Maps (Hidden Classes) in V8 - V8.dev, </text:span><text:a xlink:type="simple" xlink:href="https://v8.dev/docs/hidden-classes" text:style-name="ListLabel_20_28" text:visited-style-name="ListLabel_20_28"><text:span text:style-name="T15">https://v8.dev/docs/hidden-classes</text:span></text:a></text:p>
        </text:list-item>
        <text:list-item>
          <text:p text:style-name="P6"><text:span text:style-name="T14">The V8 Engine Series III: Inline Caching — Unlocking JavaScript Performance, </text:span><text:a xlink:type="simple" xlink:href="https://braineanear.medium.com/the-v8-engine-series-iii-inline-caching-unlocking-javascript-performance-51cf09a64cc3" text:style-name="ListLabel_20_28" text:visited-style-name="ListLabel_20_28"><text:span text:style-name="T15">https://braineanear.medium.com/the-v8-engine-series-iii-inline-caching-unlocking-javascript-performance-51cf09a64cc3</text:span></text:a></text:p>
        </text:list-item>
        <text:list-item>
          <text:p text:style-name="P6"><text:span text:style-name="T14">V8 Hidden class - line engineering, </text:span><text:a xlink:type="simple" xlink:href="https://engineering.linecorp.com/en/blog/v8-hidden-class/" text:style-name="ListLabel_20_28" text:visited-style-name="ListLabel_20_28"><text:span text:style-name="T15">https://engineering.linecorp.com/en/blog/v8-hidden-class/</text:span></text:a></text:p>
        </text:list-item>
        <text:list-item>
          <text:p text:style-name="P6"><text:soft-page-break/><text:span text:style-name="T14">Hidden classes in JavaScript and Inline Caching - Gist - GitHub, </text:span><text:a xlink:type="simple" xlink:href="https://gist.github.com/twokul/9501770" text:style-name="ListLabel_20_28" text:visited-style-name="ListLabel_20_28"><text:span text:style-name="T15">https://gist.github.com/twokul/9501770</text:span></text:a></text:p>
        </text:list-item>
        <text:list-item>
          <text:p text:style-name="P6"><text:span text:style-name="T14">Documentation - V8 JavaScript engine, </text:span><text:a xlink:type="simple" xlink:href="https://v8.dev/docs" text:style-name="ListLabel_20_28" text:visited-style-name="ListLabel_20_28"><text:span text:style-name="T15">https://v8.dev/docs</text:span></text:a></text:p>
        </text:list-item>
        <text:list-item>
          <text:p text:style-name="P6"><text:span text:style-name="T14">Tracing from JS to the DOM and back again - V8.dev, </text:span><text:a xlink:type="simple" xlink:href="https://v8.dev/blog/tracing-js-dom" text:style-name="ListLabel_20_28" text:visited-style-name="ListLabel_20_28"><text:span text:style-name="T15">https://v8.dev/blog/tracing-js-dom</text:span></text:a></text:p>
        </text:list-item>
        <text:list-item>
          <text:p text:style-name="P6"><text:span text:style-name="T14">Demystifying Node.js Architecture: V8, libuv, and the Hidden C++ Bridge - DEV Community, </text:span><text:a xlink:type="simple" xlink:href="https://dev.to/aabiskar/demystifying-nodejs-architecture-v8-libuv-and-the-hidden-c-bridge-728" text:style-name="ListLabel_20_28" text:visited-style-name="ListLabel_20_28"><text:span text:style-name="T15">https://dev.to/aabiskar/demystifying-nodejs-architecture-v8-libuv-and-the-hidden-c-bridge-728</text:span></text:a></text:p>
        </text:list-item>
        <text:list-item>
          <text:p text:style-name="P6"><text:span text:style-name="T14">Design of V8 bindings, </text:span><text:a xlink:type="simple" xlink:href="https://chromium.googlesource.com/chromium/src/+/master/third_party/blink/renderer/bindings/core/v8/V8BindingDesign.md" text:style-name="ListLabel_20_28" text:visited-style-name="ListLabel_20_28"><text:span text:style-name="T15">https://chromium.googlesource.com/chromium/src/+/master/third_party/blink/renderer/bindings/core/v8/V8BindingDesign.md</text:span></text:a></text:p>
        </text:list-item>
        <text:list-item>
          <text:p text:style-name="P6"><text:span text:style-name="T14">node.js - v8 Engine - Why is calling native code from JS so expensive? - Stack Overflow, </text:span><text:a xlink:type="simple" xlink:href="https://stackoverflow.com/questions/42874423/v8-engine-why-is-calling-native-code-from-js-so-expensive" text:style-name="ListLabel_20_28" text:visited-style-name="ListLabel_20_28"><text:span text:style-name="T15">https://stackoverflow.com/questions/42874423/v8-engine-why-is-calling-native-code-from-js-so-expensive</text:span></text:a></text:p>
        </text:list-item>
        <text:list-item>
          <text:p text:style-name="P6"><text:span text:style-name="T14">discordcore, uploaded:discordcore</text:span></text:p>
        </text:list-item>
        <text:list-item>
          <text:p text:style-name="P6"><text:span text:style-name="T14">WebSocket API (WebSockets) - Web APIs - MDN Web Docs, </text:span><text:a xlink:type="simple" xlink:href="https://developer.mozilla.org/en-US/docs/Web/API/WebSockets_API" text:style-name="ListLabel_20_28" text:visited-style-name="ListLabel_20_28"><text:span text:style-name="T15">https://developer.mozilla.org/en-US/docs/Web/API/WebSockets_API</text:span></text:a></text:p>
        </text:list-item>
        <text:list-item>
          <text:p text:style-name="P6"><text:span text:style-name="T14">WebSocket - The Modern JavaScript Tutorial, </text:span><text:a xlink:type="simple" xlink:href="https://javascript.info/websocket" text:style-name="ListLabel_20_28" text:visited-style-name="ListLabel_20_28"><text:span text:style-name="T15">https://javascript.info/websocket</text:span></text:a></text:p>
        </text:list-item>
        <text:list-item>
          <text:p text:style-name="P6"><text:span text:style-name="T14">Introducing WebSockets - Bringing Sockets to the Web | Articles, </text:span><text:a xlink:type="simple" xlink:href="https://web.dev/articles/websockets-basics" text:style-name="ListLabel_20_28" text:visited-style-name="ListLabel_20_28"><text:span text:style-name="T15">https://web.dev/articles/websockets-basics</text:span></text:a></text:p>
        </text:list-item>
        <text:list-item>
          <text:p text:style-name="P6"><text:span text:style-name="T14">gRPC vs. WebSocket: Key differences and which to use - Ably, </text:span><text:a xlink:type="simple" xlink:href="https://ably.com/topic/grpc-vs-websocket" text:style-name="ListLabel_20_28" text:visited-style-name="ListLabel_20_28"><text:span text:style-name="T15">https://ably.com/topic/grpc-vs-websocket</text:span></text:a></text:p>
        </text:list-item>
        <text:list-item>
          <text:p text:style-name="P6"><text:span text:style-name="T14">EP.103 Optimizing Latency with Binary Protocol and Protobuf | Superdev Academy, </text:span><text:a xlink:type="simple" xlink:href="https://www.superdevacademy.com/en/blogs/ep-103-optimize-latency-with-binary-protocol-and-protobuf" text:style-name="ListLabel_20_28" text:visited-style-name="ListLabel_20_28"><text:span text:style-name="T15">https://www.superdevacademy.com/en/blogs/ep-103-optimize-latency-with-binary-protocol-and-protobuf</text:span></text:a></text:p>
        </text:list-item>
        <text:list-item>
          <text:p text:style-name="P6"><text:span text:style-name="T14">Can gRPC replace REST and WebSockets for Web Application Communication?, </text:span><text:a xlink:type="simple" xlink:href="https://grpc.io/blog/postman-grpcweb/" text:style-name="ListLabel_20_28" text:visited-style-name="ListLabel_20_28"><text:span text:style-name="T15">https://grpc.io/blog/postman-grpcweb/</text:span></text:a></text:p>
        </text:list-item>
        <text:list-item>
          <text:p text:style-name="P6"><text:span text:style-name="T14">JSON vs FlatBuffers vs Protocol Buffers - DEV Community, </text:span><text:a xlink:type="simple" xlink:href="https://dev.to/eminetto/json-vs-flatbuffers-vs-protocol-buffers-526p" text:style-name="ListLabel_20_28" text:visited-style-name="ListLabel_20_28"><text:span text:style-name="T15">https://dev.to/eminetto/json-vs-flatbuffers-vs-protocol-buffers-526p</text:span></text:a></text:p>
        </text:list-item>
        <text:list-item>
          <text:p text:style-name="P6"><text:span text:style-name="T14">WebSocket: binaryType property - Web APIs | MDN, </text:span><text:a xlink:type="simple" xlink:href="https://developer.mozilla.org/en-US/docs/Web/API/WebSocket/binaryType" text:style-name="ListLabel_20_28" text:visited-style-name="ListLabel_20_28"><text:span text:style-name="T15">https://developer.mozilla.org/en-US/docs/Web/API/WebSocket/binaryType</text:span></text:a></text:p>
        </text:list-item>
        <text:list-item>
          <text:p text:style-name="P6"><text:span text:style-name="T14">property binaryType | Bun module, </text:span><text:a xlink:type="simple" xlink:href="https://bun.com/reference/bun/ServerWebSocket/binaryType" text:style-name="ListLabel_20_28" text:visited-style-name="ListLabel_20_28"><text:span text:style-name="T15">https://bun.com/reference/bun/ServerWebSocket/binaryType</text:span></text:a></text:p>
        </text:list-item>
        <text:list-item>
          <text:p text:style-name="P6"><text:span text:style-name="T14">BinaryType - WebSockets - Web documentation - Deno Docs, </text:span><text:a xlink:type="simple" xlink:href="https://docs.deno.com/api/web/~/BinaryType" text:style-name="ListLabel_20_28" text:visited-style-name="ListLabel_20_28"><text:span text:style-name="T15">https://docs.deno.com/api/web/~/BinaryType</text:span></text:a></text:p>
        </text:list-item>
        <text:list-item>
          <text:p text:style-name="P6"><text:span text:style-name="T14">WebSocket binary messages now delivered as Blob by default · Changelog, </text:span><text:a xlink:type="simple" xlink:href="https://developers.cloudflare.com/changelog/post/2026-04-21-websocket-standard-binary-type/" text:style-name="ListLabel_20_28" text:visited-style-name="ListLabel_20_28"><text:span text:style-name="T15">https://developers.cloudflare.com/changelog/post/2026-04-21-websocket-standard-binary-type/</text:span></text:a></text:p>
        </text:list-item>
        <text:list-item>
          <text:p text:style-name="P6"><text:span text:style-name="T14">Binary-Data over WebSockets not supported? - Google Groups, </text:span><text:a xlink:type="simple" xlink:href="https://groups.google.com/a/chromium.org/g/chromium-html5/c/dJ0ujrRgxVg" text:style-name="ListLabel_20_28" text:visited-style-name="ListLabel_20_28"><text:span text:style-name="T15">https://groups.google.com/a/chromium.org/g/chromium-html5/c/dJ0ujrRgxVg</text:span></text:a></text:p>
        </text:list-item>
        <text:list-item>
          <text:p text:style-name="P6"><text:span text:style-name="T14">include/v8-array-buffer.h - Google Git, </text:span><text:a xlink:type="simple" xlink:href="https://chromium.googlesource.com/v8/v8/+/0ca76d05e629f9d00297a1ca2c346a0827491deb/include/v8-array-buffer.h" text:style-name="ListLabel_20_28" text:visited-style-name="ListLabel_20_28"><text:span text:style-name="T15">https://chromium.googlesource.com/v8/v8/+/0ca76d05e629f9d00297a1ca2c346a0827491deb/include/v8-array-buffer.h</text:span></text:a></text:p>
        </text:list-item>
        <text:list-item>
          <text:p text:style-name="P6"><text:span text:style-name="T14">v8: ArrayBuffer Class Reference - v8docs, </text:span><text:a xlink:type="simple" xlink:href="https://v8docs.nodesource.com/node-13.2/d5/d6e/classv8_1_1_array_buffer.html" text:style-name="ListLabel_20_28" text:visited-style-name="ListLabel_20_28"><text:span text:style-name="T15">https://v8docs.nodesource.com/node-13.2/d5/d6e/classv8_1_1_array_buffer.html</text:span></text:a></text:p>
        </text:list-item>
        <text:list-item>
          <text:p text:style-name="P6"><text:soft-page-break/><text:span text:style-name="T14">v8::BackingStore Class Reference - GitHub Pages, </text:span><text:a xlink:type="simple" xlink:href="https://v8.github.io/api/head/classv8_1_1BackingStore.html" text:style-name="ListLabel_20_28" text:visited-style-name="ListLabel_20_28"><text:span text:style-name="T15">https://v8.github.io/api/head/classv8_1_1BackingStore.html</text:span></text:a></text:p>
        </text:list-item>
        <text:list-item>
          <text:p text:style-name="P6"><text:span text:style-name="T14">ArrayBuffer in v8 - Rust - Docs.rs, </text:span><text:a xlink:type="simple" xlink:href="https://docs.rs/v8/latest/v8/struct.ArrayBuffer.html" text:style-name="ListLabel_20_28" text:visited-style-name="ListLabel_20_28"><text:span text:style-name="T15">https://docs.rs/v8/latest/v8/struct.ArrayBuffer.html</text:span></text:a></text:p>
        </text:list-item>
        <text:list-item>
          <text:p text:style-name="P6"><text:span text:style-name="T14">Memory Ownership Models: When JavaScript Meets Native Code - Callstack, </text:span><text:a xlink:type="simple" xlink:href="https://www.callstack.com/blog/memory-ownership-models-when-javascript-meets-native-code" text:style-name="ListLabel_20_28" text:visited-style-name="ListLabel_20_28"><text:span text:style-name="T15">https://www.callstack.com/blog/memory-ownership-models-when-javascript-meets-native-code</text:span></text:a></text:p>
        </text:list-item>
        <text:list-item>
          <text:p text:style-name="P6"><text:span text:style-name="T14">V8 Heap Archaeology: Finding Exploitation Artifacts in Chrome's Memory - SpecterOps, </text:span><text:a xlink:type="simple" xlink:href="https://specterops.io/blog/2026/02/11/v8-heap-archaeology-finding-exploitation-artifacts-in-chromes-memory/" text:style-name="ListLabel_20_28" text:visited-style-name="ListLabel_20_28"><text:span text:style-name="T15">https://specterops.io/blog/2026/02/11/v8-heap-archaeology-finding-exploitation-artifacts-in-chromes-memory/</text:span></text:a></text:p>
        </text:list-item>
        <text:list-item>
          <text:p text:style-name="P6"><text:span text:style-name="T14">v8: ArrayBuffer Class Reference - v8docs, </text:span><text:a xlink:type="simple" xlink:href="https://v8docs.nodesource.com/node-16.0/d5/d6e/classv8_1_1_array_buffer.html" text:style-name="ListLabel_20_28" text:visited-style-name="ListLabel_20_28"><text:span text:style-name="T15">https://v8docs.nodesource.com/node-16.0/d5/d6e/classv8_1_1_array_buffer.html</text:span></text:a></text:p>
        </text:list-item>
        <text:list-item>
          <text:p text:style-name="P6"><text:span text:style-name="T14">ArrayBuffer::New() without a BackingStore is deprecated in V8 8.0 · Issue #30529 · nodejs/node - GitHub, </text:span><text:a xlink:type="simple" xlink:href="https://github.com/nodejs/node/issues/30529" text:style-name="ListLabel_20_28" text:visited-style-name="ListLabel_20_28"><text:span text:style-name="T15">https://github.com/nodejs/node/issues/30529</text:span></text:a></text:p>
        </text:list-item>
        <text:list-item>
          <text:p text:style-name="P6"><text:span text:style-name="T14">Sound scheduling issue when playing OPUS from websocket - Stack Overflow, </text:span><text:a xlink:type="simple" xlink:href="https://stackoverflow.com/questions/64663507/sound-scheduling-issue-when-playing-opus-from-websocket" text:style-name="ListLabel_20_28" text:visited-style-name="ListLabel_20_28"><text:span text:style-name="T15">https://stackoverflow.com/questions/64663507/sound-scheduling-issue-when-playing-opus-from-websocket</text:span></text:a></text:p>
        </text:list-item>
        <text:list-item>
          <text:p text:style-name="P6"><text:span text:style-name="T14">Being fast and light: Using binary data to optimise libraries on the client and the server. | by Ada Rose Cannon | Samsung Internet Developers | Medium, </text:span><text:a xlink:type="simple" xlink:href="https://medium.com/samsung-internet-dev/being-fast-and-light-using-binary-data-to-optimise-libraries-on-the-client-and-the-server-5709f06ef105" text:style-name="ListLabel_20_28" text:visited-style-name="ListLabel_20_28"><text:span text:style-name="T15">https://medium.com/samsung-internet-dev/being-fast-and-light-using-binary-data-to-optimise-libraries-on-the-client-and-the-server-5709f06ef105</text:span></text:a></text:p>
        </text:list-item>
        <text:list-item>
          <text:p text:style-name="P6"><text:span text:style-name="T14">React Context Performance Trap: Eliminate Re-renders with useSyncExternalStore, </text:span><text:a xlink:type="simple" xlink:href="https://azguards.com/performance-optimization/the-propagation-penalty-bypassing-react-context-re-renders-via-usesyncexternalstore/" text:style-name="ListLabel_20_28" text:visited-style-name="ListLabel_20_28"><text:span text:style-name="T15">https://azguards.com/performance-optimization/the-propagation-penalty-bypassing-react-context-re-renders-via-usesyncexternalstore/</text:span></text:a></text:p>
        </text:list-item>
        <text:list-item>
          <text:p text:style-name="P6"><text:span text:style-name="T14">You Don't Need Zustand: useSyncExternalStore Is All You Need : r/reactjs - Reddit, </text:span><text:a xlink:type="simple" xlink:href="https://www.reddit.com/r/reactjs/comments/1se4355/you_dont_need_zustand_usesyncexternalstore_is_all/" text:style-name="ListLabel_20_28" text:visited-style-name="ListLabel_20_28"><text:span text:style-name="T15">https://www.reddit.com/r/reactjs/comments/1se4355/you_dont_need_zustand_usesyncexternalstore_is_all/</text:span></text:a></text:p>
        </text:list-item>
        <text:list-item>
          <text:p text:style-name="P6"><text:span text:style-name="T14">React's useSyncExternalStore &amp; Zustand Guide, </text:span><text:a xlink:type="simple" xlink:href="https://ishqelliot.hashnode.dev/underrated-react-api-usesyncexternalstore-and-understanding-zustand" text:style-name="ListLabel_20_28" text:visited-style-name="ListLabel_20_28"><text:span text:style-name="T15">https://ishqelliot.hashnode.dev/underrated-react-api-usesyncexternalstore-and-understanding-zustand</text:span></text:a></text:p>
        </text:list-item>
        <text:list-item>
          <text:p text:style-name="P6"><text:span text:style-name="T14">Zustand source code analysis: Chapter 1 external store | by Junji Lu | Medium, </text:span><text:a xlink:type="simple" xlink:href="https://medium.com/@lujunji/zustand-source-code-analysis-chapter-1-external-store-005db8379769" text:style-name="ListLabel_20_28" text:visited-style-name="ListLabel_20_28"><text:span text:style-name="T15">https://medium.com/@lujunji/zustand-source-code-analysis-chapter-1-external-store-005db8379769</text:span></text:a></text:p>
        </text:list-item>
        <text:list-item>
          <text:p text:style-name="P6"><text:span text:style-name="T14">Reimagining Zustand: My Journey to Building a Custom State Management Solution in React | by Ardeshir Eshghi | Medium, </text:span><text:a xlink:type="simple" xlink:href="https://medium.com/@aeshghi/reimagining-zustand-my-journey-to-building-a-custom-state-management-solution-in-react-5a7b0398d765" text:style-name="ListLabel_20_28" text:visited-style-name="ListLabel_20_28"><text:span text:style-name="T15">https://medium.com/@aeshghi/reimagining-zustand-my-journey-to-building-a-custom-state-management-solution-in-react-5a7b0398d765</text:span></text:a></text:p>
        </text:list-item>
        <text:list-item>
          <text:p text:style-name="P6"><text:span text:style-name="T14">createWithEqualityFn - Zustand, </text:span><text:a xlink:type="simple" xlink:href="https://zustand.docs.pmnd.rs/reference/apis/create-with-equality-fn" text:style-name="ListLabel_20_28" text:visited-style-name="ListLabel_20_28"><text:span text:style-name="T15">https://zustand.docs.pmnd.rs/reference/apis/create-with-equality-fn</text:span></text:a></text:p>
        </text:list-item>
        <text:list-item>
          <text:p text:style-name="P6"><text:span text:style-name="T14">useSyncExternalStore — synchronizing external state with React components - Medium, </text:span><text:a xlink:type="simple" xlink:href="https://medium.com/@ignatovich.dm/usesyncexternalstore-synchronizing-external-state-with-react-components-bc4e2b27338f" text:style-name="ListLabel_20_28" text:visited-style-name="ListLabel_20_28"><text:span text:style-name="T15">https://medium.com/@ignatovich.dm/usesyncexternalstore-synchronizing-external-state-with-react-components-bc4e2b27338f</text:span></text:a></text:p>
        </text:list-item>
        <text:list-item>
          <text:p text:style-name="P6"><text:span text:style-name="T14">useSyncExternalStore: Demystified for Practical React Development, </text:span><text:a xlink:type="simple" xlink:href="https://www.epicreact.dev/use-sync-external-store-demystified-for-practical-react-development-w5ac0" text:style-name="ListLabel_20_28" text:visited-style-name="ListLabel_20_28"><text:span text:style-name="T15">https://www.epicreact.dev/use-sync-external-store-demystified-for-practical-react-development-w5ac0</text:span></text:a></text:p>
        </text:list-item>
        <text:list-item>
          <text:p text:style-name="P6"><text:span text:style-name="T14">`useSyncExternalStore` — The React Hook You Didn't Know You Needed - DEV Community, </text:span><text:a xlink:type="simple" xlink:href="https://dev.to/mehta0007/usesyncexternalstore-the-react-hook-you-didnt-know-you-needed-34mp" text:style-name="ListLabel_20_28" text:visited-style-name="ListLabel_20_28"><text:span text:style-name="T15">https://dev.to/mehta0007/usesyncexternalstore-the-react-hook-you-didnt-know-you-needed-34mp</text:span></text:a></text:p>
        </text:list-item>
        <text:list-item>
          <text:p text:style-name="P6"><text:span text:style-name="T14">React 18 useSyncExternalStore Hook - Saeloun Blog, </text:span><text:a xlink:type="simple" xlink:href="https://blog.saeloun.com/2021/12/30/react-18-usesyncexternalstore-api/" text:style-name="ListLabel_20_28" text:visited-style-name="ListLabel_20_28"><text:span text:style-name="T15">https://blog.saeloun.com/2021/12/30/react-18-usesyncexternalstore-api/</text:span></text:a></text:p>
        </text:list-item>
        <text:list-item>
          <text:p text:style-name="P6"><text:span text:style-name="T14">useSyncExternalStore - React, </text:span><text:a xlink:type="simple" xlink:href="https://react.dev/reference/react/useSyncExternalStore" text:style-name="ListLabel_20_28" text:visited-style-name="ListLabel_20_28"><text:span text:style-name="T15">https://react.dev/reference/react/useSyncExternalStore</text:span></text:a></text:p>
        </text:list-item>
        <text:list-item>
          <text:p text:style-name="P6"><text:span text:style-name="T14">Hooks API Reference - React, </text:span><text:a xlink:type="simple" xlink:href="https://legacy.reactjs.org/docs/hooks-reference.html" text:style-name="ListLabel_20_28" text:visited-style-name="ListLabel_20_28"><text:span text:style-name="T15">https://legacy.reactjs.org/docs/hooks-reference.html</text:span></text:a></text:p>
        </text:list-item>
        <text:list-item>
          <text:p text:style-name="P6"><text:span text:style-name="T14">useSyncExternalStoreExports in Zustand source code explained. - Think Throo, </text:span><text:a xlink:type="simple" xlink:href="https://thinkthroo.com/blog/useSyncExternalStoreExports-in-Zustand" text:style-name="ListLabel_20_28" text:visited-style-name="ListLabel_20_28"><text:span text:style-name="T15">https://thinkthroo.com/blog/useSyncExternalStoreExports-in-Zustand</text:span></text:a></text:p>
        </text:list-item>
        <text:list-item>
          <text:p text:style-name="P6"><text:soft-page-break/><text:span text:style-name="T14">useStoreWithEqualityFn - Zustand, </text:span><text:a xlink:type="simple" xlink:href="https://zustand.docs.pmnd.rs/reference/hooks/use-store-with-equality-fn" text:style-name="ListLabel_20_28" text:visited-style-name="ListLabel_20_28"><text:span text:style-name="T15">https://zustand.docs.pmnd.rs/reference/hooks/use-store-with-equality-fn</text:span></text:a></text:p>
        </text:list-item>
        <text:list-item>
          <text:p text:style-name="P6"><text:span text:style-name="T14">Understanding useSyncExternalStore | by dwell_the - Medium, </text:span><text:a xlink:type="simple" xlink:href="https://medium.com/@dwell_the/understanding-usesyncexternalstore-c06618a32d61" text:style-name="ListLabel_20_28" text:visited-style-name="ListLabel_20_28"><text:span text:style-name="T15">https://medium.com/@dwell_the/understanding-usesyncexternalstore-c06618a32d61</text:span></text:a></text:p>
        </text:list-item>
        <text:list-item>
          <text:p text:style-name="P6"><text:span text:style-name="T14">Isolating React component updates with useSyncExternalStore - Phil Parsons, </text:span><text:a xlink:type="simple" xlink:href="https://philparsons.co.uk/blog/isolating-react-component-updates-with-usesyncexternalstore/" text:style-name="ListLabel_20_28" text:visited-style-name="ListLabel_20_28"><text:span text:style-name="T15">https://philparsons.co.uk/blog/isolating-react-component-updates-with-usesyncexternalstore/</text:span></text:a></text:p>
        </text:list-item>
        <text:list-item>
          <text:p text:style-name="P6"><text:span text:style-name="T14">What happens when you update a state in react? (react internals) : r/reactjs - Reddit, </text:span><text:a xlink:type="simple" xlink:href="https://www.reddit.com/r/reactjs/comments/1r7udxs/what_happens_when_you_update_a_state_in_react/" text:style-name="ListLabel_20_28" text:visited-style-name="ListLabel_20_28"><text:span text:style-name="T15">https://www.reddit.com/r/reactjs/comments/1r7udxs/what_happens_when_you_update_a_state_in_reac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8" meta:paragraph-count="174" meta:word-count="4918" meta:character-count="37291" meta:non-whitespace-character-count="32571"/>
    <meta:generator>LibreOfficeDev/6.0.5.2$Linux_X86_64 LibreOffice_project/</meta:generator>
  </office:meta>
</office:document-meta>
</file>