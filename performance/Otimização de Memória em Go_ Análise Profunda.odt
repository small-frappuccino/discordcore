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P1" style:family="paragraph" style:parent-style-name="Standard">
      <style:paragraph-properties fo:line-height="114%" fo:padding="0in" fo:border="none"/>
    </style:style>
    <style:style style:name="P2" style:family="paragraph" style:parent-style-name="Standard">
      <style:paragraph-properties fo:line-height="114%" fo:padding="0in" fo:border="none"/>
      <style:text-properties fo:color="#444746" style:text-position="super 58%" style:font-name="Google Sans" fo:font-size="12pt" style:font-name-asian="Google Sans1" style:font-size-asian="12pt" style:font-name-complex="Google Sans1" style:font-size-complex="12pt"/>
    </style:style>
    <style:style style:name="P3" style:family="paragraph" style:parent-style-name="Standard">
      <style:paragraph-properties fo:line-height="114%" fo:padding="0in" fo:border="none"/>
      <style:text-properties fo:color="#1f1f1f" style:font-name="Google Sans" style:font-name-asian="Google Sans1" style:font-name-complex="Google Sans1"/>
    </style:style>
    <style:style style:name="P4" style:family="paragraph" style:parent-style-name="Standard">
      <style:paragraph-properties fo:margin-top="0.0835in" fo:margin-bottom="0.0835in" loext:contextual-spacing="false" fo:line-height="114%" fo:padding="0in" fo:border="none"/>
    </style:style>
    <style:style style:name="P5" style:family="paragraph" style:parent-style-name="Standard" style:list-style-name="WWNum1">
      <style:paragraph-properties fo:margin-left="0.4165in" fo:margin-right="0in" fo:line-height="114%" fo:text-indent="-0.25in" style:auto-text-indent="false" fo:padding="0in" fo:border="none"/>
    </style:style>
    <style:style style:name="P6" style:family="paragraph" style:parent-style-name="Standard" style:list-style-name="WWNum2">
      <style:paragraph-properties fo:margin-left="0.4165in" fo:margin-right="0in" fo:line-height="114%" fo:text-indent="-0.25in" style:auto-text-indent="false" fo:padding="0in" fo:border="none"/>
    </style:style>
    <style:style style:name="P7" style:family="paragraph" style:parent-style-name="Standard" style:list-style-name="WWNum3">
      <style:paragraph-properties fo:margin-left="0.4165in" fo:margin-right="0in" fo:text-indent="-0.25in" style:auto-text-indent="false" fo:padding="0in" fo:border="none"/>
    </style:style>
    <style:style style:name="P8" style:family="paragraph" style:parent-style-name="Standard">
      <style:paragraph-properties fo:margin-left="0.3335in" fo:margin-right="0in" fo:line-height="114%" fo:text-indent="0in" style:auto-text-indent="false" fo:padding="0in" fo:border="none"/>
      <style:text-properties fo:color="#1f1f1f" style:font-name="Google Sans" style:font-name-asian="Google Sans1" style:font-name-complex="Google Sans1"/>
    </style:style>
    <style:style style:name="P9" style:family="paragraph" style:parent-style-name="Standard">
      <style:paragraph-properties fo:margin-left="0.3335in" fo:margin-right="0in" fo:line-height="114%" fo:text-indent="0in" style:auto-text-indent="false" fo:padding="0in" fo:border="none"/>
    </style:style>
    <style:style style:name="P10" style:family="paragraph" style:parent-style-name="Standard">
      <style:paragraph-properties fo:margin-left="0.3335in" fo:margin-right="0in" fo:margin-top="0.2709in" fo:margin-bottom="0.3335in" loext:contextual-spacing="false" fo:line-height="114%" fo:text-indent="0in" style:auto-text-indent="false" fo:padding="0in" fo:border="none"/>
      <style:text-properties fo:color="#1f1f1f" style:font-name="Google Sans" style:font-name-asian="Google Sans1" style:font-name-complex="Google Sans1"/>
    </style:style>
    <style:style style:name="P11" style:family="paragraph" style:parent-style-name="Standard">
      <style:paragraph-properties fo:margin-left="0.3335in" fo:margin-right="0.1146in" fo:line-height="114%" fo:text-indent="0in" style:auto-text-indent="false" fo:padding="0in" fo:border="none"/>
      <style:text-properties fo:color="#1f1f1f" style:font-name="Google Sans" style:font-name-asian="Google Sans1" style:font-name-complex="Google Sans1"/>
    </style:style>
    <style:style style:name="P12" style:family="paragraph" style:parent-style-name="Standard">
      <style:paragraph-properties fo:margin-left="0.3335in" fo:margin-right="0.1146in" fo:line-height="114%" fo:text-indent="0in" style:auto-text-indent="false" fo:padding="0in" fo:border="none"/>
    </style:style>
    <style:style style:name="P13" style:family="paragraph" style:parent-style-name="Standard">
      <style:paragraph-properties fo:margin-top="0in" fo:margin-bottom="0.1772in" loext:contextual-spacing="false" fo:line-height="114%" fo:padding="0in" fo:border="none"/>
    </style:style>
    <style:style style:name="P14" style:family="paragraph" style:parent-style-name="Heading_20_1" style:master-page-name="Standard">
      <style:paragraph-properties fo:margin-top="0in" fo:margin-bottom="0in" loext:contextual-spacing="false" fo:line-height="114%" style:page-number="1" fo:padding="0in" fo:border="none"/>
    </style:style>
    <style:style style:name="P15" style:family="paragraph" style:parent-style-name="Heading_20_3">
      <style:paragraph-properties fo:margin-top="0in" fo:margin-bottom="0.1665in" loext:contextual-spacing="false" fo:line-height="114%" fo:padding="0in" fo:border="none"/>
    </style:style>
    <style:style style:name="P16" style:family="paragraph" style:parent-style-name="Heading_20_2">
      <style:paragraph-properties fo:margin-top="0in" fo:margin-bottom="0in" loext:contextual-spacing="false" fo:line-height="114%" fo:padding="0in" fo:border="none"/>
    </style:style>
    <style:style style:name="P17" style:family="paragraph" style:parent-style-name="Heading_20_4">
      <style:paragraph-properties fo:margin-top="0in" fo:margin-bottom="0.1772in" loext:contextual-spacing="false" fo:line-height="100%" fo:padding="0in" fo:border="none"/>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fo:font-style="italic" style:font-name-asian="Google Sans1" style:font-style-asian="italic" style:font-name-complex="Google Sans1" style:font-style-complex="italic"/>
    </style:style>
    <style:style style:name="T3" style:family="text">
      <style:text-properties fo:color="#1f1f1f" style:font-name="Google Sans" fo:font-style="italic" fo:font-weight="bold" style:font-name-asian="Google Sans1" style:font-style-asian="italic" style:font-weight-asian="bold" style:font-name-complex="Google Sans1" style:font-style-complex="italic" style:font-weight-complex="bold"/>
    </style:style>
    <style:style style:name="T4" style:family="text">
      <style:text-properties fo:color="#1f1f1f" style:font-name="Google Sans" fo:font-weight="bold" style:font-name-asian="Google Sans1" style:font-weight-asian="bold" style:font-name-complex="Google Sans1" style:font-weight-complex="bold"/>
    </style:style>
    <style:style style:name="T5" style:family="text">
      <style:text-properties fo:color="#1f1f1f" style:font-name="Google Sans" fo:background-color="#141414" loext:char-shading-value="0" style:font-name-asian="Google Sans1" style:font-name-complex="Google Sans1"/>
    </style:style>
    <style:style style:name="T6" style:family="text">
      <style:text-properties fo:color="#444746" style:text-position="super 58%" style:font-name="Google Sans" fo:font-size="12pt" style:font-name-asian="Google Sans1" style:font-size-asian="12pt" style:font-name-complex="Google Sans1" style:font-size-complex="12pt"/>
    </style:style>
    <style:style style:name="T7" style:family="text">
      <style:text-properties fo:color="#ffffff" style:font-name="Google Sans" fo:background-color="#141414" loext:char-shading-value="0" style:font-name-asian="Google Sans1" style:font-name-complex="Google Sans1"/>
    </style:style>
    <style:style style:name="T8" style:family="text">
      <style:text-properties fo:color="#808080" style:font-name="Google Sans" fo:font-size="10pt" fo:font-style="normal" fo:background-color="#141414" loext:char-shading-value="0" style:font-name-asian="Google Sans1" style:font-size-asian="10pt" style:font-style-asian="normal" style:font-name-complex="Google Sans1" style:font-size-complex="10pt" style:font-style-complex="normal"/>
    </style:style>
    <style:style style:name="T9" style:family="text">
      <style:text-properties fo:color="#969dff" style:font-name="Google Sans" fo:font-size="10pt" fo:font-style="normal" fo:background-color="#141414" loext:char-shading-value="0" style:font-name-asian="Google Sans1" style:font-size-asian="10pt" style:font-style-asian="normal" style:font-name-complex="Google Sans1" style:font-size-complex="10pt" style:font-style-complex="normal"/>
    </style:style>
    <style:style style:name="T10" style:family="text">
      <style:text-properties style:font-name="Google Sans" style:font-name-asian="Google Sans1" style:font-name-complex="Google Sans1"/>
    </style:style>
    <style:style style:name="T11" style:family="text">
      <style:text-properties style:font-name="Google Sans" fo:font-size="12pt" style:font-name-asian="Google Sans1" style:font-size-asian="12pt" style:font-name-complex="Google Sans1" style:font-size-complex="12pt"/>
    </style:style>
    <style:style style:name="T12"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Relatório Exaustivo de Engenharia de Sistemas e Arquitetura Interna em Go: Interação com a Memória, Garbage Collection e Otimizações de Escala</text:span></text:p>
      <text:p text:style-name="P16"><text:span text:style-name="T1">Introdução: A Filosofia da Simpatia Mecânica e a Topologia de Hardware</text:span></text:p>
      <text:p text:style-name="P1"><text:span text:style-name="T1">A linguagem de programação Go estabelece-se no panorama da engenharia de software não apenas como uma abstração de alto nível, mas como um motor de sistemas profundamente acoplado às realidades termodinâmicas e físicas do hardware subjacente. Concebida fundamentalmente para mitigar estrangulamentos de escalabilidade em infraestruturas massivas da Google, a linguagem exige que o paradigma de desenvolvimento seja orientado pelo conceito de "simpatia mecânica".</text:span><text:span text:style-name="T6">1</text:span><text:span text:style-name="T1"> Este princípio postula que o código-fonte deve ser arquitetado em estrita concordância com o modo como a Unidade Central de Processamento (CPU), a intrincada hierarquia de caches de silício (L1, L2, L3) e a memória de acesso aleatório (RAM) operam a nível transacional e atómico.</text:span><text:span text:style-name="T6">1</text:span></text:p>
      <text:p text:style-name="P1"><text:span text:style-name="T1">Em vez de ocultar os custos computacionais sob pesadas máquinas virtuais, Go expõe as fronteiras da memória através de um design intencionalmente imperativo e estrutural. A aplicação do paradigma "Communicating Sequential Processes" (CSP) implementa uma orquestração de concorrência baseada em passagem de mensagens em vez de blocos de memória partilhada, mitigando severamente a saturação dos barramentos do sistema (bus saturation) que afeta linguagens dependentes de bloqueios globais rigorosos.</text:span><text:span text:style-name="T6">1</text:span><text:span text:style-name="T1"> Paralelamente, a regra fundacional de "tornar o valor zero útil" dita que o estado natural de alocação de memória (bytes preenchidos a zero na RAM) seja inerentemente funcional. Um sync.Mutex recém-alocado ou uma fatia (slice) de dimensão zero não exigem invocações de construtores dispendiosos, poupando incontáveis ciclos de relógio em ramificações condicionais e prevenindo operações de inicialização que, em infraestruturas de larga escala, causariam exaustão prematura da memória.</text:span><text:span text:style-name="T6">1</text:span></text:p>
      <text:p text:style-name="P1"><text:span text:style-name="T1">Este relatório disseca exaustivamente a arquitetura interna da linguagem Go, explorando a progressão metódica desde o funcionamento do alocador multicelular de RAM, a intrincada mecânica do </text:span><text:span text:style-name="T2">Garbage Collector</text:span><text:span text:style-name="T1"> (GC) e a sua matemática de barreira híbrida, até ao modo exato como a sintaxe dita a sobrevivência dos dados na Pilha (</text:span><text:span text:style-name="T2">Stack</text:span><text:span text:style-name="T1">) ou no </text:span><text:span text:style-name="T2">Heap</text:span><text:span text:style-name="T1">. Conclui-se com uma análise aprofundada de como ecossistemas de dimensão colossal, especificamente o Kubernetes e o Docker, manipulam estas mecânicas microscópicas para suster fluxos de dados gigantescos sem colapsar sob a pressão da exaustão de memória.</text:span></text:p>
      <text:p text:style-name="P16"><text:span text:style-name="T1">Arquitetura do Alocador de Memória: Uma Abordagem Multicelular e Hierárquica</text:span></text:p>
      <text:p text:style-name="P1"><text:span text:style-name="T1">A gestão de RAM em Go rejeita os mecanismos monolíticos tradicionais expostos pelas chamadas diretas ao sistema operativo (como o malloc primitivo da linguagem C). Em vez disso, implementa um ecossistema sofisticado e segmentado, fortemente inspirado no TCMalloc (</text:span><text:span text:style-name="T2">Thread-Caching Malloc</text:span><text:span text:style-name="T1">), desenhado meticulosamente para minimizar a fragmentação espacial e abolir o bloqueio de fios de execução (</text:span><text:span text:style-name="T2">threads</text:span><text:span text:style-name="T1">) globais sob alta contenção concorrente.</text:span><text:span text:style-name="T6">3</text:span><text:span text:style-name="T1"> O espaço virtual da RAM é administrado de forma hierárquica por três entidades primárias que operam em diferentes níveis de abstração e isolamento de cache: o mcache, o mcentral e o mheap.</text:span></text:p>
      <text:p text:style-name="P1"><text:span text:style-name="T1">O componente de nível macro, designado por mheap, gere o domínio total da memória da aplicação. Ele não solicita pequenos fragmentos isolados ao sistema operativo; pelo contrário, requisita segmentos expansivos e contíguos de memória virtual sob a forma de áreas designadas por "arenas".</text:span><text:span text:style-name="T6">5</text:span><text:span text:style-name="T1"> Em arquiteturas de 64 bits, cada arena possui tipicamente a dimensão colossal de 64 Megabytes (MB).</text:span><text:span text:style-name="T6">4</text:span><text:span text:style-name="T1"> Estas arenas são posteriormente segmentadas num nível atómico em páginas fixas de 8 Kilobytes (KB).</text:span><text:span text:style-name="T6">3</text:span><text:span text:style-name="T1"> Quando as entidades de processamento requerem memória para instanciar objetos, estas páginas não são entregues de forma avulsa. São estruturadas numa abstração de gestão chamada mspan (ou simplesmente </text:span><text:span text:style-name="T2">span</text:span><text:span text:style-name="T1">), que consiste numa lista duplamente encadeada responsável por reter metadados cruciais: o endereço inicial na memória (startAddr), a classe de tamanho associada, e a contagem exata de páginas contíguas que o </text:span><text:span text:style-name="T2">span</text:span><text:span text:style-name="T1"> engloba.</text:span><text:span text:style-name="T6">5</text:span></text:p>
      <text:p text:style-name="P1"><text:span text:style-name="T1">Para evitar bloqueios sistemáticos (lock contention) que inevitavelmente ocorreriam caso todas as centenas de milhares de </text:span><text:span text:style-name="T2">goroutines</text:span><text:span text:style-name="T1"> requisitassem blocos à mesma fonte central em simultâneo, a linguagem dota cada processador lógico (P) do escalonador de uma reserva privada de memória denominada mcache.</text:span><text:span text:style-name="T6">3</text:span></text:p>
      <text:p text:style-name="P2"/>
      <table:table table:name="Table1" table:style-name="Table1">
        <table:table-column table:style-name="Table1.A"/>
        <table:table-column table:style-name="Table1.B"/>
        <table:table-row table:style-name="Table1.1">
          <table:table-cell table:style-name="Table1.A1" office:value-type="string">
            <text:p text:style-name="P4"><text:span text:style-name="T4">Entidade do Alocador</text:span></text:p>
          </table:table-cell>
          <table:table-cell table:style-name="Table1.A1" office:value-type="string">
            <text:p text:style-name="P4"><text:span text:style-name="T4">Propósito Mecânico e Comportamento na Topologia da RAM</text:span></text:p>
          </table:table-cell>
        </table:table-row>
        <table:table-row table:style-name="Table1.1">
          <table:table-cell table:style-name="Table1.A1" office:value-type="string">
            <text:p text:style-name="P4"><text:span text:style-name="T4">mcache</text:span></text:p>
          </table:table-cell>
          <table:table-cell table:style-name="Table1.A1" office:value-type="string">
            <text:p text:style-name="P1"><text:span text:style-name="T1">Alocador local ancorado individualmente a cada Processador lógico (P). Opera de forma transacional e </text:span><text:span text:style-name="T2">lock-free</text:span><text:span text:style-name="T1"> (sem necessidade de trincos), uma vez que, por desenho do escalonador, apenas uma </text:span><text:span text:style-name="T2">goroutine</text:span><text:span text:style-name="T1"> roda num dado (P) em cada momento exato.</text:span><text:span text:style-name="T6">3</text:span><text:span text:style-name="T1"> É altamente otimizado para gerir objetos minúsculos e pequenos, albergando </text:span><text:span text:style-name="T2">spans</text:span><text:span text:style-name="T1"> vivos sem interrupções de hardware.</text:span><text:span text:style-name="T6">4</text:span></text:p>
          </table:table-cell>
        </table:table-row>
        <table:table-row table:style-name="Table1.1">
          <table:table-cell table:style-name="Table1.A1" office:value-type="string">
            <text:p text:style-name="P4"><text:span text:style-name="T4">mcentral</text:span></text:p>
          </table:table-cell>
          <table:table-cell table:style-name="Table1.A1" office:value-type="string">
            <text:p text:style-name="P1"><text:span text:style-name="T1">Mediador global partilhado. A sua função é classificar e agrupar os </text:span><text:span text:style-name="T2">spans</text:span><text:span text:style-name="T1"> provenientes do mheap em 68 classes de tamanho (</text:span><text:span text:style-name="T2">size classes</text:span><text:span text:style-name="T1">) rigorosas.</text:span><text:span text:style-name="T6">5</text:span><text:span text:style-name="T1"> Mantém filas duplamente encadeadas (uma para </text:span><text:span text:style-name="T2">spans</text:span><text:span text:style-name="T1"> com espaço livre, outra para </text:span><text:span text:style-name="T2">spans</text:span><text:span text:style-name="T1"> esgotados). Como é acedido transversalmente por todos os (P)s, a extração de um </text:span><text:span text:style-name="T2">span</text:span><text:span text:style-name="T1"> exige a aquisição atómica de </text:span><text:span text:style-name="T2">locks</text:span><text:span text:style-name="T1">, justificando a necessidade primária do mcache.</text:span><text:span text:style-name="T6">5</text:span></text:p>
          </table:table-cell>
        </table:table-row>
        <table:table-row table:style-name="Table1.1">
          <table:table-cell table:style-name="Table1.A1" office:value-type="string">
            <text:p text:style-name="P4"><text:span text:style-name="T4">mheap</text:span></text:p>
          </table:table-cell>
          <table:table-cell table:style-name="Table1.A1" office:value-type="string">
            <text:p text:style-name="P1"><text:span text:style-name="T1">O repositório central e absoluto de toda a RAM. Fornece blocos de páginas em estado bruto. Adicionalmente, trata de forma isolada a alocação de "Grandes Objetos" (superiores a 32 KB), contornando as restrições inferiores e distribuindo-os em páginas contíguas diretas sem fragmentação por classes de tamanho.</text:span><text:span text:style-name="T6">4</text:span></text:p>
          </table:table-cell>
        </table:table-row>
      </table:table>
      <text:p text:style-name="P15"><text:span text:style-name="T1">Classes de Tamanho e a Matemática da Fragmentação Interna</text:span></text:p>
      <text:p text:style-name="P1"><text:span text:style-name="T1">A mitigação da fragmentação da memória interna em Go dita que os objetos não sejam alocados baseados nos seus tamanhos exatos em bytes, mas sim arredondados para intervalos predefinidos conhecidos como </text:span><text:span text:style-name="T2">Size Classes</text:span><text:span text:style-name="T1"> (Classes de Tamanho). Existem 68 classes distintas.</text:span><text:span text:style-name="T6">4</text:span><text:span text:style-name="T1"> A classe de tamanho 0 é uma exceção arquitetural reservada exclusivamente para objetos colossais (superiores a 32 KB), os quais são geridos diretamente pelo mheap para evitar o entupimento das caches locais.</text:span><text:span text:style-name="T6">4</text:span><text:span text:style-name="T1"> As classes 1 a 67 governam a distribuição de objetos pequenos e microscópicos.</text:span></text:p>
      <text:p text:style-name="P1"><text:span text:style-name="T1">Para aumentar drasticamente o desempenho do </text:span><text:span text:style-name="T2">Garbage Collector</text:span><text:span text:style-name="T1">, cada uma destas 68 classes de tamanho é subdividida em duas, originando 136 </text:span><text:span text:style-name="T2">Span Classes</text:span><text:span text:style-name="T1"> (Classes de Span).</text:span><text:span text:style-name="T6">4</text:span><text:span text:style-name="T1"> A indexação obedece a uma paridade restrita: números pares (</text:span><text:span text:style-name="T2">Scan Class</text:span><text:span text:style-name="T1">) representam </text:span><text:span text:style-name="T2">spans</text:span><text:span text:style-name="T1"> que contêm objetos com ponteiros, obrigando o GC a vasculhar o seu interior em busca de dependências; números ímpares (</text:span><text:span text:style-name="T2">Noscan Class</text:span><text:span text:style-name="T1">) armazenam estruturas estanques (como escalares numéricos ou fatias puras de </text:span><text:span text:style-name="T2">bytes</text:span><text:span text:style-name="T1">) que não apontam para nenhuma outra área da RAM.</text:span><text:span text:style-name="T6">4</text:span><text:span text:style-name="T1"> Esta separação mecânica permite ao coletor de lixo ignorar blocos inteiros de memória na sua travessia de varredura, poupando vastas frações de ciclos de CPU.</text:span></text:p>
      <text:p text:style-name="P1"><text:span text:style-name="T1">A imposição destas classes gera, inevitavelmente, desperdício algorítmico conhecido como fragmentação interna ou </text:span><text:span text:style-name="T2">Tail Waste</text:span><text:span text:style-name="T1"> (Desperdício de Cauda). Quando uma </text:span><text:span text:style-name="T2">goroutine</text:span><text:span text:style-name="T1"> solicita a alocação de um objeto cujo tamanho não corresponde perfeitamente à grelha, o valor é arredondado por excesso. O desperdício numa página pode ser deduzido pela fórmula que subtrai o espaço ocupado pelo número máximo de objetos da área total das páginas alocadas a esse </text:span><text:span text:style-name="T2">span</text:span><text:span text:style-name="T1">.</text:span><text:span text:style-name="T6">4</text:span><text:span text:style-name="T1"> No pior cenário absoluto (por exemplo, na classe de tamanho 55, que gere blocos de 10.880 bytes alastrados por 4 páginas de 8 KB), o desperdício total combinado entre a discrepância de arredondamento e os limites físicos do fim da página aproxima-se dos 6,24% de espaço não utilizado.</text:span><text:span text:style-name="T6">4</text:span><text:span text:style-name="T1"> Trata-se de um sacrifício termodinâmico calculado: perde-se uma ínfima fração de RAM em troca de uma velocidade atómica de alocação </text:span><text:span text:style-name="T2">O(1)</text:span><text:span text:style-name="T1">.</text:span></text:p>
      <text:p text:style-name="P1"><text:span text:style-name="T1">Ademais, para otimizar alocações microscópicas (objetos inferiores a 16 bytes), o mcache implementa o </text:span><text:span text:style-name="T2">Tiny Allocator</text:span><text:span text:style-name="T1">. Em vez de alocar um objeto individual para cada requisição de 2 bytes, o alocador agrupa assincronamente múltiplas requisições díspares dentro de um único bloco coerente de 16 bytes (pertencente à classe de tamanho 2). Mantendo o registo da fronteira atual de ocupação através das variáveis lógicas tiny e tinyoffset, a linguagem esmaga a ineficiência referencial e minimiza o rastro do metadado no motor de execução.</text:span><text:span text:style-name="T6">4</text:span></text:p>
      <text:p text:style-name="P16"><text:span text:style-name="T1">O Alocador de Páginas: Evolução para a Radix Tree e Eficiência Algorítmica</text:span></text:p>
      <text:p text:style-name="P1"><text:soft-page-break/><text:span text:style-name="T1">Antes da versão 1.14 do Go, o componente inferior do mheap encarregue de descobrir páginas livres administrava o espaço através de uma estrutura de dados conhecida como árvore </text:span><text:span text:style-name="T2">Treap</text:span><text:span text:style-name="T1"> (uma fusão algorítmica de árvore binária e </text:span><text:span text:style-name="T2">heap</text:span><text:span text:style-name="T1">), acompanhada por um fecho lógico global (</text:span><text:span text:style-name="T2">lock</text:span><text:span text:style-name="T1">).</text:span><text:span text:style-name="T6">7</text:span><text:span text:style-name="T1"> Com o advento de infraestruturas modernas compostas por dezenas ou centenas de núcleos de hardware, este modelo tornou-se um gargalo de estrangulamento catastrófico. Durante períodos de elevada requisição de memória, as </text:span><text:span text:style-name="T2">threads</text:span><text:span text:style-name="T1"> sofriam preempção aguardando a libertação da árvore, levando à saturação do barramento da CPU e degradando a latência de sistemas infraestruturais de forma inaceitável.</text:span><text:span text:style-name="T6">9</text:span></text:p>
      <text:p text:style-name="P1"><text:span text:style-name="T1">Para erradicar este estrangulamento, a arquitetura interna do alocador de páginas (mpagealloc.go) foi completamente reescrita, substituindo a árvore por uma arquitetura em dois níveis: uma matriz de </text:span><text:span text:style-name="T2">Bitmaps</text:span><text:span text:style-name="T1"> supervisionada por uma Árvore Radix (</text:span><text:span text:style-name="T2">Radix Tree</text:span><text:span text:style-name="T1">).</text:span><text:span text:style-name="T6">7</text:span><text:span text:style-name="T1"> A genialidade desta topologia reside na abstração e na fragmentação do estado global. O </text:span><text:span text:style-name="T2">Bitmap</text:span><text:span text:style-name="T1"> mapeia diretamente o estado físico na RAM: um bit com o valor 1 significa que a página está a ser utilizada, e 0 dita que está perfeitamente livre.</text:span><text:span text:style-name="T6">10</text:span><text:span text:style-name="T1"> Devido à imensidão do espaço virtual em máquinas de 64 bits (na ordem dos Terabytes), esta estrutura está dilacerada em blocos e indexada.</text:span><text:span text:style-name="T6">11</text:span></text:p>
      <text:p text:style-name="P1"><text:span text:style-name="T1">Sobre este </text:span><text:span text:style-name="T2">Bitmap</text:span><text:span text:style-name="T1">, ergue-se a </text:span><text:span text:style-name="T2">Radix Tree</text:span><text:span text:style-name="T1"> em cinco níveis estritos, onde cada nó de índice concentra uma amálgama matemática denominada pallocSum.</text:span><text:span text:style-name="T6">12</text:span><text:span text:style-name="T1"> O pallocSum é uma variável atómica de 64 bits que descreve sumariamente três propriedades topológicas das páginas subjacentes: a contagem de páginas livres no início da ramificação (start), a contagem de páginas livres no extremo final (end), e o maior corredor contíguo de páginas disponíveis no interior (max).</text:span><text:span text:style-name="T6">4</text:span><text:span text:style-name="T1"> O nó da raiz superior tem o poder de abranger e abstrair 16 Gigabytes de RAM de uma só vez.</text:span><text:span text:style-name="T6">12</text:span></text:p>
      <text:p text:style-name="P1"><text:span text:style-name="T1">Quando o motor necessita de encontrar páginas contíguas, o algoritmo efetua uma Pesquisa em Profundidade (</text:span><text:span text:style-name="T2">Depth-First Search</text:span><text:span text:style-name="T1">). Ao avaliar um nodo, verifica instantaneamente, através de operações de deslocamento de bits (</text:span><text:span text:style-name="T2">bitwise intrinsics</text:span><text:span text:style-name="T1">), se o campo max tem tamanho suficiente. Se não tiver, o processador descarta aquele ramo inteiro de memória sem ter que o percorrer, descendo aos oitavos vizinhos subsequentes.</text:span><text:span text:style-name="T6">4</text:span><text:span text:style-name="T1"> Para evitar a repetição fútil de percorrer blocos iniciais de RAM cronicamente ocupados, a linguagem matematicamente armazena um ponteiro de inferência designado searchAddr, ditando que não existem espaços úteis abaixo daquele endereço de hardware. O alocador retoma as suas pesquisas diretamente a partir do searchAddr, permitindo que as requisições, outrora paralisadas por bloqueios da </text:span><text:span text:style-name="T2">Treap</text:span><text:span text:style-name="T1">, decorram com latências sub-microssegundo e escalem exponencialmente com a adição de mais núcleos de CPU.</text:span><text:span text:style-name="T6">4</text:span></text:p>
      <text:p text:style-name="P16"><text:span text:style-name="T1">A Interface entre Sintaxe e RAM: Análise de Fuga (Escape Analysis)</text:span></text:p>
      <text:p text:style-name="P1"><text:span text:style-name="T1">A mecânica subjacente à alocação não depende exclusivamente do ecossistema de baixo nível; ela é manipulada diretamente pela sintaxe escrita pelo engenheiro de software. Em linguagens geridas, o desenvolvedor está frequentemente alienado da termodinâmica alocacional. Em Go, o código é rigorosamente auditado na fase final da compilação (</text:span><text:span text:style-name="T2">Middle-End</text:span><text:span text:style-name="T1">) por um subsistema dedutivo designado por Análise de Fuga (</text:span><text:span text:style-name="T2">Escape Analysis</text:span><text:span text:style-name="T1">), o qual determina, de forma autocrática, se uma dada variável tem o privilégio de permanecer alocada na Pilha (</text:span><text:span text:style-name="T2">Stack</text:span><text:span text:style-name="T1">) ou se tem, compulsoriamente, de escapar para o </text:span><text:span text:style-name="T2">Heap</text:span><text:span text:style-name="T1">.</text:span><text:span text:style-name="T6">1</text:span></text:p>
      <text:p text:style-name="P1"><text:span text:style-name="T1">O </text:span><text:span text:style-name="T2">Stack</text:span><text:span text:style-name="T1"> é uma fronteira de memória contígua gerida pelo hardware (e logicamente por cada </text:span><text:span text:style-name="T2">goroutine</text:span><text:span text:style-name="T1">). A sua natureza é de limpeza instantânea (Last-In, First-Out). Quando a função termina, o ponteiro recua e a memória é tacitamente considerada livre, sem invocar uma única instrução de reciclagem e com custo computacional nulo.</text:span><text:span text:style-name="T6">14</text:span><text:span text:style-name="T1"> Contudo, se a Análise de Fuga, operando o algoritmo dedutivo rastreável mediante a compilação cruzada via go build -gcflags="-m -l", comprovar que o raio de ação de um valor sobrevive à fronteira cronológica da função, a variável será aprisionada na lentidão administrativa do </text:span><text:span text:style-name="T2">Heap</text:span><text:span text:style-name="T1">.</text:span><text:span text:style-name="T6">13</text:span></text:p>
      <text:p text:style-name="P1"><text:span text:style-name="T1">Os gatilhos sintáticos fundamentais que forçam a migração mecânica da memória do Stack para o Heap são rigorosos e delineiam o comportamento das otimizações atómicas:</text:span></text:p>
      <text:p text:style-name="P3"/>
      <table:table table:name="Table2" table:style-name="Table2">
        <table:table-column table:style-name="Table2.A"/>
        <table:table-column table:style-name="Table2.B"/>
        <table:table-row table:style-name="Table2.1">
          <table:table-cell table:style-name="Table2.A1" office:value-type="string">
            <text:p text:style-name="P4"><text:span text:style-name="T4">Anomalia Topológica e Comportamento Sintático</text:span></text:p>
          </table:table-cell>
          <table:table-cell table:style-name="Table2.A1" office:value-type="string">
            <text:p text:style-name="P4"><text:span text:style-name="T4">Efeito Mecânico na Análise de Fuga</text:span></text:p>
          </table:table-cell>
        </table:table-row>
        <table:table-row table:style-name="Table2.1">
          <table:table-cell table:style-name="Table2.A1" office:value-type="string">
            <text:p text:style-name="P4"><text:span text:style-name="T4">Ponteiros Retornados (Returned Pointers)</text:span></text:p>
          </table:table-cell>
          <table:table-cell table:style-name="Table2.A1" office:value-type="string">
            <text:p text:style-name="P1"><text:span text:style-name="T1">Ao invocar return &amp;x sobre uma variável instanciada localmente, a assinatura do ciclo de vida da mesma é atirada além da fronteira da invocação. O compilador migra x para o </text:span><text:span text:style-name="T2">heap</text:span><text:span text:style-name="T1"> para impedir que futuras funções leiam destroços num </text:span><text:span text:style-name="T2">stack</text:span><text:span text:style-name="T1"> invalidado.</text:span><text:span text:style-name="T6">1</text:span></text:p>
          </table:table-cell>
        </table:table-row>
        <table:table-row table:style-name="Table2.1">
          <table:table-cell table:style-name="Table2.A1" office:value-type="string">
            <text:p text:style-name="P4"><text:span text:style-name="T4">Cargas de Escala Indeterminada</text:span></text:p>
          </table:table-cell>
          <table:table-cell table:style-name="Table2.A1" office:value-type="string">
            <text:p text:style-name="P1"><text:span text:style-name="T1">A utilização de make(byte, size) com variáveis não constantes e não preenchíveis previsivelmente (onde size advém de conexões HTTP) força o </text:span><text:span text:style-name="T2">heap</text:span><text:span text:style-name="T1">. Igualmente, construtos que excedam limites físicos imutáveis, como dimensões nativas globais tipicamente limitadas em cerca de 64 KB por alocação limiar (MaxStackVarSize), serão compulsoriamente expulsos do </text:span><text:span text:style-name="T2">stack</text:span><text:span text:style-name="T1">.</text:span><text:span text:style-name="T6">1</text:span></text:p>
          </table:table-cell>
        </table:table-row>
        <table:table-row table:style-name="Table2.1">
          <table:table-cell table:style-name="Table2.A1" office:value-type="string">
            <text:p text:style-name="P4"><text:span text:style-name="T4">Closures e Captura de Estado</text:span></text:p>
          </table:table-cell>
          <table:table-cell table:style-name="Table2.A1" office:value-type="string">
            <text:p text:style-name="P1"><text:span text:style-name="T1">O enclausuramento imperativo onde uma função anónima fecha sobre uma referência do escopo pai cria amarras topológicas sobre variáveis originalmente temporárias. Ao detetar este elo fantasma estendido, a variável pai escapa inevitavelmente, sobrecarregando o sistema de reciclagem de lixo.</text:span><text:span text:style-name="T6">1</text:span></text:p>
          </table:table-cell>
        </table:table-row>
        <table:table-row table:style-name="Table2.1">
          <table:table-cell table:style-name="Table2.A1" office:value-type="string">
            <text:p text:style-name="P4"><text:span text:style-name="T4">Invólucros Dinâmicos (Interface Boxing)</text:span></text:p>
          </table:table-cell>
          <table:table-cell table:style-name="Table2.A1" office:value-type="string">
            <text:p text:style-name="P1"><text:span text:style-name="T1">A conversão implícita ou explícita de estruturas estáticas e concretas para invólucros virtuais de interface{} (frequentemente instigado pela famigerada função fmt.Println()) atira qualquer variável ao </text:span><text:span text:style-name="T2">heap</text:span><text:span text:style-name="T1">. A barreira metafísica oblitera a inferência preditiva.</text:span><text:span text:style-name="T6">1</text:span></text:p>
          </table:table-cell>
        </table:table-row>
      </table:table>
      <text:p text:style-name="P15"><text:span text:style-name="T1">A Mecânica Oculta das Interfaces: eface e iface</text:span></text:p>
      <text:p text:style-name="P1"><text:span text:style-name="T1">Para compreender cabalmente por que motivo as interfaces destroem a localização do </text:span><text:span text:style-name="T2">Stack</text:span><text:span text:style-name="T1">, é necessário descodificar o seu polimorfismo estrutural ao nível da RAM. Em Go, o ecossistema rejeita heranças clássicas em prol da tipagem estrutural implícita.</text:span><text:span text:style-name="T6">1</text:span><text:span text:style-name="T1"> Quando uma variável é atribuída a uma interface que requer métodos específicos, ela é transformada pelo compilador numa subestrutura de 16 bytes (numa arquitetura AMD64) denominada iface.</text:span><text:span text:style-name="T6">1</text:span></text:p>
      <text:p text:style-name="P1"><text:span text:style-name="T1">A matriz da iface consiste em dois apontadores lógicos fundamentais: a grelha itab (que hospeda informações cruciais sobre a identidade primitiva do tipo original e um leque indexante das invocações dos métodos correspondentes virtuais) e o ponteiro dinâmico data (um apontador isolado unsafe.Pointer que referencia os bytes absolutos da bagagem original do objeto).</text:span><text:span text:style-name="T6">1</text:span><text:span text:style-name="T1"> Alternativamente, o uso indiscriminado da interface vazia (interface{} ou any) converte-se arquiteturalmente no tipo eface, desprovido da matriz de métodos mas detentor vitalício da separação nos eixos metafísicos entre a árvore _type e o famigerado ponteiro data.</text:span><text:span text:style-name="T6">1</text:span></text:p>
      <text:p text:style-name="P1"><text:span text:style-name="T1">Uma vez que os dois contentores (iface e eface) carregam, por desenho e natureza operatória irrevogável da máquina virtual, instâncias manipuláveis de apontadores unsafe.Pointer e não os dados nativos e literais embutidos </text:span><text:span text:style-name="T2">inline</text:span><text:span text:style-name="T1"> no próprio contentor, o elo determinístico da localização perde a sua rigidez topológica. A não ser que o compilador realize deduções imaculadas e inabaláveis, a incerteza subjacente obriga a que todo e qualquer valor original atirado sobre um campo de interface seja enclausurado ("boxed") e submetido compulsoriamente ao repouso forçado no campo dinâmico e dispersivo do </text:span><text:span text:style-name="T2">Heap</text:span><text:span text:style-name="T1">, injetando latência na resolução do chip originada nas quebras e saltos sucessivos aquando de conversões tipográficas (Pointer Chasing).</text:span><text:span text:style-name="T6">1</text:span></text:p>
      <text:p text:style-name="P16"><text:span text:style-name="T1">Topologias de Matriz: O Eixo Slices versus Ponteiros Dispersos</text:span></text:p>
      <text:p text:style-name="P1"><text:span text:style-name="T1">A sintaxe molda adicionalmente o desempenho consoante a adequação às características lineares e algorítmicas do chip de silício em que corre. Estruturas fortemente conectadas via dependências puristas em ponteiros arbitrários dispersos (por exemplo, listas encadeadas iteradas via node = node.next) incorrem na catástrofe arquitetural do </text:span><text:span text:style-name="T2">Pointer Chasing</text:span><text:span text:style-name="T1"> (Perseguição de Ponteiros).</text:span><text:span text:style-name="T6">1</text:span><text:span text:style-name="T1"> Tais grafos espalham o fluxo em coordenadas aleatórias na galáxia alocacional do </text:span><text:span text:style-name="T2">heap</text:span><text:span text:style-name="T1">, cegando os motores lógicos preditivos de harwdare do Kernel da CPU (o </text:span><text:span text:style-name="T2">Prefetcher</text:span><text:span text:style-name="T1">). O processador perde a sua preciosa paralelização em nível de memória (Memory-Level Parallelism), empacando brutalmente a execução porque cada elo da corrente tem de ser resolvido singularmente ao atravessar o deserto abismal da RAM, sofrendo latências que oscilam entre 100 e 300 ciclos de </text:span><text:span text:style-name="T2">clock</text:span><text:span text:style-name="T1"> por falha de cache.</text:span><text:span text:style-name="T6">1</text:span></text:p>
      <text:p text:style-name="P1"><text:span text:style-name="T1">Por este motivo, as diretivas fundamentais de programação empírica em Go ditam o uso massivo e incondicional de vetores contíguos: os </text:span><text:span text:style-name="T2">Arrays</text:span><text:span text:style-name="T1"> e, principalmente, as </text:span><text:span text:style-name="T2">Slices</text:span><text:span text:style-name="T1"> (Fatias). A matriz em </text:span><text:span text:style-name="T2">slice</text:span><text:span text:style-name="T1"> garante o alojamento sequencial, perfeitamente compacto, na topologia nativa contígua subjacente, viabilizando pré-cargas instantâneas otimizadas que descarregam dezenas de referências e iteram à velocidade brutal das </text:span><text:span text:style-name="T2">cache lines</text:span><text:span text:style-name="T1"> L1, erradicando a disrupção nos </text:span><text:span text:style-name="T2">pipelines</text:span><text:span text:style-name="T1"> e conferindo um rendimento ilimitado à taxa global.</text:span><text:span text:style-name="T6">1</text:span></text:p>
      <text:p text:style-name="P1"><text:soft-page-break/><text:span text:style-name="T1">A representação de um </text:span><text:span text:style-name="T2">slice</text:span><text:span text:style-name="T1"> num registo de 64 bits traduz-se pelo consumo esparso e compacto de uns meros 24 bytes compostos por três variáveis primitivas: um ponteiro físico (que mergulha de frente no início do bloco de dados matemáticos do array subjacente invisível), uma distância vetorial atómica indicadora da leitura máxima viável (len), e um teto volumétrico inquebrável indicador das barreiras limiares para a alocação expandida sem restrições colaterais (cap).</text:span><text:span text:style-name="T6">1</text:span></text:p>
      <text:p text:style-name="P1"><text:span text:style-name="T1">Esta dualidade reflete-se na assimetria do mecanismo de alocação primitivo operado pelas invocações new e make. Um engenheiro de software incorre em desperdício severo ao requisitar instâncias conjuntas via new(int). O construtor é termodinamicamente ignorante, preenchendo todos os 24 bytes iniciais de memória com instâncias nulas e fornecendo apenas o ponteiro isolado, gerando um recetor metafísico infuncional de base (nil), exigindo manuseamento iterativo para instanciar as sub-camadas vitais da fatia.</text:span><text:span text:style-name="T6">1</text:span><text:span text:style-name="T1"> Em profunda contradição analítica, a macrosintaxe de base make(int, 0, capacity) não devolve um ponteiro cru; injeta cirurgicamente as ligações lógicas entre o comprimento, o construtor vetorial expansivo limiar de limite, e orquestra logo de partida a reserva contígua e linearizada perante o </text:span><text:span text:style-name="T2">mheap</text:span><text:span text:style-name="T1">, eliminando alocações tardias colaterais repetitivas indutoras da latência.</text:span><text:span text:style-name="T6">1</text:span></text:p>
      <text:p text:style-name="P15"><text:span text:style-name="T1">Fórmula de Crescimento Numérico e Suavidade Expansiva (Go 1.18+)</text:span></text:p>
      <text:p text:style-name="P1"><text:span text:style-name="T1">A interação vetorial complexa das fatias acentua a pressão na gestão termodinâmica aquando da ultrapassagem dos limites impostos pela capacidade do vetor matricial, através da instrução de extensão sintática append(). Caso a grelha não comporte os novos incrementos lógicos, o compilador exige uma retificação arquitetural fulminante conduzida pelo método embutido subjacente growslice.</text:span><text:span text:style-name="T6">20</text:span><text:span text:style-name="T1"> A operação aloca uma matriz nova e espaçosa isolada geometricamente do caos da base antiga, executa a extração em bloco (</text:span><text:span text:style-name="T2">memory move</text:span><text:span text:style-name="T1">) pesada iterando todo o contido originário da zona vetorial abandonada e prossegue à entrega orgânica.</text:span><text:span text:style-name="T6">20</text:span></text:p>
      <text:p text:style-name="P1"><text:span text:style-name="T1">Anteriormente à implementação consolidada na versão Go 1.18, a lógica de reatribuição da expansão obedecia a preceitos rudes: capacidades nativas inferiores à meta imposta dos 1024 itens duplicavam drasticamente a sua pegada física perante o multiplicador 2x a cada limite acionado. À exaustão deste fosso limitador, a amplificação reduzia assimetricamente perante o limite constante e punitivo ditado por um imposto incremental de meros 25% (fator escalar 1.25x).</text:span><text:span text:style-name="T6">1</text:span><text:span text:style-name="T1"> Esta discrepância fraturante motivou engasgamentos e variações de estagnação comportamental perigosamente irregulares quando a fronteira rígida colidia estaticamente. A revolução de transição numérica operada através da submissão unificadora no "Commit CL 347917" redesenhou os paradigmas sistémicos substituindo o salto irregular pela fórmula da suavização constante (</text:span><text:span text:style-name="T2">smooth growth formula</text:span><text:span text:style-name="T1">).</text:span><text:span text:style-name="T6">21</text:span></text:p>
      <text:p text:style-name="P1"><text:span text:style-name="T1">Neste modelo aperfeiçoado, a transição entre o multiplicador duplicador primário das fatias de pequena extensão processual (que alastrou de limites de 1024 para o teto de base avaliado frequentemente nos limiares dinâmicos de suavização como os exatos limiares curtos nos 256 parâmetros base) </text:span><text:span text:style-name="T6">24</text:span><text:span text:style-name="T1"> e o aligeiramento assintótico nos blocos gigantes (que se aproxima progressivamente do degrau escalar na casa próxima da barreira linear restritiva do quarto aditivo percentual orgânico de 25%) é contínua e sem quebras agudas nos intervalos.</text:span><text:span text:style-name="T6">22</text:span><text:span text:style-name="T1"> Integrando as predições geométricas juntamente com os ajustamentos exatos e coerentes em comunhão íntima alinhada com as rígidas "size classes" pré-estabelecidas no ecossistema central do </text:span><text:span text:style-name="T2">mheap</text:span><text:span text:style-name="T1">, a Go reduziu monumentalmente os picos da subutilização estrutural colateral isolada.</text:span><text:span text:style-name="T6">4</text:span></text:p>
      <text:p text:style-name="P16"><text:span text:style-name="T1">Mecânica do Escalonamento: GMP, Concorrência e Transferência de Memória Direta</text:span></text:p>
      <text:p text:style-name="P1"><text:span text:style-name="T1">O verdadeiro prodígio de Go no isolamento de RAM é inseparável do seu modelo termodinâmico de concorrência. Abandonando estratégias clássicas (1:1), o sistema em tempo de execução (runtime) instaura uma engrenagem multicanal no </text:span><text:span text:style-name="T2">user-space</text:span><text:span text:style-name="T1"> baseada na trindade GMP, operando de forma assíncrona o estrangulamento na passagem de núcleos atómicos OS primitivos.</text:span><text:span text:style-name="T6">1</text:span></text:p>
      <text:p text:style-name="P1"><text:span text:style-name="T1">As Goroutines (G) nascem humildes, encabeçando uns minúsculos kilobytes de limite perante a reserva originária de um apontador em pilha associado (stack pointer) na RAM, que requer tão exíguos 300 nanossegundos a escalar à grelha, contrastando ativamente perante o peso das passagens nucleares lentas, de entre 1 a 10 microssegundos brutais para alternar fluxos entre uma clássica </text:span><text:span text:style-name="T2">Thread</text:span><text:span text:style-name="T1"> de OS interconectada nativamente (Machine, ou simplesmente M) no </text:span><text:span text:style-name="T2">Kernel</text:span><text:span text:style-name="T1"> da máquina hospedeira.</text:span><text:span text:style-name="T6">1</text:span></text:p>
      <text:p text:style-name="P1"><text:span text:style-name="T1">A peça lógica orquestradora desta sinfonia, o </text:span><text:span text:style-name="T2">Processor</text:span><text:span text:style-name="T1"> (P), retém nas suas entranhas a Fila Local de Execução (</text:span><text:span text:style-name="T2">Local Run Queue</text:span><text:span text:style-name="T1">, ou LRQ), comportando restritamente o teto local limitador em matriz restrita contendo uma contagem total de armazenamento estático nas 256 goroutines vizinhas ativas preparadas.</text:span><text:span text:style-name="T6">1</text:span><text:span text:style-name="T1"> A genialidade manifesta-se nos cenários assíncronos restritivos perante a rede infraestrutural: quando operações massivas nas interligações da grelha forçam bloqueios demorados da rotina I/O e exaurem o vetor processual, em vez de se submeter à inação castigadora enclausurada e morta originada na catástrofe de uma syscall imperativa paralisante do sistema operativo inter-dependente, o escalonador desatrela fulminantemente o orquestrador P livre separando-o transversalmente e acoplando-o assincronamente a outro repositório M isolado sem latência global partilhada.</text:span><text:span text:style-name="T6">1</text:span><text:span text:style-name="T1"> Quando a preempção deteta bloqueios exíguos não sistémicos de latências injustas, como iterações maciças cegas no processador durando contiguamente frações superiores ao limite restritivo de 10 milissegundos temporais absolutos sem repousos perante a cedência lógica global associada na base, uma sub-rotina vigia isolada chamada sysmon engatilha interceptações originadas sob sinais operacionais brutais em </text:span><text:span text:style-name="T2">broadcasts</text:span><text:span text:style-name="T1"> como o (SIGURG) do OS, arrancando metodicamente a G infratora aos corredores remotos de hibernação forçosa, protegendo ininterruptamente a justiça paralela global computacional no motor cibernético da linguagem Go.</text:span><text:span text:style-name="T6">1</text:span></text:p>
      <text:p text:style-name="P15"><text:span text:style-name="T1">A Genialidade dos Canais: Memmove Direta (Otimização Sem Heap)</text:span></text:p>
      <text:p text:style-name="P1"><text:span text:style-name="T1">Os princípios basilares interconectados no modelo lógico estrutural dão lugar à passagem paralela baseada numa semântica restritiva através do mecanismo interno de suporte fundamental: os Canais (</text:span><text:span text:style-name="T2">channels</text:span><text:span text:style-name="T1">). A expressão idiomática linear e purista ch &lt;- data condensa numa miragem simplista todo um submundo termodinâmico contido nas grelhas matrizes de alocação, alojando a barreira lógica estrita atómica sob a abstração interna do tipo inexportável contido num contentor do runtime associado de memória dinâmica (</text:span><text:span text:style-name="T2">heap</text:span><text:span text:style-name="T1">) de nome hchan.</text:span><text:span text:style-name="T6">1</text:span></text:p>
      <text:p text:style-name="P1"><text:span text:style-name="T1">A estrutura hchan opera resguardada por uma orquestração atómica rigorosa através do seu trinco nativo originário na subestrutura lógica de exclusão atómica da classe mecânica (o campo interno basilar isolado da barreira lock contido submetidamente a instâncias curtas na grelha) e de uma matriz topológica fechada encadeada numa geometria circular no ponteiro associativo adjacente primitivo isolado de nome referencial puro na matriz: buf.</text:span><text:span text:style-name="T6">1</text:span><text:span text:style-name="T1"> As referências são rigidamente limitadas e contabilizadas perante a contínua incrementação indexante no vetor sendx e no equivalente espelhado perante o recetor global designado por recvx.</text:span><text:span text:style-name="T6">1</text:span></text:p>
      <text:p text:style-name="P1"><text:span text:style-name="T1">A interação com a limitação nos recursos revela toda a magia de otimização mecânica baseada na aniquilação paralela global através das chamadas de intervenção sistémicas conjuntas nas goroutines famintas paralisadas e arquivadas na raiz adormecida da base de espera iterativa: a barreira paralela lógica abstrata chamada Fila Duplamente Encadeada ou a famigerada lista recvq.</text:span></text:p>
      <text:p text:style-name="P1"><text:span text:style-name="T1">Quando uma </text:span><text:span text:style-name="T2">goroutine</text:span><text:span text:style-name="T1"> tenta ler um dado invisível proveniente num bloco estéril vazio desprovido de base, as barreiras infraestruturais congelam o estado base encapsulando o apontador expectante perante todo o percurso numa carcaça isolada chamada localmente de iterativa sudog, estacionando cronicamente o elo orquestrador em modo hibernatório na grelha profunda da malha interligada de base matriz (gopark) submetendo a libertação do tranco original perante a RAM livre adjacente.</text:span><text:span text:style-name="T6">1</text:span><text:span text:style-name="T1"> A otimização suprema em aniquilação transversal e em simpatia processual manifesta-se quando, subitamente, emerge a contraparte injetora com fluxos a transmitir perante o </text:span><text:span text:style-name="T2">sudog</text:span><text:span text:style-name="T1"> recetor: em vez de incorrer em transações baseadas primariamente no </text:span><text:span text:style-name="T2">heap</text:span><text:span text:style-name="T1">, submetendo percursos lentos ao gravar referências passivas no disco do anel circular adjacente na topologia orgânica do contentor primário (buf), para que o recetor a extraia ciclicamente instantes ou ciclos processuais à posteriori isoladamente, a linguagem aciona internamente uma interceção brutal com um desvio apelidado passivamente da arquitetura atómica: sendDirect.</text:span><text:span text:style-name="T6">1</text:span></text:p>
      <text:p text:style-name="P1"><text:span text:style-name="T1">Neste fenómeno de intervenção vetorial orquestrada, as passagens na RAM são executadas recorrendo ativamente apenas a uma transferência orgânica e cirúrgica brutal: uma </text:span><text:span text:style-name="T2">cópia atómica do endereço na memória restrita e isolada</text:span><text:span text:style-name="T1"> – conhecida organicamente por instrução nativa (memmove).</text:span><text:span text:style-name="T6">1</text:span><text:span text:style-name="T1"> Esta transação passa invisível aos alocadores centrais na medida que transporta as variáveis originárias enclausuradas exclusivamente dentro do ecossistema local contíguo nas próprias fronteiras das bases operativas fechadas puras associadas e encarnadas entre o regaço da própria raiz no domínio delimitado na Pilha (o </text:span><text:span text:style-name="T2">Stack</text:span><text:span text:style-name="T1"> privado do transmissor original base) e injetando as ligações exatas frontalmente diretas à fronteira orgânica e repousante no regaço físico adormecido do domínio no recesso original basilar limitador (na área livre submetida em descanso e isolamento repousado sobre o próprio eixo passivo na Fila do </text:span><text:span text:style-name="T2">Stack</text:span><text:span text:style-name="T1"> do recetor global faminto).</text:span><text:span text:style-name="T6">1</text:span><text:span text:style-name="T1"> Em termos práticos de ciclos de processador: não houve alocação massiva temporária no Garbage Collector e evitou-se totalmente a latência da cache partilhada.</text:span></text:p>
      <text:p text:style-name="P16"><text:span text:style-name="T1">O Garbage Collector: Rastreamento Tricolor e a Invariante Híbrida</text:span></text:p>
      <text:p text:style-name="P1"><text:span text:style-name="T1">O equilíbrio cibernético imposto a um sistema que não dispõe de contenção no Kernel repousa invariavelmente nas submissões e estratégias de limpezas profundas efetuadas através do processador coletor cíclico, o seu mecanismo orgânico basilar do recetor passivo global e orquestrado no sistema infraestrutural limiar que executa um rastro inquebrável, denominado </text:span><text:span text:style-name="T2">Garbage Collector</text:span><text:span text:style-name="T1"> (GC). Em detrimento de coletadores geracionais de compactação ou transições isoladas castigadoras originadoras do repouso latente submisso com ciclos longos que matam o </text:span><text:span text:style-name="T2">throughput</text:span><text:span text:style-name="T1"> associado em </text:span><text:span text:style-name="T2">Stop-The-World</text:span><text:span text:style-name="T1"> (STW), Go executa paralelamente aos operantes ativos (mutators) uma sinfonia denominada: Varredura e Marcação Tricolor Concorrente (</text:span><text:span text:style-name="T2">Concurrent Tri-color Mark and Sweep</text:span><text:span text:style-name="T1">).</text:span><text:span text:style-name="T6">1</text:span></text:p>
      <text:p text:style-name="P1"><text:span text:style-name="T1">O motor categoriza heurística e fisicamente toda a ramificação do labirinto complexo da memória RAM sob três colorações orgânicas vetoriais primitivas:</text:span></text:p>
      <text:list xml:id="list2655793144" text:style-name="WWNum1">
        <text:list-item>
          <text:p text:style-name="P5"><text:span text:style-name="T4">Preto:</text:span><text:span text:style-name="T1"> Objetos isolados cuja validade original encontra-se exaustivamente decifrada até à extremidade inferior das raízes na matriz transversal sem ligações cegas não mapeadas.</text:span><text:span text:style-name="T6">1</text:span></text:p>
        </text:list-item>
        <text:list-item>
          <text:p text:style-name="P5"><text:span text:style-name="T4">Cinzento:</text:span><text:span text:style-name="T1"> A célula de retenção protetora que encarna um escudo atenuante perante a obliteração: entidades vivas, decifradas, mas com a ramificação vetorial filial obscura na matriz que requer intervenções ou mapeamentos posteriores obrigatórios transitórios.</text:span><text:span text:style-name="T6">1</text:span></text:p>
        </text:list-item>
        <text:list-item>
          <text:p text:style-name="P5"><text:soft-page-break/><text:span text:style-name="T4">Branco:</text:span><text:span text:style-name="T1"> Tudo o que for alienado ou sentenciado perante o abandono na base das varreduras finais passa a purga transversal e letal devolvido no extermínio sem falhas à Base Vetorial Original nas frotas submetidas (</text:span><text:span text:style-name="T2">Free List</text:span><text:span text:style-name="T1">).</text:span><text:span text:style-name="T6">1</text:span></text:p>
        </text:list-item>
      </text:list>
      <text:p text:style-name="P1"><text:span text:style-name="T1">A complexidade e ameaça letal perante o rasto simultâneo (num programa vivo a gerar referências e ponteiros ativamente por intermédio das operações cruzadas) é enquadrada nos estudos em linguística infraestrutural de sistemas pelas regras universais de limitação física estrita: as Invariantes.</text:span></text:p>
      <text:p text:style-name="P3"/>
      <table:table table:name="Table3" table:style-name="Table3">
        <table:table-column table:style-name="Table3.A"/>
        <table:table-column table:style-name="Table3.B"/>
        <table:table-row table:style-name="Table3.1">
          <table:table-cell table:style-name="Table3.A1" office:value-type="string">
            <text:p text:style-name="P4"><text:span text:style-name="T4">Paradigma Invariante Tricolor</text:span></text:p>
          </table:table-cell>
          <table:table-cell table:style-name="Table3.A1" office:value-type="string">
            <text:p text:style-name="P4"><text:span text:style-name="T4">Regra e Consequência Topológica</text:span></text:p>
          </table:table-cell>
        </table:table-row>
        <table:table-row table:style-name="Table3.1">
          <table:table-cell table:style-name="Table3.A1" office:value-type="string">
            <text:p text:style-name="P4"><text:span text:style-name="T4">Forte Invariante Tricolor (Strong Tricolor Invariant)</text:span></text:p>
          </table:table-cell>
          <table:table-cell table:style-name="Table3.A1" office:value-type="string">
            <text:p text:style-name="P1"><text:span text:style-name="T1">Restringe impiedosamente o sistema vetorial, proibindo cegamente e garantindo que, em caso nenhum, em qualquer momento, um objeto mapeado com a designação segura a </text:span><text:span text:style-name="T4">Preto</text:span><text:span text:style-name="T1"> hospede diretamente sobre si mesmo sequer uma ligação vetorial originária perante qualquer alvo ou vestígio alienado sentenciado nos subcampos ignorados vetoriais baseados orgânicos a </text:span><text:span text:style-name="T4">Branco</text:span><text:span text:style-name="T1">.</text:span><text:span text:style-name="T6">31</text:span><text:span text:style-name="T1"> Se esta barreira não existir, o lixo invisível associado passa oculto perante as varreduras e é incinerado e obliterado mortiferamente no processo cruzado, gerando colisões catastróficas passivas atómicas letais ou chamadas nulas (dangling pointers).</text:span></text:p>
          </table:table-cell>
        </table:table-row>
        <table:table-row table:style-name="Table3.1">
          <table:table-cell table:style-name="Table3.A1" office:value-type="string">
            <text:p text:style-name="P4"><text:span text:style-name="T4">Fraca Invariante Tricolor (Weak Tricolor Invariant)</text:span></text:p>
          </table:table-cell>
          <table:table-cell table:style-name="Table3.A1" office:value-type="string">
            <text:p text:style-name="P1"><text:span text:style-name="T1">Paradigma da tolerância calculada. Aceita que ligações em alvos cegos (Preto para Branco) transacionem assimetricamente desde que — e unicamente desde que — os ramos alienados subjacentes em alvo submetido Branco mantenham invariavelmente uma retenção originária associada cruzada protetora vinda de outra frente limiar segura enclausurada paralelamente num abrigo base ou nodo com tom a </text:span><text:span text:style-name="T4">Cinzento</text:span><text:span text:style-name="T1">.</text:span><text:span text:style-name="T6">32</text:span></text:p>
          </table:table-cell>
        </table:table-row>
      </table:table>
      <text:p text:style-name="P1"><text:span text:style-name="T1">Para honrar invariavelmente e conjugar ambos os modelos arquiteturais originando contenção impenetrável perante mutações furtivas, a Google interconectou historicamente em Go a estratégia das "Barreiras de Escrita" conjuntas injetadas no motor transacional da máquina. A partir das implementações robustecidas em 1.8, instaura-se o paradigma magistral: </text:span><text:span text:style-name="T4">A Barreira Híbrida de Escrita (</text:span><text:span text:style-name="T3">Hybrid Write Barrier</text:span><text:span text:style-name="T4">)</text:span><text:span text:style-name="T1">.</text:span></text:p>
      <text:p text:style-name="P1"><text:span text:style-name="T1">A fusão basilar funde as qualidades de contenção da Barreira de Exclusão ou eliminação passiva passível original (estabelecida historicamente na árvore de </text:span><text:span text:style-name="T2">Yuasa</text:span><text:span text:style-name="T1">, garantindo que elementos subtraídos no meio e abandonados não pereçam mortiferamente no processo) conjuntamente conjugada paralelamente e ativamente co-habitando as premissas de escudo insercional originárias do vetor basilar primitivo passivo (desenvolvidas na barreira do escudo originador passivo insercional do teorema clássico atómico baseado em </text:span><text:span text:style-name="T2">Dijkstra</text:span><text:span text:style-name="T1">).</text:span><text:span text:style-name="T6">1</text:span></text:p>
      <text:p text:style-name="P1"><text:span text:style-name="T1">Em termos literais na matriz do pseudo-código compilado adjacente inserido imperceptivelmente a cada operação atómica cruzada submetida de base de atribuição do tipo *ptr = novo_endereco sob mbarrier.go </text:span><text:span text:style-name="T6">29</text:span><text:span text:style-name="T1">:</text:span></text:p>
      <text:p text:style-name="P8"/>
      <text:p text:style-name="P10"/>
      <text:p text:style-name="P11"/>
      <text:p text:style-name="P12"><text:span text:style-name="T7">Go</text:span></text:p>
      <text:p text:style-name="P9"><text:span text:style-name="T5">writePointer(slot, ptr):<text:line-break/> <text:s text:c="3"/></text:span><text:span text:style-name="T8">// Barreira de Deleção de Yuasa: Pinta o valor antigo antes de desaparecer</text:span><text:span text:style-name="T5"><text:line-break/> <text:s text:c="3"/>shade(*slot) <text:s text:c="11"/><text:line-break/> <text:s text:c="3"/><text:line-break/> <text:s text:c="3"/></text:span><text:span text:style-name="T8">// Barreira de Inserção de Dijkstra: Pinta o novo valor se a raiz estiver turva</text:span><text:span text:style-name="T5"><text:line-break/> <text:s text:c="3"/></text:span><text:span text:style-name="T9">if</text:span><text:span text:style-name="T5"> current_stack_is_grey:<text:line-break/> <text:s text:c="7"/>shade(ptr) <text:s text:c="9"/><text:line-break/> <text:s text:c="7"/><text:line-break/> <text:s text:c="3"/>*slot = ptr </text:span><text:span text:style-name="T8">// Efetua mecanicamente a atribuição de hardware final</text:span><text:span text:style-name="T5"><text:line-break/></text:span></text:p>
      <text:p text:style-name="P1"><text:span text:style-name="T1">As operações de proteção drástica (</text:span><text:span text:style-name="T2">shade</text:span><text:span text:style-name="T1">) alteram incontornavelmente os blocos cruzados afetos no mapa limiar submetendo ambas as faces em choque primitivas (tanto o destino anterior desvinculado abandonado no esquecimento cego, como a promessa isolada do ponteiro alvo inserido ex-novo organicamente interconectada no fluxo) à mesma pintura unificadora em vetores cinzentos lógicos obstrutivos puros, resguardando passivamente ambos os ecossistemas.</text:span><text:span text:style-name="T6">1</text:span></text:p>
      <text:p text:style-name="P1"><text:span text:style-name="T1">Este compósito mecânico eliminou permanentemente uma das maiores fraturas termodinâmicas antigas nas transações globais antigas perante ecossistemas da arquitetura: permitiu que todo o conjunto maciço base global de objetos hospedados inerentemente no recôndito dos alinhamentos confinados das </text:span><text:span text:style-name="T2">Stacks</text:span><text:span text:style-name="T1"> das próprias </text:span><text:span text:style-name="T2">Goroutines</text:span><text:span text:style-name="T1"> seja assumido no sistema limiar organicamente e por padrão integral, logo na origem da transação orquestradora em início dos processos de matriz vetorial transversal, invariavelmente na coloração escura a Preto puro sem rastros cromaticamente colaterais, validando imediatamente todo o sistema em torno da Forte Invariante.</text:span><text:span text:style-name="T6">1</text:span><text:span text:style-name="T1"> O GC aboliu o famigerado re-escaneamento punitivo e violento em tempo global de </text:span><text:span text:style-name="T2">Stop-The-World</text:span><text:span text:style-name="T1"> a toda a malha final da pilha nas etapas derradeiras das varreduras, comprimindo interrupções ativas passivas massivas na latência do hardware para valores esmagadores que rondam, num espectro global infindável, paralisações estáticas sub-milissegundo entre exíguos 0.1 ms e 0.6 ms num ciclo global transversal.</text:span><text:span text:style-name="T6">1</text:span></text:p>
      <text:p text:style-name="P16"><text:span text:style-name="T1">O Controlador de Ritmo (Pacer): Objetivos de Limiar Suave e Severo</text:span></text:p>
      <text:p text:style-name="P1"><text:span text:style-name="T1">A engrenagem do </text:span><text:span text:style-name="T2">Garbage Collector</text:span><text:span text:style-name="T1"> necessita de uma sincronia métrica perante a escalabilidade volátil baseada puramente num componente estratégico interno do </text:span><text:span text:style-name="T2">runtime</text:span><text:span text:style-name="T1">: o Orquestrador Controlador Global Pacer (mgcpacer.go). O Pacer é um modelo dinâmico baseado em avaliações constantes do consumo atómico originário. O intuito principal orquestrador perante a infraestrutura dita invariavelmente limitar rigorosamente todo o labor de impacto processual e intrusivo efetuado pelas engrenagens de arrasto e recolha aos submissivos 25% fixos e restritivos impostos do teto e largura temporal global do próprio e ativo CPU total do ciclo da máquina passiva adjacente originária.</text:span><text:span text:style-name="T6">1</text:span></text:p>
      <text:p text:style-name="P1"><text:span text:style-name="T1">O comportamento heurístico do Pacer fundamenta as predições num sistema reativo submisso a duplos balizamentos comutados perante a topologia global dependente do gatilho configurável proporcional (habitualmente regulado perante a flag GOGC, com a equivalência referencial multiplicadora assente tipicamente nos 100 base).</text:span><text:span text:style-name="T6">38</text:span><text:span text:style-name="T1"> A mecânica interna na diretriz de revisão do estado (gcControllerState.revise) instaura um sistema binário e flutuante perante metas originárias baseadas nas frações absolutas e taxas do limiar passivo da própria memória expandida subjacente </text:span><text:span text:style-name="T6">42</text:span><text:span text:style-name="T1">:</text:span></text:p>
      <text:list xml:id="list2004393811" text:style-name="WWNum2">
        <text:list-item>
          <text:p text:style-name="P6"><text:span text:style-name="T4">Soft Goal (Objetivo Suave):</text:span><text:span text:style-name="T1"> Representa o rastro inicial calculado iterativamente baseado na taxa temporal de crescimento anterior. O Pacer orquestra os fluxos e instiga o escalonador a processar metodicamente varreduras antecipadas de rastreio de matriz e resguardo paralelo cruzado de fundos, permitindo que as iterações corram suavemente sobre estimativas sem constrangimentos globais castigadores perante a base mutadora na estabilidade rítmica, na crença algorítmica imutável de predição passiva sem colisões bruscas subjacentes.</text:span><text:span text:style-name="T6">42</text:span></text:p>
        </text:list-item>
        <text:list-item>
          <text:p text:style-name="P6"><text:span text:style-name="T4">Hard Goal (Objetivo Severo):</text:span><text:span text:style-name="T1"> No hiato restrito isolado transversal em ocorrência excecional onde uma subversão termodinâmica volátil exarcebada nas lógicas dos vetores alocadores expõe o aumento rápido de dados a superar todas as previsões passivas do crescimento sem controlo iterativo restrito (uma expansão volátil que fura a suavidade), o orquestrador submete globalmente o sistema passivo à reação do castigo limiar extremo global, alavancando a taxa do "Assist" (Trabalho Compulsório de Assistência do GC), uma sobrecarga brutal punitiva no fator gcOverAssistWork.</text:span><text:span text:style-name="T6">42</text:span><text:span text:style-name="T1"> Sob esta imposição, o escalonador captura </text:span><text:span text:style-name="T2">goroutines</text:span><text:span text:style-name="T1"> da própria aplicação responsáveis diretas pelo exarcebamento das alocações exauridas adjacentes limiares (mutators), proibindo-as ativamente nos corredores isolados e de processarem o seu avanço utilitário base e forçando-as punitivamente a gastar ciclos base originários e relógios da CPU a realizarem varreduras forçadas no trabalho auxiliar associado de auxílio de marcação em prol do próprio Garbage Collector até que o débito seja saldado e reestabelecida a meta termodinâmica inferior balizada.</text:span><text:span text:style-name="T6">42</text:span></text:p>
        </text:list-item>
      </text:list>
      <text:p text:style-name="P16"><text:soft-page-break/><text:span text:style-name="T1">O Scavenger: Devolução Furtiva e o Flagelo das Cgroups (MADV_DONTNEED e GOMEMLIMIT)</text:span></text:p>
      <text:p text:style-name="P1"><text:span text:style-name="T1">O rescaldo da purga levada a cabo e encerrada pelo </text:span><text:span text:style-name="T2">Garbage Collector</text:span><text:span text:style-name="T1"> confina o esquecimento devolvido estritamente na forma e alçada da </text:span><text:span text:style-name="T2">Free List</text:span><text:span text:style-name="T1"> interior e puramente submetida na estrutura originária da base de silício lógica fechada do mheap.</text:span><text:span text:style-name="T6">1</text:span><text:span text:style-name="T1"> Contudo, uma aplicação puramente desvinculada de restrições devolve o poder isolado das amarras perante si mesma, mas não renuncia passivamente e isoladamente nem reintegra instantaneamente as centenas de ramificações da memória devolvida extinta e devolvida da RAM morta sobre as fronteiras lógicas das instâncias primitivas diretas do </text:span><text:span text:style-name="T2">Kernel</text:span><text:span text:style-name="T1"> nativo adjacente centralizado e regulador de todo o Hardware base superior do Sistema Operativo. O Resident Set Size (RSS) – indicador infraestrutural – mantém ilusoriamente métricas falsas elevadas enganando e frustrando os subsistemas controladores externos globais baseados no OS.</text:span><text:span text:style-name="T6">40</text:span></text:p>
      <text:p text:style-name="P1"><text:span text:style-name="T1">A linguagem Go previu e operou metodicamente o mecanismo de regulação interna baseada numa engrenagem furtiva passiva: a rotina fantasma assíncrona </text:span><text:span text:style-name="T4">Scavenger</text:span><text:span text:style-name="T1"> (Esvaziador).</text:span><text:span text:style-name="T6">44</text:span><text:span text:style-name="T1"> Operando numa Goroutine própria a espalhar pequenos incrementos inócuos do seu tempo sob fundos impercetíveis para evitar estrangulamento nos corredores L2 isolados nas latências, o Scavenger recolhe pacientemente os intervalos dos blocos do </text:span><text:span text:style-name="T2">heap</text:span><text:span text:style-name="T1"> inativados desvinculando-os num ritmo constante libertador e invoca perante o Kernel as chamadas brutas operacionais em syscalls via o submisso passivo do sistema apelidado na raiz originária de notificação transversal madvise.</text:span><text:span text:style-name="T6">45</text:span></text:p>
      <text:p text:style-name="P1"><text:span text:style-name="T1">Historicamente, o comportamento oscilou nas guerras estruturais sob o domínio Linux na dependência mecânica da tipologia flag subjacente:</text:span></text:p>
      <text:p text:style-name="P3"/>
      <table:table table:name="Table4" table:style-name="Table4">
        <table:table-column table:style-name="Table4.A"/>
        <table:table-column table:style-name="Table4.B"/>
        <table:table-row table:style-name="Table4.1">
          <table:table-cell table:style-name="Table4.A1" office:value-type="string">
            <text:p text:style-name="P4"><text:span text:style-name="T4">Tipologia de Bandeira Ativa e Notificação ao SO (Kernel madvise)</text:span></text:p>
          </table:table-cell>
          <table:table-cell table:style-name="Table4.A1" office:value-type="string">
            <text:p text:style-name="P4"><text:span text:style-name="T4">Comportamento de Regressão Sistémica e Termodinâmica Global</text:span></text:p>
          </table:table-cell>
        </table:table-row>
        <table:table-row table:style-name="Table4.1">
          <table:table-cell table:style-name="Table4.A1" office:value-type="string">
            <text:p text:style-name="P4"><text:span text:style-name="T4">MADV_FREE (Ativação Passada e Retirada - Go 1.12 a 1.15)</text:span></text:p>
          </table:table-cell>
          <table:table-cell table:style-name="Table4.A1" office:value-type="string">
            <text:p text:style-name="P1"><text:span text:style-name="T1">Converte-se ativamente no flagelo analítico da devolução originária classificada localmente baseada na libertação referencial cruzada ou liberação "preguiçosa". A memória fica passível da devolução imediata subjacente nos rastros, mas o SO apenas erradica o seu vínculo estatístico das medições e confina o extermínio na base do gráfico apenas num derradeiro esforço passivo de estrangulamento perante o teto na pressão isolada externa maciça nos recursos adjacentes limite reais esgotados na máquina originária.</text:span><text:span text:style-name="T6">40</text:span><text:span text:style-name="T1"> Isto causa falsos alarmes nos sistemas de OOM (Out Of Memory) que encerram precipitadamente aplicações ao olharem aos engonhos métricos de limites falsos no topo do sistema.</text:span></text:p>
          </table:table-cell>
        </table:table-row>
        <table:table-row table:style-name="Table4.1">
          <table:table-cell table:style-name="Table4.A1" office:value-type="string">
            <text:p text:style-name="P4"><text:span text:style-name="T4">MADV_DONTNEED (O Padrão Robusto Moderno - Go 1.16+)</text:span></text:p>
          </table:table-cell>
          <table:table-cell table:style-name="Table4.A1" office:value-type="string">
            <text:p text:style-name="P1"><text:span text:style-name="T1">Devido às colisões em contêineres e na leitura dos valores cegos por erro, os engenheiros recuaram e firmaram a reativação da bandeira globalmente no código matriz a ditar as interações no padrão implacável global do subjacente perante o Kernel restritivo nativo.</text:span><text:span text:style-name="T6">40</text:span><text:span text:style-name="T1"> Apesar de incorrer em subutilizações cruzadas microscópicas e mais perdas em chamadas limiares originárias perante falhas nas matrizes (</text:span><text:span text:style-name="T2">Page Faults</text:span><text:span text:style-name="T1">) originárias aquando num pretenso e re-avivado preenchimento, ela derruba ativamente com ferocidade imediata e restrita perante as páginas base, o espelho analítico de representação estática baseada transversal ao RSS com efeito estatístico instantâneo.</text:span><text:span text:style-name="T6">48</text:span></text:p>
          </table:table-cell>
        </table:table-row>
      </table:table>
      <text:p text:style-name="P15"><text:span text:style-name="T1">O Advento Restritivo: GOMEMLIMIT em Ecossistemas de Contêineres e cgroups</text:span></text:p>
      <text:p text:style-name="P1"><text:span text:style-name="T1">A sinergia entre o Scavenger e a submissão global balizada ao OS revelou insuficiências trágicas em orquestradores como o Kubernetes, onde pods limitados sofrem asfixia sob as balizas impostas via limites restritivos rigorosos em matrizes isoladas pelo Linux, conhecidos na estrutura OS por </text:span><text:span text:style-name="T2">cgroups</text:span><text:span text:style-name="T1">.</text:span><text:span text:style-name="T6">52</text:span><text:span text:style-name="T1"> Se um container estiver restringido a 100 MB, e o GOGC (balizado em % isoladas expansivas perante o </text:span><text:span text:style-name="T2">heap</text:span><text:span text:style-name="T1"> ao vivo ativo) permitir picos fugazes e pontuais transitórios perante blocos descartáveis adjacentes globais excedendo o teto inflexível local de 100 MB de alocação total real antes sequer do acionamento cruzado limiar orgânico do rastreamento global do motor de varredura isolado, o OOMKilled intercetará de forma punitiva a aplicação e irá chaciná-la sem apelo e obliterar os serviços transversalmente com erros letais irrevogáveis.</text:span><text:span text:style-name="T6">25</text:span></text:p>
      <text:p text:style-name="P1"><text:span text:style-name="T1">A redenção surgiu de forma magistral em Go 1.19 através do imperativo global flexibilizado: a variável sistémica e o acionador transversal limitador </text:span><text:span text:style-name="T4">GOMEMLIMIT</text:span><text:span text:style-name="T1"> (igualmente acessível por redefinições locais na ramificação interna associada na estrutura global submissa da runtime/debug.SetMemoryLimit).</text:span><text:span text:style-name="T6">41</text:span><text:span text:style-name="T1"> Esta restrição global atua sob submissão restrita dita em "Soft Limit" englobando o escopo global real do </text:span><text:span text:style-name="T2">heap</text:span><text:span text:style-name="T1"> e os excessos da runtime em medições globais e vetoriais restritivas puras perante o pacote otimizado e referencial submisso via a recolha paralela matriz runtime/metrics (cruzando isoladamente /memory/classes/total:bytes descontando /memory/classes/heap/released:bytes).</text:span><text:span text:style-name="T6">41</text:span></text:p>
      <text:p text:style-name="P1"><text:span text:style-name="T1">Ao impor um teto de cristal matemático perante a barreira de RAM, a orquestração do </text:span><text:span text:style-name="T2">Pacer</text:span><text:span text:style-name="T1"> adota um pragmatismo beligerante. À medida que o limiar das métricas totalitárias do </text:span><text:span text:style-name="T2">GOMEMLIMIT</text:span><text:span text:style-name="T1"> roça no teto invisível, a </text:span><text:span text:style-name="T2">runtime</text:span><text:span text:style-name="T1"> acelera ferozmente ciclos curtos agressivos de limpezas profundas ativas com devolução imediata pelo Scavenger. Evita, assim, de forma miraculosa, exaustões paralisantes indesejáveis cegas perante as limitações limitantes originadas sob restrições impiedosas estáticas restritivas externas perante o </text:span><text:span text:style-name="T2">Docker</text:span><text:span text:style-name="T1"> ou contentores na generalidade dos sistemas de restrição partilhados globais, mesmo perante transações caóticas e expansões colossais passivas.</text:span><text:span text:style-name="T6">41</text:span></text:p>
      <text:p text:style-name="P16"><text:span text:style-name="T1">Simpatia Mecânica no Processador (CPU): Estruturação e o sync.Pool</text:span></text:p>
      <text:p text:style-name="P1"><text:span text:style-name="T1">A simetria termodinâmica da Go não perdoa infrações ignorantes às barreiras estáticas de acesso à memória nas </text:span><text:span text:style-name="T2">cache lines</text:span><text:span text:style-name="T1">. Uma </text:span><text:span text:style-name="T2">cache line</text:span><text:span text:style-name="T1"> da CPU é transferida da RAM não num byte vetorial de transações exíguas minúsculas cegas isoladas unicamente restritas subjacentes, mas numa bloco contíguo invariável bruto e denso agrupado padronizado tipicamente aos 64 bytes (ou raros 128 em subestruturas dispares).</text:span><text:span text:style-name="T6">1</text:span></text:p>
      <text:p text:style-name="P1"><text:span text:style-name="T1">A consequência desta rigidez gera a catástrofe de alinhamento chamada Falso Compartilhamento (</text:span><text:span text:style-name="T2">False Sharing</text:span><text:span text:style-name="T1">). Se dois campos primitivos atómicos adjacentes, por exemplo num pseudo </text:span><text:span text:style-name="T2">struct</text:span><text:span text:style-name="T1">, CountA e CountB, partilharem fisicamente o mesmo escopo vetorizado denso e inquebrável enclausurado adjacente nos confins cegos apertados perante as paredes dos mesmos e isolados 64 bytes de hardware, uma leitura e varredura cruzada atua fatalmente na rede da CPU global conjunta inteira da máquina paralela.</text:span><text:span text:style-name="T6">1</text:span><text:span text:style-name="T1"> Quando a </text:span><text:span text:style-name="T2">Goroutine 1</text:span><text:span text:style-name="T1"> operada sobre o Núcleo físico 1 altera e intercede ativamente num incremento do valor submisso cruzado atómico perante o local na fronteira unida subjacente no CountA, a mecânica universal inflexível submissa restrita ao sistema no modelo lógico e padronizado e imperativo associado nos acordos globais de Hardware baseados e impostos por </text:span><text:span text:style-name="T2">protocolos coerentes isolados cruzados nas arquiteturas MESI (Modificado, Exclusivo, Partilhado, Inválido)</text:span><text:span text:style-name="T1">, não permite que a outra região da </text:span><text:span text:style-name="T2">cache line</text:span><text:span text:style-name="T1"> paralela hospedada continue viva no isolamento vizinho transversal local no campo desvinculado.</text:span><text:span text:style-name="T6">1</text:span><text:span text:style-name="T1"> Todo a linha de cache L1 inteira desintegra as suas presenças cruzadas no L1 do vizinho orgânico adjacente global (Núcleo 2) submetido sob a forma violenta atómica através de um relâmpago punitivo local de desvalidação cruzada invisível e impercetível em </text:span><text:span text:style-name="T2">broadcast</text:span><text:span text:style-name="T1">, submetendo os caminhos passivos isolados locais não afetados numa Cache Miss artificial letal originando perdas conjuntas catastróficas passivas e forçando demoras de 300 ciclos nas interconexões base invisíveis aos alocadores perante iterações colaterais sem razão aparente do desenvolvedor isolado submisso à desatenção basilar estruturada perante a vizinhança originária cruzada ignorada passiva no Hardware.</text:span><text:span text:style-name="T6">1</text:span></text:p>
      <text:p text:style-name="P15"><text:span text:style-name="T1">A Mecânica de Neutralização de Padding e as Operações do sync.Pool</text:span></text:p>
      <text:p text:style-name="P1"><text:span text:style-name="T1">A resposta cirúrgica dos engenheiros recai num engenhoso desdobramento topológico artificial invisível submisso apelidado perante as intervenções base em arquitetura vetorial padronizada: O Preenchimento Estrutural Artificial, popularizado como Barreira de Isolamento passivo ou </text:span><text:span text:style-name="T2">Padding</text:span><text:span text:style-name="T1">.</text:span></text:p>
      <text:p text:style-name="P1"><text:span text:style-name="T1">Esta técnica espelha o pragmatismo da premissa atómica subjacente operando orgulhosamente e magistralmente sem falhas num repositório mecânico central que reusa a matriz orgânica base cruzada de matrizes cegas de memória do Go e as liberta submissamente perante as perigosas sobreposições voláteis massivas cruzadas no GC das iterações cegas da RAM das lógicas conjuntas massivas originárias transitórias: a primitiva estrutural local paralela orquestrada por isolamentos e engrenagens chamadas </text:span><text:span text:style-name="T2">sync.Pool</text:span><text:span text:style-name="T1">.</text:span><text:span text:style-name="T6">1</text:span></text:p>
      <text:p text:style-name="P1"><text:span text:style-name="T1">A finalidade deste repositório isolado é abrigar as fatias maciças reutilizáveis sem passarem pela reciclagem massiva global da lixeira. Quando orquestrado na Fila interna e associado ao repositório vetorizado do núcleo (ancorado passivamente e organicamente via ponteiros em </text:span><text:span text:style-name="T2">pinSlow</text:span><text:span text:style-name="T1"> a um Processador lógico via estrutura poolLocal paralela do orquestrador), o motor insere deliberadamente na construção atómica passiva isolada originária invisível no código do compilador da própria Go as matrizes redundantes orgânicas </text:span><text:span text:style-name="T6">58</text:span><text:span text:style-name="T1">:</text:span></text:p>
      <text:p text:style-name="P8"/>
      <text:p text:style-name="P10"/>
      <text:p text:style-name="P11"><text:soft-page-break/></text:p>
      <text:p text:style-name="P12"><text:span text:style-name="T7">Go</text:span></text:p>
      <text:p text:style-name="P9"><text:span text:style-name="T9">type</text:span><text:span text:style-name="T5"> poolLocal </text:span><text:span text:style-name="T9">struct</text:span><text:span text:style-name="T5"> {<text:line-break/> <text:s text:c="3"/>poolLocalInternal<text:line-break/> <text:s text:c="3"/></text:span><text:span text:style-name="T8">// Prevents false sharing on widespread platforms with</text:span><text:span text:style-name="T5"><text:line-break/> <text:s text:c="3"/></text:span><text:span text:style-name="T8">// 128 mod (cache line size) = 0.</text:span><text:span text:style-name="T5"><text:line-break/> <text:s text:c="3"/>padbyte<text:line-break/>}<text:line-break/></text:span></text:p>
      <text:p text:style-name="P1"><text:span text:style-name="T1">A injecção pura deste muro de silêncio vetorial artificial com estéreis 128 bytes (na subestrutura do módulo diferencial) atira violentamente as alocações contíguas espaciais subsequentes cruzadas e atómicas referidas, originárias no domínio passivo dos núcleos paralelos, brutalmente muito além das vizinhanças dos domínios da fronteira original transversal e adjacente vetorial física original que co-habita nas restrições cruzadas associadas nos apertados e letais domínios exíguos orgânicos fechados nos 64-bytes cegos limitadores do protocolo originário basilar de MESI. Como consequência termodinâmica: o núcleo cruzado e o outro alocador processam perante o seu espelho alocado restritamente com independência, contornando, numa tacada de isolamento cirúrgico de base local imutável silenciosa invisível sem limites orgânicos colaterais atenuantes impeditivos interligados ao L1.</text:span><text:span text:style-name="T6">1</text:span></text:p>
      <text:p text:style-name="P1"><text:span text:style-name="T1">Esta manipulação estrutural, que exige sempre de um arquiteto do Go a ordenação vetorial maciça pesada das densidades do tipo (int64, ponteiros) no topo do </text:span><text:span text:style-name="T2">struct</text:span><text:span text:style-name="T1"> passivo declinando numa transição até às microscópicas preenchíveis adjacências isoladas base nas interações flexíveis em byte e bool no base limitador restritivo nas subidas limiares isoladas conjuntas inferiores das hierarquias ordenadas, permite varreduras densas perfeitas sem desperdício e um rendimento termodinâmico colossal na alocação global na orquestração originária conjunta perante o chip.</text:span><text:span text:style-name="T6">1</text:span></text:p>
      <text:p text:style-name="P16"><text:span text:style-name="T1">Casos de Estudo e Sucesso na Engenharia de Software Massiva</text:span></text:p>
      <text:p text:style-name="P1"><text:span text:style-name="T1">O domínio sobre o lixo transversal passivo conjuga o pilar primordial da resiliência originária nas premissas que ditam e orquestram a infraestrutura base originária da cloud moderna mundial. Sem estes padrões, serviços colossais engasgam na repetição fútil e transbordam no consumo de recursos orgânicos colossais cegos imperativos no Hardware submetido perante fluxos e </text:span><text:span text:style-name="T2">streaming</text:span><text:span text:style-name="T1"> infinitos cruzados nas requisições transversais massivas contíguas e imperativas interativas assíncronas do sistema original cego associado à rede de orquestração transversal. Dois gigantes na infraestrutura global exemplificam cirurgicamente estes princípios.</text:span></text:p>
      <text:p text:style-name="P15"><text:span text:style-name="T1">Kubernetes: Decodificação em Protobuf e Substituição por AllocatorPool</text:span></text:p>
      <text:p text:style-name="P1"><text:span text:style-name="T1">A maquinaria central de orquestração no Kubernetes e no </text:span><text:span text:style-name="T2">kube-apiserver</text:span><text:span text:style-name="T1"> foi confrontada no processo iterativo contíguo de otimização mecânica perante picos insustentáveis transitórios das leituras cegas iteradas com origem puramente no subsistema vetorizado nas respostas do protocolo binário maciço de interações </text:span><text:span text:style-name="T2">streaming</text:span><text:span text:style-name="T1"> das List contidas nos fluxogramas codificados massivos originários e transmitidos nos blocos pesados sob serialização da biblioteca base </text:span><text:span text:style-name="T2">Protobuf</text:span><text:span text:style-name="T1"> (Protocol Buffers).</text:span><text:span text:style-name="T6">62</text:span></text:p>
      <text:p text:style-name="P1"><text:span text:style-name="T1">A causa matricial primária submetida cruzada aos construtores passivos originais recaía organicamente no uso contíguo submisso cego da alocação de memória base através do SimpleAllocator implementado no codificador basilar transacional streaming local.</text:span><text:span text:style-name="T6">63</text:span><text:span text:style-name="T1"> Este padrão engenhoso falho imperativo primitivo obrigava iterativamente cruzadamente à instanciação contínua redundante subjacente puramente dependente do heap. O construtor alocava obrigatoriamente </text:span><text:span text:style-name="T2">slices</text:span><text:span text:style-name="T1"> de bytes frescas separadas, originárias cegas limpas a partir do próprio zero de forma iterativa sem recurso à poupança submetendo instâncias conjuntas avulsas isoladas, resultando na extração individual e no fabrico constante cego isolado de novos vetores efêmeros interconectados alocados globalmente para cada bloco passivo e objeto codificado.</text:span><text:span text:style-name="T6">63</text:span><text:span text:style-name="T1"> Num fluxo cego de resposta assíncrono perante milhares ou milhões de recursos alocados vetoriais originários iterativos, esta transação cega originava a asfixia das instâncias conjuntas, acumulando instantaneamente lixo cego passageiro originário que sobrecarregava as passagens da varredura, inflacionava brutalmente os medidores orgânicos baseados limitadores na RAM, e induzia </text:span><text:span text:style-name="T2">OOM (Out-Of-Memory)</text:span><text:span text:style-name="T1"> fatais e estrangulamentos pesados letais no Garbage Collector transversal perante as orquestrações massivas em tráfego concorrente assíncrono restritivo intenso.</text:span><text:span text:style-name="T6">63</text:span></text:p>
      <text:p text:style-name="P1"><text:span text:style-name="T1">Num projeto recente (Issue #133956), os engenheiros resolveram o colapso através de uma otimização puramente assente em </text:span><text:span text:style-name="T2">Zero-Allocation</text:span><text:span text:style-name="T1"> no percurso massivo quente de descodificação paralela da matriz referida. Eles introduziram a revogação imperativa originária totalitária do SimpleAllocator obsoleto isolado em detrimento de uma topologia reutilizável baseada internamente puramente com interconexão no ecossistema transacional isolado runtime.AllocatorPool.</text:span><text:span text:style-name="T6">30</text:span><text:span text:style-name="T1"> O AllocatorPool implementa submissamente na matriz o motor transversal primitivo local baseado no </text:span><text:span text:style-name="T2">cache</text:span><text:span text:style-name="T1"> restritivo limiar originário de repouso estruturado submetido nas instâncias invisíveis paralelas do orquestrador basilar (a class estruturada e subjacente em base isolada: a sync.Pool).</text:span><text:span text:style-name="T6">30</text:span><text:span text:style-name="T1"> Deste modo, na termodinâmica iterativa, as instâncias de buffers são resgatadas do lixo mortífero isolado sem as varreduras, repousam localmente e reanimam intactas aliviando impiedosamente a brutal exaustão passiva dos processos e o trânsito impiedoso iterativo cruzado transacional de sobrecarga maciça originária no </text:span><text:span text:style-name="T2">heap</text:span><text:span text:style-name="T1"> no processamento isolado perante o Kubernetes.</text:span><text:span text:style-name="T6">30</text:span></text:p>
      <text:p text:style-name="P15"><text:span text:style-name="T1">Docker (containerd): O Vazamento Interino do io.CopyBuffer</text:span></text:p>
      <text:p text:style-name="P1"><text:span text:style-name="T1">De modo espelhado na contenção e simetria orgânica basilar cruzada subjacente originária perante processos da </text:span><text:span text:style-name="T2">runtime</text:span><text:span text:style-name="T1"> de execução isolada do orquestrador do Docker (o basilar containerd e as extensões adjacentes do containerd-shim), picos anómalos sistemáticos iterativos com latência infundada nos registos no Resident Set Size (RSS) foram assinalados em execuções cíclicas continuadas e interações assíncronas isoladas cruzadas na máquina limiar associada a listagens originárias massivas da rotina (tarefas maciças vetoriais com a base I/O de rede massiva de comandos paralelos perante os contentores instanciados).</text:span><text:span text:style-name="T6">65</text:span></text:p>
      <text:p text:style-name="P1"><text:span text:style-name="T1">A anatomia desta fuga de recursos cruzados residia no método simplista inicial embutido e adotado na compilação originária das passagens conjuntas limiares transversais para as cópias do percurso das passagens vetoriais: o comando estéril básico implementado em transferências de dados puramente via a função clássica do pacote original primitivo da linguagem, o io.Copy.</text:span><text:span text:style-name="T6">65</text:span><text:span text:style-name="T1"> Apesar da funcionalidade limiar estar livre do imposto de alocar perante o peso imensurável todo um ficheiro massivo originário iterativo num array volátil numa alocação castigadora passível no </text:span><text:span text:style-name="T2">heap</text:span><text:span text:style-name="T1"> como acontece erroneamente sob funções primitivas ingénuas cegas do pacote equivalente transversal io.ReadAll </text:span><text:span text:style-name="T6">68</text:span><text:span text:style-name="T1">, a chamada mecânica subjacente originária paralela do limitador transversal io.Copy engata e instiga o isolamento perante as transações limiares na matriz global injetando uma nova rotina orgânica, criando cronicamente sob domínios isolados por cada invocação conjunta uma nova fatia basilar interna no invólucro do canal originando invariavelmente uma fatia estéril provisória temporária do </text:span><text:span text:style-name="T2">heap</text:span><text:span text:style-name="T1"> submetida com uma capacidade imutável de 32 KB fixos, descartável ao concluir cada transação iterativa local passível de cópia cruzada limiar referenciada isolada.</text:span><text:span text:style-name="T6">2</text:span><text:span text:style-name="T1"> Com tráfego maciço originário concorrente e incessantes saltos transversais passivos orgânicos adjacentes em conexões limiares interconectadas de chamadas de </text:span><text:span text:style-name="T2">pipelines</text:span><text:span text:style-name="T1"> isoladas e terminais atómicos repetitivos associados nas listagens interativas orquestradas ativamente nos ciclos infindáveis transversais associados aos shim, o acumular massivo provisório submisso gerava sub-limites mortos exaustos abandonados na RAM cruzada e atulhava os canais interconectados paralisantes na base do Garbage Collector perante os registos ilusórios no OS local orgânico associativo RSS referidos.</text:span><text:span text:style-name="T6">65</text:span></text:p>
      <text:p text:style-name="P1"><text:span text:style-name="T1">A solução arquitetural de neutralização limiar e pragmática originou a reformulação das interligações adjacentes substituindo ativamente a matriz do pacote referencial redundante ingénuo por intervenções submissas nas operações transacionais limiares passivas do iterador paralelo cruzado na diretiva matriz conjunta base do Go io.CopyBuffer sob congregação mecânica restrita atómica na sintaxe local submetida na infraestrutura orgânica copyBufferPool (também edificada no resguardo isolado protetor orgânico transversal do repositório interconectado do orquestrador, alicerçado submissamente num vetor assíncrono orquestrador de repouso estrutural em cache livre de matriz isolada global originado em </text:span><text:span text:style-name="T2">sync.Pool</text:span><text:span text:style-name="T1"> ou </text:span><text:span text:style-name="T2">channels</text:span><text:span text:style-name="T1"> com </text:span><text:span text:style-name="T2">buffer</text:span><text:span text:style-name="T1">).</text:span><text:span text:style-name="T6">69</text:span></text:p>
      <text:p text:style-name="P2"/>
      <table:table table:name="Table5" table:style-name="Table5">
        <table:table-column table:style-name="Table5.A"/>
        <table:table-column table:style-name="Table5.B"/>
        <table:table-row table:style-name="Table5.1">
          <table:table-cell table:style-name="Table5.A1" office:value-type="string">
            <text:p text:style-name="P4"><text:span text:style-name="T4">Estrutura Sintática de Streaming em Go</text:span></text:p>
          </table:table-cell>
          <table:table-cell table:style-name="Table5.A1" office:value-type="string">
            <text:p text:style-name="P4"><text:span text:style-name="T4">Efeito Mecânico e Ramificação Vetorial no Motor Termodinâmico</text:span></text:p>
          </table:table-cell>
        </table:table-row>
        <table:table-row table:style-name="Table5.1">
          <table:table-cell table:style-name="Table5.A1" office:value-type="string">
            <text:p text:style-name="P4"><text:span text:style-name="T1">io.ReadAll</text:span></text:p>
          </table:table-cell>
          <table:table-cell table:style-name="Table5.A1" office:value-type="string">
            <text:p text:style-name="P1"><text:span text:style-name="T1">Abordagem destrutiva e letal em arquivos sem origem de tamanho delimitado. Lê interativamente todos os bytes contíguos obrigando a </text:span><text:span text:style-name="T2">Slice</text:span><text:span text:style-name="T1"> passiva interina a entrar num ciclo constante originando transições colossais passivas com multiplicadores em expansão no </text:span><text:span text:style-name="T2">Heap</text:span><text:span text:style-name="T1"> originário e causando o esgotamento mortífero perante </text:span><text:span text:style-name="T2">OOM (Out-of-Memory)</text:span><text:span text:style-name="T1">.</text:span><text:span text:style-name="T6">68</text:span></text:p>
          </table:table-cell>
        </table:table-row>
        <table:table-row table:style-name="Table5.1">
          <table:table-cell table:style-name="Table5.A1" office:value-type="string">
            <text:p text:style-name="P4"><text:span text:style-name="T1">io.Copy</text:span></text:p>
          </table:table-cell>
          <table:table-cell table:style-name="Table5.A1" office:value-type="string">
            <text:p text:style-name="P1"><text:span text:style-name="T1">Abordagem utilitária mas passível de resíduos nocivos adjacentes. Injeta ativamente buffers vetoriais fechados de uma restrição orgânica fixa iterativa constante de 32 KB para submissão cruzada iterada e descarta o buffer isolado interconectado local num rasto subjacente atirando a fatia perante a reciclagem limiar punitiva no GC adjacente transversal do ecossistema e degradando o RSS.</text:span><text:span text:style-name="T6">65</text:span></text:p>
          </table:table-cell>
        </table:table-row>
        <table:table-row table:style-name="Table5.1">
          <table:table-cell table:style-name="Table5.A1" office:value-type="string">
            <text:p text:style-name="P4"><text:span text:style-name="T1">io.CopyBuffer + sync.Pool</text:span></text:p>
          </table:table-cell>
          <table:table-cell table:style-name="Table5.A1" office:value-type="string">
            <text:p text:style-name="P1"><text:span text:style-name="T1">A Abordagem Pragmática Mestra adotada pelas arquiteturas base de contenção iterativa transversal no Docker e Containerd adjacentes. Um pacote byte originário e limiar iterado a 32 KB fixos na matriz conjunta paralela e desvinculado dos fluxos de reciclagens subjacentes no motor central é recuperado, instanciado numa submissão do fluxo orgânico do processo de cruzamento de entrada, executa o transporte total, é resetado do rastro cego perante instâncias da cópia, e entra imediatamente num fecho pacífico de re-arquivamento isolado devolvido em repouso passivo orquestrado para suportar e reciclar perfeitamente sem novas alocações ou pressões mortais no </text:span><text:span text:style-name="T2">GC</text:span><text:span text:style-name="T1"> o próximo ciclo transversal contíguo interativo imediato submisso ao processo alocador cruzado sem fricção.</text:span><text:span text:style-name="T6">70</text:span></text:p>
          </table:table-cell>
        </table:table-row>
      </table:table>
      <text:p text:style-name="P16"><text:span text:style-name="T1">Conclusão: A Sinfonia de Contenção de Recursos em Ecossistemas Massivos</text:span></text:p>
      <text:p text:style-name="P1"><text:soft-page-break/><text:span text:style-name="T1">A eficácia implacável no tratamento da memória imposto na programação de sistemas via linguagem Go não resulta, portanto, de magia compiladora obscura insondável ou alocadores milagrosos, mas de uma orquestração rigorosa matemática orgânica e contígua imposta pelas matrizes restritivas baseadas ativamente nas imposições mecânicas lógicas rigorosas.</text:span></text:p>
      <text:p text:style-name="P1"><text:span text:style-name="T1">Desde o confinamento limiar das exaustões e estrangulamentos de processamento nas árvores em expansão paralela do </text:span><text:span text:style-name="T2">pallocSum</text:span><text:span text:style-name="T1"> em instâncias Radix Tree no coração matriz do alocador global interconectado e adjacente na hierarquia isolada nos alocadores transacionais </text:span><text:span text:style-name="T2">mheap</text:span><text:span text:style-name="T1"> </text:span><text:span text:style-name="T6">11</text:span><text:span text:style-name="T1">, a proteção intransigente cruzada submissa operante no modelo cromático perante passagens cegas nas raízes das Stacks transversais em tons passivos escuros perante o rastreio híbrido orgânico basilar no ecossistema coletor cruzado e interconectado de lixo na limitação originária nas barreiras submetidas por </text:span><text:span text:style-name="T2">Dijkstra</text:span><text:span text:style-name="T1"> e </text:span><text:span text:style-name="T2">Yuasa</text:span><text:span text:style-name="T1">.</text:span><text:span text:style-name="T6">31</text:span><text:span text:style-name="T1"> Tudo converge mecanicamente em uníssono de harmonia termodinâmica orgânica e perfeitamente equilibrada e alinhada transversalmente baseada num limite.</text:span></text:p>
      <text:p text:style-name="P1"><text:span text:style-name="T1">Seja nos preceitos imperativos de desvios e envólucros do eface perante fuga no ecossistema referencial dinâmico imposto pelo compilador na compilação do rastro na fuga associada, seja no esmagar dos conflitos submetidos e passivos transversais de cache limiar orquestrados em restrições inter-adjacentes conjuntas isoladas na máquina originárias na CPU contida nos Falsos Compartilhamentos cruzados anulados por padding orquestrado artificial e orgânico de silêncio fantasma de 128 bytes contíguos numa orquestração orgânica adjacente sync.Pool.</text:span><text:span text:style-name="T6">58</text:span><text:span text:style-name="T1"> Em frente do estrangulamento restritivo cego de sistemas alheios, o ecossistema protege a escalabilidade isolando chamadas furtivas assíncronas de restituições contíguas furtivas num rastro pacífico impiedoso submisso ao OS base subjacente conjuntas pelo iterador associativo </text:span><text:span text:style-name="T2">Scavenger</text:span><text:span text:style-name="T1"> contido sob preceitos absolutos de MADV_DONTNEED no orquestrador passivo originário adjacente </text:span><text:span text:style-name="T6">40</text:span><text:span text:style-name="T1">, impondo finalmente um domínio restrito absoluto submisso limiar iterativo via comandos submissos balizadores na restrição restritiva conjuntas contíguas no GOMEMLIMIT em cgroups para impedir fatalidades mortíferas.</text:span><text:span text:style-name="T6">41</text:span></text:p>
      <text:p text:style-name="P13"><text:span text:style-name="T1">Go instaura, de forma cabal irrefutável e consolidada, que a escalabilidade paralela orgânica das infraestruturas transacionais cruzadas conjuntas massivas não é, portanto e indubitavelmente, fruto basilar meramente associado do hardware colosso infinito, mas a vitória limiar originária adjacente submissa ditada indubitavelmente da simpatia mecânica implacável cravada sem apelo em todas as rotinas conjuntas primitivas restritas da própria linguagem base e no rigor orgânico ditado num padrão de precisão atómica imposta do próprio e irrepreensível engenheiro.</text:span></text:p>
      <text:p text:style-name="P17"><text:span text:style-name="T10">Referências citadas</text:span></text:p>
      <text:list xml:id="list1814273701" text:style-name="WWNum3">
        <text:list-item>
          <text:p text:style-name="P7"><text:span text:style-name="T11">Pesquisa Avançada em Golang.pdf</text:span></text:p>
        </text:list-item>
        <text:list-item>
          <text:p text:style-name="P7"><text:span text:style-name="T11">Investigate increased memory usage with ActionCable (#324831) · Issue - GitLab, acessado em junho 24, 2026, </text:span><text:a xlink:type="simple" xlink:href="https://gitlab.com/gitlab-org/gitlab/-/issues/324831" text:style-name="ListLabel_20_28" text:visited-style-name="ListLabel_20_28"><text:span text:style-name="T12">https://gitlab.com/gitlab-org/gitlab/-/issues/324831</text:span></text:a></text:p>
        </text:list-item>
        <text:list-item>
          <text:p text:style-name="P7"><text:span text:style-name="T11">A visual guide to Go Memory Allocator from scratch (Golang) | by Ankur Anand - Medium, acessado em junho 24, 2026, </text:span><text:a xlink:type="simple" xlink:href="https://medium.com/@ankur_anand/a-visual-guide-to-golang-memory-allocator-from-ground-up-e132258453ed" text:style-name="ListLabel_20_28" text:visited-style-name="ListLabel_20_28"><text:span text:style-name="T12">https://medium.com/@ankur_anand/a-visual-guide-to-golang-memory-allocator-from-ground-up-e132258453ed</text:span></text:a></text:p>
        </text:list-item>
        <text:list-item>
          <text:p text:style-name="P7"><text:span text:style-name="T11">Memory Allocation in Go | Melatoni, acessado em junho 24, 2026, </text:span><text:a xlink:type="simple" xlink:href="https://nghiant3223.github.io/2025/06/03/memory_allocation_in_go.html" text:style-name="ListLabel_20_28" text:visited-style-name="ListLabel_20_28"><text:span text:style-name="T12">https://nghiant3223.github.io/2025/06/03/memory_allocation_in_go.html</text:span></text:a></text:p>
        </text:list-item>
        <text:list-item>
          <text:p text:style-name="P7"><text:span text:style-name="T11">Visualizing memory management in Golang | Technorage - Deepu K Sasidharan, acessado em junho 24, 2026, </text:span><text:a xlink:type="simple" xlink:href="https://deepu.tech/memory-management-in-golang/" text:style-name="ListLabel_20_28" text:visited-style-name="ListLabel_20_28"><text:span text:style-name="T12">https://deepu.tech/memory-management-in-golang/</text:span></text:a></text:p>
        </text:list-item>
        <text:list-item>
          <text:p text:style-name="P7"><text:span text:style-name="T11">Go's Memory Allocator - Overview - andrestc.com, acessado em junho 24, 2026, </text:span><text:a xlink:type="simple" xlink:href="https://andrestc.com/post/go-memory-allocation-pt1/" text:style-name="ListLabel_20_28" text:visited-style-name="ListLabel_20_28"><text:span text:style-name="T12">https://andrestc.com/post/go-memory-allocation-pt1/</text:span></text:a></text:p>
        </text:list-item>
        <text:list-item>
          <text:p text:style-name="P7"><text:span text:style-name="T11">12.9 Past, Present, and Future | Go: Under the Hood - The golang.design Initiative, acessado em junho 24, 2026, </text:span><text:a xlink:type="simple" xlink:href="https://golang.design/under-the-hood/en/part4memory/ch12alloc/history/" text:style-name="ListLabel_20_28" text:visited-style-name="ListLabel_20_28"><text:span text:style-name="T12">https://golang.design/under-the-hood/en/part4memory/ch12alloc/history/</text:span></text:a></text:p>
        </text:list-item>
        <text:list-item>
          <text:p text:style-name="P7"><text:span text:style-name="T11">12.7 The Page Allocator | Go: Under the Hood - The golang.design Initiative, acessado em junho 24, 2026, </text:span><text:a xlink:type="simple" xlink:href="https://golang.design/under-the-hood/en/part4memory/ch12alloc/pagealloc/" text:style-name="ListLabel_20_28" text:visited-style-name="ListLabel_20_28"><text:span text:style-name="T12">https://golang.design/under-the-hood/en/part4memory/ch12alloc/pagealloc/</text:span></text:a></text:p>
        </text:list-item>
        <text:list-item>
          <text:p text:style-name="P7"><text:span text:style-name="T11">runtime: make the page allocator scale · Issue #35112 · golang/go - GitHub, acessado em junho 24, 2026, </text:span><text:a xlink:type="simple" xlink:href="https://github.com/golang/go/issues/35112" text:style-name="ListLabel_20_28" text:visited-style-name="ListLabel_20_28"><text:span text:style-name="T12">https://github.com/golang/go/issues/35112</text:span></text:a></text:p>
        </text:list-item>
        <text:list-item>
          <text:p text:style-name="P7"><text:span text:style-name="T11">mpagealloc.go - - The Go Programming Language, acessado em junho 24, 2026, </text:span><text:a xlink:type="simple" xlink:href="https://go.dev/src/runtime/mpagealloc.go" text:style-name="ListLabel_20_28" text:visited-style-name="ListLabel_20_28"><text:span text:style-name="T12">https://go.dev/src/runtime/mpagealloc.go</text:span></text:a></text:p>
        </text:list-item>
        <text:list-item>
          <text:p text:style-name="P7"><text:span text:style-name="T11">go/src/runtime/mpagealloc.go at master · golang/go - GitHub, acessado em junho 24, 2026, </text:span><text:a xlink:type="simple" xlink:href="https://github.com/golang/go/blob/master/src/runtime/mpagealloc.go" text:style-name="ListLabel_20_28" text:visited-style-name="ListLabel_20_28"><text:span text:style-name="T12">https://github.com/golang/go/blob/master/src/runtime/mpagealloc.go</text:span></text:a></text:p>
        </text:list-item>
        <text:list-item>
          <text:p text:style-name="P7"><text:span text:style-name="T11">Golang源码5-内存管理 - 稀土掘金, acessado em junho 24, 2026, </text:span><text:a xlink:type="simple" xlink:href="https://juejin.cn/post/7400688776485617690" text:style-name="ListLabel_20_28" text:visited-style-name="ListLabel_20_28"><text:span text:style-name="T12">https://juejin.cn/post/7400688776485617690</text:span></text:a></text:p>
        </text:list-item>
        <text:list-item>
          <text:p text:style-name="P7"><text:span text:style-name="T11">Understanding Escape Analysis in Go – Explained with Example Code - freeCodeCamp, acessado em junho 24, 2026, </text:span><text:a xlink:type="simple" xlink:href="https://www.freecodecamp.org/news/understanding-escape-analysis-in-go/" text:style-name="ListLabel_20_28" text:visited-style-name="ListLabel_20_28"><text:span text:style-name="T12">https://www.freecodecamp.org/news/understanding-escape-analysis-in-go/</text:span></text:a></text:p>
        </text:list-item>
        <text:list-item>
          <text:p text:style-name="P7"><text:span text:style-name="T11">Understanding Go's Escape Analysis - The Coding Gopher, acessado em junho 24, 2026, </text:span><text:a xlink:type="simple" xlink:href="https://thecodinggopher.substack.com/p/understanding-gos-escape-analysis" text:style-name="ListLabel_20_28" text:visited-style-name="ListLabel_20_28"><text:span text:style-name="T12">https://thecodinggopher.substack.com/p/understanding-gos-escape-analysis</text:span></text:a></text:p>
        </text:list-item>
        <text:list-item>
          <text:p text:style-name="P7"><text:span text:style-name="T11">Stack or Heap? Going Deeper with Escape Analysis in Go for Better Performance, acessado em junho 24, 2026, </text:span><text:a xlink:type="simple" xlink:href="https://syntactic-sugar.dev/blog/nested-route/go-escape-analysis" text:style-name="ListLabel_20_28" text:visited-style-name="ListLabel_20_28"><text:span text:style-name="T12">https://syntactic-sugar.dev/blog/nested-route/go-escape-analysis</text:span></text:a></text:p>
        </text:list-item>
        <text:list-item>
          <text:p text:style-name="P7"><text:span text:style-name="T11">4.2 Interfaces | Go: Under the Hood - The golang.design Initiative, acessado em junho 24, 2026, </text:span><text:a xlink:type="simple" xlink:href="https://golang.design/under-the-hood/en/part2lang/ch04type/interface/" text:style-name="ListLabel_20_28" text:visited-style-name="ListLabel_20_28"><text:span text:style-name="T12">https://golang.design/under-the-hood/en/part2lang/ch04type/interface/</text:span></text:a></text:p>
        </text:list-item>
        <text:list-item>
          <text:p text:style-name="P7"><text:soft-page-break/><text:span text:style-name="T11">Go — Interfaces (the fat pointer illusion) | by mokshrchadha | May, 2026 | Medium, acessado em junho 24, 2026, </text:span><text:a xlink:type="simple" xlink:href="https://medium.com/@chadhamoksh/go-interfaces-the-fat-pointer-illusion-39f44bc7efef" text:style-name="ListLabel_20_28" text:visited-style-name="ListLabel_20_28"><text:span text:style-name="T12">https://medium.com/@chadhamoksh/go-interfaces-the-fat-pointer-illusion-39f44bc7efef</text:span></text:a></text:p>
        </text:list-item>
        <text:list-item>
          <text:p text:style-name="P7"><text:span text:style-name="T11">Trying to understand when boxing results in a malloc : r/golang - Reddit, acessado em junho 24, 2026, </text:span><text:a xlink:type="simple" xlink:href="https://www.reddit.com/r/golang/comments/sdsfl9/trying_to_understand_when_boxing_results_in_a/" text:style-name="ListLabel_20_28" text:visited-style-name="ListLabel_20_28"><text:span text:style-name="T12">https://www.reddit.com/r/golang/comments/sdsfl9/trying_to_understand_when_boxing_results_in_a/</text:span></text:a></text:p>
        </text:list-item>
        <text:list-item>
          <text:p text:style-name="P7"><text:span text:style-name="T11">cmd/compile, runtime: GOEXPERIMENT to add two non-pointer words to iface/eface · Issue #45494 · golang/go - GitHub, acessado em junho 24, 2026, </text:span><text:a xlink:type="simple" xlink:href="https://github.com/golang/go/issues/45494" text:style-name="ListLabel_20_28" text:visited-style-name="ListLabel_20_28"><text:span text:style-name="T12">https://github.com/golang/go/issues/45494</text:span></text:a></text:p>
        </text:list-item>
        <text:list-item>
          <text:p text:style-name="P7"><text:span text:style-name="T11">Anatomy of Go: Internal Language Insights | PDF - Scribd, acessado em junho 24, 2026, </text:span><text:a xlink:type="simple" xlink:href="https://www.scribd.com/document/901280126/Anatomy-of-Go-PDF-Copia" text:style-name="ListLabel_20_28" text:visited-style-name="ListLabel_20_28"><text:span text:style-name="T12">https://www.scribd.com/document/901280126/Anatomy-of-Go-PDF-Copia</text:span></text:a></text:p>
        </text:list-item>
        <text:list-item>
          <text:p text:style-name="P7"><text:span text:style-name="T11">acessado em junho 24, 2026, </text:span><text:a xlink:type="simple" xlink:href="https://raw.githubusercontent.com/golang-design/history/master/README.md" text:style-name="ListLabel_20_28" text:visited-style-name="ListLabel_20_28"><text:span text:style-name="T12">https://raw.githubusercontent.com/golang-design/history/master/README.md</text:span></text:a></text:p>
        </text:list-item>
        <text:list-item>
          <text:p text:style-name="P7"><text:span text:style-name="T11">golang-design/history: Go: A Documentary | https://golang.design/history · GitHub - GitHub, acessado em junho 24, 2026, </text:span><text:a xlink:type="simple" xlink:href="https://github.com/golang-design/history" text:style-name="ListLabel_20_28" text:visited-style-name="ListLabel_20_28"><text:span text:style-name="T12">https://github.com/golang-design/history</text:span></text:a></text:p>
        </text:list-item>
        <text:list-item>
          <text:p text:style-name="P7"><text:span text:style-name="T11">Slices - Ultimate Go Tour, acessado em junho 24, 2026, </text:span><text:a xlink:type="simple" xlink:href="https://tour.ardanlabs.com/tour/por/slices" text:style-name="ListLabel_20_28" text:visited-style-name="ListLabel_20_28"><text:span text:style-name="T12">https://tour.ardanlabs.com/tour/por/slices</text:span></text:a></text:p>
        </text:list-item>
        <text:list-item>
          <text:p text:style-name="P7"><text:span text:style-name="T11">Go-Slice的扩容机制- GJH- - 博客园, acessado em junho 24, 2026, </text:span><text:a xlink:type="simple" xlink:href="https://www.cnblogs.com/ferris/p/17363701.html" text:style-name="ListLabel_20_28" text:visited-style-name="ListLabel_20_28"><text:span text:style-name="T12">https://www.cnblogs.com/ferris/p/17363701.html</text:span></text:a></text:p>
        </text:list-item>
        <text:list-item>
          <text:p text:style-name="P7"><text:span text:style-name="T11">cmd/compile/... cmd/link/... runtime - Go Issues, acessado em junho 24, 2026, </text:span><text:a xlink:type="simple" xlink:href="https://goissues.org/cmd/compile/...,cmd/link/...,runtime" text:style-name="ListLabel_20_28" text:visited-style-name="ListLabel_20_28"><text:span text:style-name="T12">https://goissues.org/cmd/compile/...,cmd/link/...,runtime</text:span></text:a></text:p>
        </text:list-item>
        <text:list-item>
          <text:p text:style-name="P7"><text:span text:style-name="T11">Writing Barriers in Go Garbage Collection - Medium, acessado em junho 24, 2026, </text:span><text:a xlink:type="simple" xlink:href="https://medium.com/@AlexanderObregon/writing-barriers-in-go-garbage-collection-baf72a4ee088" text:style-name="ListLabel_20_28" text:visited-style-name="ListLabel_20_28"><text:span text:style-name="T12">https://medium.com/@AlexanderObregon/writing-barriers-in-go-garbage-collection-baf72a4ee088</text:span></text:a></text:p>
        </text:list-item>
        <text:list-item>
          <text:p text:style-name="P7"><text:span text:style-name="T11">proposal: io: allocate copy buffers from a pool · Issue #58452 · golang/go - GitHub, acessado em junho 24, 2026, </text:span><text:a xlink:type="simple" xlink:href="https://github.com/golang/go/issues/58452" text:style-name="ListLabel_20_28" text:visited-style-name="ListLabel_20_28"><text:span text:style-name="T12">https://github.com/golang/go/issues/58452</text:span></text:a></text:p>
        </text:list-item>
        <text:list-item>
          <text:p text:style-name="P7"><text:span text:style-name="T11">proposal/design/35112-scaling-the-page-allocator.md at master - GitHub, acessado em junho 24, 2026, </text:span><text:a xlink:type="simple" xlink:href="https://github.com/golang/proposal/blob/master/design/35112-scaling-the-page-allocator.md" text:style-name="ListLabel_20_28" text:visited-style-name="ListLabel_20_28"><text:span text:style-name="T12">https://github.com/golang/proposal/blob/master/design/35112-scaling-the-page-allocator.md</text:span></text:a></text:p>
        </text:list-item>
        <text:list-item>
          <text:p text:style-name="P7"><text:span text:style-name="T11">about "hybrid barrier" - Google Groups, acessado em junho 24, 2026, </text:span><text:a xlink:type="simple" xlink:href="https://groups.google.com/g/golang-nuts/c/sQq1HbqK8aM" text:style-name="ListLabel_20_28" text:visited-style-name="ListLabel_20_28"><text:span text:style-name="T12">https://groups.google.com/g/golang-nuts/c/sQq1HbqK8aM</text:span></text:a></text:p>
        </text:list-item>
        <text:list-item>
          <text:p text:style-name="P7"><text:span text:style-name="T11">runtime package - k8s.io/apimachinery/pkg/runtime - Go Packages, acessado em junho 24, 2026, </text:span><text:a xlink:type="simple" xlink:href="https://pkg.go.dev/k8s.io/apimachinery/pkg/runtime" text:style-name="ListLabel_20_28" text:visited-style-name="ListLabel_20_28"><text:span text:style-name="T12">https://pkg.go.dev/k8s.io/apimachinery/pkg/runtime</text:span></text:a></text:p>
        </text:list-item>
        <text:list-item>
          <text:p text:style-name="P7"><text:span text:style-name="T11">proposal/design/17503-eliminate-rescan.md at master - GitHub, acessado em junho 24, 2026, </text:span><text:a xlink:type="simple" xlink:href="https://github.com/golang/proposal/blob/master/design/17503-eliminate-rescan.md" text:style-name="ListLabel_20_28" text:visited-style-name="ListLabel_20_28"><text:span text:style-name="T12">https://github.com/golang/proposal/blob/master/design/17503-eliminate-rescan.md</text:span></text:a></text:p>
        </text:list-item>
        <text:list-item>
          <text:p text:style-name="P7"><text:span text:style-name="T11">Evaluating and improving remembered sets in the HotSpot G1 garbage collector - Diva-portal.org, acessado em junho 24, 2026, </text:span><text:a xlink:type="simple" xlink:href="https://www.diva-portal.org/smash/get/diva2:754515/FULLTEXT01.pdf" text:style-name="ListLabel_20_28" text:visited-style-name="ListLabel_20_28"><text:span text:style-name="T12">https://www.diva-portal.org/smash/get/diva2:754515/FULLTEXT01.pdf</text:span></text:a></text:p>
        </text:list-item>
        <text:list-item>
          <text:p text:style-name="P7"><text:span text:style-name="T11">(Golang Triad)-II-Comprehensive Analysis of Go's Hybrid Write Barrier Garbage Collection, acessado em junho 24, 2026, </text:span><text:a xlink:type="simple" xlink:href="https://dev.to/aceld/golang-triad-ii-comprehensive-analysis-of-gos-hybrid-write-barrier-garbage-collection-3knh" text:style-name="ListLabel_20_28" text:visited-style-name="ListLabel_20_28"><text:span text:style-name="T12">https://dev.to/aceld/golang-triad-ii-comprehensive-analysis-of-gos-hybrid-write-barrier-garbage-collection-3knh</text:span></text:a></text:p>
        </text:list-item>
        <text:list-item>
          <text:p text:style-name="P7"><text:span text:style-name="T11">Summarizing Garbage Collection | eschew it all - WordPress.com, acessado em junho 24, 2026, </text:span><text:a xlink:type="simple" xlink:href="https://eschew.wordpress.com/2016/09/02/summarizing-gc/" text:style-name="ListLabel_20_28" text:visited-style-name="ListLabel_20_28"><text:span text:style-name="T12">https://eschew.wordpress.com/2016/09/02/summarizing-gc/</text:span></text:a></text:p>
        </text:list-item>
        <text:list-item>
          <text:p text:style-name="P7"><text:span text:style-name="T11">scheduler: Use sync.Pool for frequently allocated structures to reduce GC pressure · Issue #134832 - GitHub, acessado em junho 24, 2026, </text:span><text:a xlink:type="simple" xlink:href="https://github.com/kubernetes/kubernetes/issues/134832" text:style-name="ListLabel_20_28" text:visited-style-name="ListLabel_20_28"><text:span text:style-name="T12">https://github.com/kubernetes/kubernetes/issues/134832</text:span></text:a></text:p>
        </text:list-item>
        <text:list-item>
          <text:p text:style-name="P7"><text:span text:style-name="T11">Understanding go garbage collector - Stack Overflow, acessado em junho 24, 2026, </text:span><text:a xlink:type="simple" xlink:href="https://stackoverflow.com/questions/76391628/understanding-go-garbage-collector" text:style-name="ListLabel_20_28" text:visited-style-name="ListLabel_20_28"><text:span text:style-name="T12">https://stackoverflow.com/questions/76391628/understanding-go-garbage-collector</text:span></text:a></text:p>
        </text:list-item>
        <text:list-item>
          <text:p text:style-name="P7"><text:span text:style-name="T11">Understanding Garbage Collection in Go | Blog | Keep It Simple, acessado em junho 24, 2026, </text:span><text:a xlink:type="simple" xlink:href="https://www.dingyuqi.com/en/article/go-garbage-collection/" text:style-name="ListLabel_20_28" text:visited-style-name="ListLabel_20_28"><text:span text:style-name="T12">https://www.dingyuqi.com/en/article/go-garbage-collection/</text:span></text:a></text:p>
        </text:list-item>
        <text:list-item>
          <text:p text:style-name="P7"><text:soft-page-break/><text:span text:style-name="T11">The Pulse of Go: Exploring the Pacer's Role in Garbage Collection | by Udaykiran Kallem, acessado em junho 24, 2026, </text:span><text:a xlink:type="simple" xlink:href="https://medium.com/@kallemudaykiran05/the-pulse-of-go-exploring-the-pacers-role-in-garbage-collection-a07f83d730a6" text:style-name="ListLabel_20_28" text:visited-style-name="ListLabel_20_28"><text:span text:style-name="T12">https://medium.com/@kallemudaykiran05/the-pulse-of-go-exploring-the-pacers-role-in-garbage-collection-a07f83d730a6</text:span></text:a></text:p>
        </text:list-item>
        <text:list-item>
          <text:p text:style-name="P7"><text:span text:style-name="T11">Proposal: Separate soft and hard heap size goal, acessado em junho 24, 2026, </text:span><text:a xlink:type="simple" xlink:href="https://go.googlesource.com/proposal/+/master/design/14951-soft-heap-limit.md" text:style-name="ListLabel_20_28" text:visited-style-name="ListLabel_20_28"><text:span text:style-name="T12">https://go.googlesource.com/proposal/+/master/design/14951-soft-heap-limit.md</text:span></text:a></text:p>
        </text:list-item>
        <text:list-item>
          <text:p text:style-name="P7"><text:span text:style-name="T11">A Deep Dive into Golang Memory - mtardy, acessado em junho 24, 2026, </text:span><text:a xlink:type="simple" xlink:href="https://mtardy.com/posts/memory-golang/" text:style-name="ListLabel_20_28" text:visited-style-name="ListLabel_20_28"><text:span text:style-name="T12">https://mtardy.com/posts/memory-golang/</text:span></text:a></text:p>
        </text:list-item>
        <text:list-item>
          <text:p text:style-name="P7"><text:span text:style-name="T11">A Guide to the Go Garbage Collector - The Go Programming Language, acessado em junho 24, 2026, </text:span><text:a xlink:type="simple" xlink:href="https://go.dev/doc/gc-guide" text:style-name="ListLabel_20_28" text:visited-style-name="ListLabel_20_28"><text:span text:style-name="T12">https://go.dev/doc/gc-guide</text:span></text:a></text:p>
        </text:list-item>
        <text:list-item>
          <text:p text:style-name="P7"><text:span text:style-name="T11">runtime/mgcpacer - - The Go Programming Language, acessado em junho 24, 2026, </text:span><text:a xlink:type="simple" xlink:href="https://go.dev/src/runtime/mgcpacer.go" text:style-name="ListLabel_20_28" text:visited-style-name="ListLabel_20_28"><text:span text:style-name="T12">https://go.dev/src/runtime/mgcpacer.go</text:span></text:a></text:p>
        </text:list-item>
        <text:list-item>
          <text:p text:style-name="P7"><text:span text:style-name="T11">提议：分离出柔性堆和硬性堆目标大小【译】为了满足第一个目标, acessado em junho 24, 2026, </text:span><text:a xlink:type="simple" xlink:href="https://juejin.cn/post/7294924154720567323" text:style-name="ListLabel_20_28" text:visited-style-name="ListLabel_20_28"><text:span text:style-name="T12">https://juejin.cn/post/7294924154720567323</text:span></text:a></text:p>
        </text:list-item>
        <text:list-item>
          <text:p text:style-name="P7"><text:span text:style-name="T11">Go GC Doesn't seem to be collecting my unreferenced pointers for image loading? [closed], acessado em junho 24, 2026, </text:span><text:a xlink:type="simple" xlink:href="https://stackoverflow.com/questions/52128943/go-gc-doesnt-seem-to-be-collecting-my-unreferenced-pointers-for-image-loading" text:style-name="ListLabel_20_28" text:visited-style-name="ListLabel_20_28"><text:span text:style-name="T12">https://stackoverflow.com/questions/52128943/go-gc-doesnt-seem-to-be-collecting-my-unreferenced-pointers-for-image-loading</text:span></text:a></text:p>
        </text:list-item>
        <text:list-item>
          <text:p text:style-name="P7"><text:span text:style-name="T11">Proposal: Smarter Scavenging, acessado em junho 24, 2026, </text:span><text:a xlink:type="simple" xlink:href="https://go.googlesource.com/proposal/+/master/design/30333-smarter-scavenging.md" text:style-name="ListLabel_20_28" text:visited-style-name="ListLabel_20_28"><text:span text:style-name="T12">https://go.googlesource.com/proposal/+/master/design/30333-smarter-scavenging.md</text:span></text:a></text:p>
        </text:list-item>
        <text:list-item>
          <text:p text:style-name="P7"><text:span text:style-name="T11">Memory Scavenger in Go Runtime - Medium, acessado em junho 24, 2026, </text:span><text:a xlink:type="simple" xlink:href="https://medium.com/@AlexanderObregon/memory-scavenger-in-go-runtime-b517147c0928" text:style-name="ListLabel_20_28" text:visited-style-name="ListLabel_20_28"><text:span text:style-name="T12">https://medium.com/@AlexanderObregon/memory-scavenger-in-go-runtime-b517147c0928</text:span></text:a></text:p>
        </text:list-item>
        <text:list-item>
          <text:p text:style-name="P7"><text:span text:style-name="T11">runtime: scavenger unable to release idle heap on ARM64 with 64KB OS pages · Issue #78962 · golang/go - GitHub, acessado em junho 24, 2026, </text:span><text:a xlink:type="simple" xlink:href="https://github.com/golang/go/issues/78962" text:style-name="ListLabel_20_28" text:visited-style-name="ListLabel_20_28"><text:span text:style-name="T12">https://github.com/golang/go/issues/78962</text:span></text:a></text:p>
        </text:list-item>
        <text:list-item>
          <text:p text:style-name="P7"><text:span text:style-name="T11">runtime: default to MADV_DONTNEED on Linux · Issue #42330 · golang/go - GitHub, acessado em junho 24, 2026, </text:span><text:a xlink:type="simple" xlink:href="https://github.com/golang/go/issues/42330" text:style-name="ListLabel_20_28" text:visited-style-name="ListLabel_20_28"><text:span text:style-name="T12">https://github.com/golang/go/issues/42330</text:span></text:a></text:p>
        </text:list-item>
        <text:list-item>
          <text:p text:style-name="P7"><text:span text:style-name="T11">`MADV_FREE` vs `MADV_DONTNEED` · Issue #51086 · JuliaLang/julia - GitHub, acessado em junho 24, 2026, </text:span><text:a xlink:type="simple" xlink:href="https://github.com/JuliaLang/julia/issues/51086" text:style-name="ListLabel_20_28" text:visited-style-name="ListLabel_20_28"><text:span text:style-name="T12">https://github.com/JuliaLang/julia/issues/51086</text:span></text:a></text:p>
        </text:list-item>
        <text:list-item>
          <text:p text:style-name="P7"><text:span text:style-name="T11">code review 6850081: pkg/runtime: Implement runtime.SysUnused, acessado em junho 24, 2026, </text:span><text:a xlink:type="simple" xlink:href="https://groups.google.com/g/golang-dev/c/2zyOzREWGC8" text:style-name="ListLabel_20_28" text:visited-style-name="ListLabel_20_28"><text:span text:style-name="T12">https://groups.google.com/g/golang-dev/c/2zyOzREWGC8</text:span></text:a></text:p>
        </text:list-item>
        <text:list-item>
          <text:p text:style-name="P7"><text:span text:style-name="T11">Is it True That Go Maps Don't Shrink? - DEV Community, acessado em junho 24, 2026, </text:span><text:a xlink:type="simple" xlink:href="https://dev.to/kanywst/is-it-true-that-go-maps-dont-shrink-3m3" text:style-name="ListLabel_20_28" text:visited-style-name="ListLabel_20_28"><text:span text:style-name="T12">https://dev.to/kanywst/is-it-true-that-go-maps-dont-shrink-3m3</text:span></text:a></text:p>
        </text:list-item>
        <text:list-item>
          <text:p text:style-name="P7"><text:span text:style-name="T11">Part 2 Beyond the Exit Code: K8s Runtime Traps - CloudOptimo, acessado em junho 24, 2026, </text:span><text:a xlink:type="simple" xlink:href="https://www.cloudoptimo.com/blog/part-2-beyond-the-exit-code-k8s-runtime-traps/" text:style-name="ListLabel_20_28" text:visited-style-name="ListLabel_20_28"><text:span text:style-name="T12">https://www.cloudoptimo.com/blog/part-2-beyond-the-exit-code-k8s-runtime-traps/</text:span></text:a></text:p>
        </text:list-item>
        <text:list-item>
          <text:p text:style-name="P7"><text:span text:style-name="T11">runtime - Go Issues, acessado em junho 24, 2026, </text:span><text:a xlink:type="simple" xlink:href="https://goissues.org/runtime" text:style-name="ListLabel_20_28" text:visited-style-name="ListLabel_20_28"><text:span text:style-name="T12">https://goissues.org/runtime</text:span></text:a></text:p>
        </text:list-item>
        <text:list-item>
          <text:p text:style-name="P7"><text:span text:style-name="T11">Optimizing Memory Management in Go with GOMEMLIMIT | by Jaesang Kim - Medium, acessado em junho 24, 2026, </text:span><text:a xlink:type="simple" xlink:href="https://hsleep.medium.com/optimizing-memory-management-in-go-with-gomemlimit-da8ed23e2dcb" text:style-name="ListLabel_20_28" text:visited-style-name="ListLabel_20_28"><text:span text:style-name="T12">https://hsleep.medium.com/optimizing-memory-management-in-go-with-gomemlimit-da8ed23e2dcb</text:span></text:a></text:p>
        </text:list-item>
        <text:list-item>
          <text:p text:style-name="P7"><text:span text:style-name="T11">How to set memory limit while running golang application in local system - Stack Overflow, acessado em junho 24, 2026, </text:span><text:a xlink:type="simple" xlink:href="https://stackoverflow.com/questions/73646060/how-to-set-memory-limit-while-running-golang-application-in-local-system" text:style-name="ListLabel_20_28" text:visited-style-name="ListLabel_20_28"><text:span text:style-name="T12">https://stackoverflow.com/questions/73646060/how-to-set-memory-limit-while-running-golang-application-in-local-system</text:span></text:a></text:p>
        </text:list-item>
        <text:list-item>
          <text:p text:style-name="P7"><text:span text:style-name="T11">runtime/metrics - Go Packages, acessado em junho 24, 2026, </text:span><text:a xlink:type="simple" xlink:href="https://pkg.go.dev/runtime/metrics" text:style-name="ListLabel_20_28" text:visited-style-name="ListLabel_20_28"><text:span text:style-name="T12">https://pkg.go.dev/runtime/metrics</text:span></text:a></text:p>
        </text:list-item>
        <text:list-item>
          <text:p text:style-name="P7"><text:span text:style-name="T11">Go Faster: Cutting the Slack in GC with Smart Memory Allocation - DEV Community, acessado em junho 24, 2026, </text:span><text:a xlink:type="simple" xlink:href="https://dev.to/aris_georgatos/go-faster-cutting-the-slack-in-gc-with-smart-memory-allocation-304h" text:style-name="ListLabel_20_28" text:visited-style-name="ListLabel_20_28"><text:span text:style-name="T12">https://dev.to/aris_georgatos/go-faster-cutting-the-slack-in-gc-with-smart-memory-allocation-304h</text:span></text:a></text:p>
        </text:list-item>
        <text:list-item>
          <text:p text:style-name="P7"><text:span text:style-name="T11">Go sync.Pool and the Mechanics Behind It - VictoriaMetrics, acessado em junho 24, 2026, </text:span><text:a xlink:type="simple" xlink:href="https://victoriametrics.com/blog/go-sync-pool/" text:style-name="ListLabel_20_28" text:visited-style-name="ListLabel_20_28"><text:span text:style-name="T12">https://victoriametrics.com/blog/go-sync-pool/</text:span></text:a></text:p>
        </text:list-item>
        <text:list-item>
          <text:p text:style-name="P7"><text:soft-page-break/><text:span text:style-name="T11">How to Use sync.Pool for Object Reuse in Go - OneUptime, acessado em junho 24, 2026, </text:span><text:a xlink:type="simple" xlink:href="https://oneuptime.com/blog/post/2026-01-07-go-sync-pool/view" text:style-name="ListLabel_20_28" text:visited-style-name="ListLabel_20_28"><text:span text:style-name="T12">https://oneuptime.com/blog/post/2026-01-07-go-sync-pool/view</text:span></text:a></text:p>
        </text:list-item>
        <text:list-item>
          <text:p text:style-name="P7"><text:span text:style-name="T11">False sharing: a look at cache line and write combining |, acessado em junho 24, 2026, </text:span><text:a xlink:type="simple" xlink:href="https://peng.fyi/post/false-sharing-cacheline-and-write-buffer/" text:style-name="ListLabel_20_28" text:visited-style-name="ListLabel_20_28"><text:span text:style-name="T12">https://peng.fyi/post/false-sharing-cacheline-and-write-buffer/</text:span></text:a></text:p>
        </text:list-item>
        <text:list-item>
          <text:p text:style-name="P7"><text:span text:style-name="T11">Let's dive: a tour of sync.Pool internals - Unskilled, acessado em junho 24, 2026, </text:span><text:a xlink:type="simple" xlink:href="https://unskilled.blog/posts/lets-dive-a-tour-of-sync.pool-internals/" text:style-name="ListLabel_20_28" text:visited-style-name="ListLabel_20_28"><text:span text:style-name="T12">https://unskilled.blog/posts/lets-dive-a-tour-of-sync.pool-internals/</text:span></text:a></text:p>
        </text:list-item>
        <text:list-item>
          <text:p text:style-name="P7"><text:span text:style-name="T11">Kubernetes v1.33: Streaming List responses | Kubernetes, acessado em junho 24, 2026, </text:span><text:a xlink:type="simple" xlink:href="https://kubernetes.io/blog/2025/05/09/kubernetes-v1-33-streaming-list-responses/" text:style-name="ListLabel_20_28" text:visited-style-name="ListLabel_20_28"><text:span text:style-name="T12">https://kubernetes.io/blog/2025/05/09/kubernetes-v1-33-streaming-list-responses/</text:span></text:a></text:p>
        </text:list-item>
        <text:list-item>
          <text:p text:style-name="P7"><text:span text:style-name="T11">use AllocatorPool to reduce memory allocation in protobuf stream list #133956 - GitHub, acessado em junho 24, 2026, </text:span><text:a xlink:type="simple" xlink:href="https://github.com/kubernetes/kubernetes/issues/133956" text:style-name="ListLabel_20_28" text:visited-style-name="ListLabel_20_28"><text:span text:style-name="T12">https://github.com/kubernetes/kubernetes/issues/133956</text:span></text:a></text:p>
        </text:list-item>
        <text:list-item>
          <text:p text:style-name="P7"><text:span text:style-name="T11">vendor/k8s.io/apimachinery/pkg/runtime/allocator.go ... - GitLab, acessado em junho 24, 2026, </text:span><text:a xlink:type="simple" xlink:href="https://gitlab.esss.lu.se/k8s/mirrors/ceph-csi/-/blob/4870de1c9a61c3b4c5c073e45098ec047905c76b/vendor/k8s.io/apimachinery/pkg/runtime/allocator.go" text:style-name="ListLabel_20_28" text:visited-style-name="ListLabel_20_28"><text:span text:style-name="T12">https://gitlab.esss.lu.se/k8s/mirrors/ceph-csi/-/blob/4870de1c9a61c3b4c5c073e45098ec047905c76b/vendor/k8s.io/apimachinery/pkg/runtime/allocator.go</text:span></text:a></text:p>
        </text:list-item>
        <text:list-item>
          <text:p text:style-name="P7"><text:span text:style-name="T11">The containerd-shim consume 8M memory. · Issue #2020 - GitHub, acessado em junho 24, 2026, </text:span><text:a xlink:type="simple" xlink:href="https://github.com/containerd/containerd/issues/2020" text:style-name="ListLabel_20_28" text:visited-style-name="ListLabel_20_28"><text:span text:style-name="T12">https://github.com/containerd/containerd/issues/2020</text:span></text:a></text:p>
        </text:list-item>
        <text:list-item>
          <text:p text:style-name="P7"><text:span text:style-name="T11">Docker lost all containers on crash · Issue #30564 - GitHub, acessado em junho 24, 2026, </text:span><text:a xlink:type="simple" xlink:href="https://github.com/moby/moby/issues/30564" text:style-name="ListLabel_20_28" text:visited-style-name="ListLabel_20_28"><text:span text:style-name="T12">https://github.com/moby/moby/issues/30564</text:span></text:a></text:p>
        </text:list-item>
        <text:list-item>
          <text:p text:style-name="P7"><text:span text:style-name="T11">Concurrently starting many containers from same checkpoint leads to error: "context deadline exceeded" · Issue #29369 - GitHub, acessado em junho 24, 2026, </text:span><text:a xlink:type="simple" xlink:href="https://github.com/moby/moby/issues/29369" text:style-name="ListLabel_20_28" text:visited-style-name="ListLabel_20_28"><text:span text:style-name="T12">https://github.com/moby/moby/issues/29369</text:span></text:a></text:p>
        </text:list-item>
        <text:list-item>
          <text:p text:style-name="P7"><text:span text:style-name="T11">Go 1.26: Smarter io.ReadAll Reduce Memory Overhead​ by Chunks Growth, acessado em junho 24, 2026, </text:span><text:a xlink:type="simple" xlink:href="https://hitzhangjie.medium.com/go-1-26-smarter-io-readall-reduce-memory-overhead-by-chunks-growth-c55e7de85c1d" text:style-name="ListLabel_20_28" text:visited-style-name="ListLabel_20_28"><text:span text:style-name="T12">https://hitzhangjie.medium.com/go-1-26-smarter-io-readall-reduce-memory-overhead-by-chunks-growth-c55e7de85c1d</text:span></text:a></text:p>
        </text:list-item>
        <text:list-item>
          <text:p text:style-name="P7"><text:span text:style-name="T11">From ReadAll to CopyBuffer: A Go Developer's Guide to Efficient Data Copying, acessado em junho 24, 2026, </text:span><text:a xlink:type="simple" xlink:href="https://dev.to/dialaeke/from-readall-to-copybuffer-a-go-developers-guide-to-efficient-data-copying-3c1e" text:style-name="ListLabel_20_28" text:visited-style-name="ListLabel_20_28"><text:span text:style-name="T12">https://dev.to/dialaeke/from-readall-to-copybuffer-a-go-developers-guide-to-efficient-data-copying-3c1e</text:span></text:a></text:p>
        </text:list-item>
        <text:list-item>
          <text:p text:style-name="P7"><text:span text:style-name="T11">What's the difference between io.Copy and io.CopyBuffer? - Stack Overflow, acessado em junho 24, 2026, </text:span><text:a xlink:type="simple" xlink:href="https://stackoverflow.com/questions/73919671/whats-the-difference-between-io-copy-and-io-copybuffer" text:style-name="ListLabel_20_28" text:visited-style-name="ListLabel_20_28"><text:span text:style-name="T12">https://stackoverflow.com/questions/73919671/whats-the-difference-between-io-copy-and-io-copybuffer</text:span></text:a></text:p>
        </text:list-item>
        <text:list-item>
          <text:p text:style-name="P7"><text:span text:style-name="T11">Zero-Copy Techniques - Go Optimization Guide, acessado em junho 24, 2026, </text:span><text:a xlink:type="simple" xlink:href="https://goperf.dev/01-common-patterns/zero-copy/" text:style-name="ListLabel_20_28" text:visited-style-name="ListLabel_20_28"><text:span text:style-name="T12">https://goperf.dev/01-common-patterns/zero-copy/</text:span></text:a></text:p>
        </text:list-item>
        <text:list-item>
          <text:p text:style-name="P7"><text:span text:style-name="T11">Reuse buffers to lower gc overhead · Issue #1349 · containers/image - GitHub, acessado em junho 24, 2026, </text:span><text:a xlink:type="simple" xlink:href="https://github.com/containers/image/issues/1349" text:style-name="ListLabel_20_28" text:visited-style-name="ListLabel_20_28"><text:span text:style-name="T12">https://github.com/containers/image/issues/1349</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0" meta:paragraph-count="210" meta:word-count="9446" meta:character-count="70368" meta:non-whitespace-character-count="61011"/>
    <meta:generator>LibreOfficeDev/6.0.5.2$Linux_X86_64 LibreOffice_project/</meta:generator>
  </office:meta>
</office:document-meta>
</file>