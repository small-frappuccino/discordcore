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224A9B561C60B07188.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P1" style:family="paragraph" style:parent-style-name="Standard">
      <style:paragraph-properties fo:line-height="114%" fo:padding="0in" fo:border="none"/>
    </style:style>
    <style:style style:name="P2" style:family="paragraph" style:parent-style-name="Standard">
      <style:paragraph-properties fo:line-height="114%" fo:padding="0in" fo:border="none"/>
      <style:text-properties fo:color="#1f1f1f" style:font-name="Google Sans" style:font-name-asian="Google Sans1" style:font-name-complex="Google Sans1"/>
    </style:style>
    <style:style style:name="P3" style:family="paragraph" style:parent-style-name="Standard" style:list-style-name="WWNum1">
      <style:paragraph-properties fo:margin-left="0.4098in" fo:margin-right="0in" fo:line-height="114%" fo:text-indent="-0.25in" style:auto-text-indent="false" fo:padding="0in" fo:border="none"/>
    </style:style>
    <style:style style:name="P4" style:family="paragraph" style:parent-style-name="Standard" style:list-style-name="WWNum2">
      <style:paragraph-properties fo:margin-left="0.4098in" fo:margin-right="0in" fo:line-height="114%" fo:text-indent="-0.25in" style:auto-text-indent="false" fo:padding="0in" fo:border="none"/>
    </style:style>
    <style:style style:name="P5" style:family="paragraph" style:parent-style-name="Standard" style:list-style-name="WWNum3">
      <style:paragraph-properties fo:margin-left="0.4098in" fo:margin-right="0in" fo:line-height="114%" fo:text-indent="-0.25in" style:auto-text-indent="false" fo:padding="0in" fo:border="none"/>
    </style:style>
    <style:style style:name="P6" style:family="paragraph" style:parent-style-name="Standard" style:list-style-name="WWNum4">
      <style:paragraph-properties fo:margin-left="0.4098in" fo:margin-right="0in" fo:line-height="114%" fo:text-indent="-0.25in" style:auto-text-indent="false" fo:padding="0in" fo:border="none"/>
    </style:style>
    <style:style style:name="P7" style:family="paragraph" style:parent-style-name="Standard" style:list-style-name="WWNum5">
      <style:paragraph-properties fo:margin-left="0.4098in" fo:margin-right="0in" fo:line-height="114%" fo:text-indent="-0.25in" style:auto-text-indent="false" fo:padding="0in" fo:border="none"/>
    </style:style>
    <style:style style:name="P8" style:family="paragraph" style:parent-style-name="Standard">
      <style:paragraph-properties fo:margin-top="0.0835in" fo:margin-bottom="0.0835in" loext:contextual-spacing="false" fo:line-height="114%" fo:padding="0in" fo:border="none"/>
    </style:style>
    <style:style style:name="P9" style:family="paragraph" style:parent-style-name="Standard" style:list-style-name="WWNum6">
      <style:paragraph-properties fo:margin-left="0.4165in" fo:margin-right="0in" fo:line-height="114%" fo:text-indent="-0.25in" style:auto-text-indent="false" fo:padding="0in" fo:border="none"/>
    </style:style>
    <style:style style:name="P10" style:family="paragraph" style:parent-style-name="Standard" style:list-style-name="WWNum7">
      <style:paragraph-properties fo:margin-left="0.4165in" fo:margin-right="0in" fo:text-indent="-0.25in" style:auto-text-indent="false" fo:padding="0in" fo:border="none"/>
    </style:style>
    <style:style style:name="P11" style:family="paragraph" style:parent-style-name="Standard">
      <style:paragraph-properties fo:margin-top="0in" fo:margin-bottom="0.1772in" loext:contextual-spacing="false" fo:line-height="114%" fo:padding="0in" fo:border="none"/>
    </style:style>
    <style:style style:name="P12" style:family="paragraph" style:parent-style-name="Heading_20_1" style:master-page-name="Standard">
      <style:paragraph-properties fo:margin-top="0in" fo:margin-bottom="0in" loext:contextual-spacing="false" fo:line-height="114%" style:page-number="1" fo:padding="0in" fo:border="none"/>
    </style:style>
    <style:style style:name="P13" style:family="paragraph" style:parent-style-name="Heading_20_3">
      <style:paragraph-properties fo:margin-top="0in" fo:margin-bottom="0.1665in" loext:contextual-spacing="false" fo:line-height="114%" fo:padding="0in" fo:border="none"/>
    </style:style>
    <style:style style:name="P14" style:family="paragraph" style:parent-style-name="Heading_20_2">
      <style:paragraph-properties fo:margin-top="0in" fo:margin-bottom="0in" loext:contextual-spacing="false" fo:line-height="114%" fo:padding="0in" fo:border="none"/>
    </style:style>
    <style:style style:name="P15" style:family="paragraph" style:parent-style-name="Heading_20_4">
      <style:paragraph-properties fo:margin-top="0in" fo:margin-bottom="0.1772in" loext:contextual-spacing="false" fo:line-height="100%"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size="18pt" fo:font-style="italic" fo:font-weight="bold" style:font-name-asian="Google Sans1" style:font-size-asian="18pt" style:font-style-asian="italic" style:font-weight-asian="bold" style:font-name-complex="Google Sans1" style:font-size-complex="18pt" style:font-style-complex="italic" style:font-weight-complex="bold"/>
    </style:style>
    <style:style style:name="T3" style:family="text">
      <style:text-properties fo:color="#1f1f1f" style:font-name="Google Sans" fo:font-style="italic" style:font-name-asian="Google Sans1" style:font-style-asian="italic" style:font-name-complex="Google Sans1" style:font-style-complex="italic"/>
    </style:style>
    <style:style style:name="T4" style:family="text">
      <style:text-properties fo:color="#1f1f1f" style:font-name="Google Sans" fo:font-style="italic" fo:font-weight="bold" style:font-name-asian="Google Sans1" style:font-style-asian="italic" style:font-weight-asian="bold" style:font-name-complex="Google Sans1" style:font-style-complex="italic" style:font-weight-complex="bold"/>
    </style:style>
    <style:style style:name="T5" style:family="text">
      <style:text-properties fo:color="#1f1f1f" style:font-name="Google Sans" fo:font-weight="bold" style:font-name-asian="Google Sans1" style:font-weight-asian="bold" style:font-name-complex="Google Sans1" style:font-weight-complex="bold"/>
    </style:style>
    <style:style style:name="T6" style:family="text">
      <style:text-properties fo:color="#1f1f1f" style:font-name="Google Sans" fo:font-size="14pt" fo:font-style="italic" fo:font-weight="bold" style:font-name-asian="Google Sans1" style:font-size-asian="14pt" style:font-style-asian="italic" style:font-weight-asian="bold" style:font-name-complex="Google Sans1" style:font-size-complex="14pt" style:font-style-complex="italic" style:font-weight-complex="bold"/>
    </style:style>
    <style:style style:name="T7" style:family="text">
      <style:text-properties fo:color="#444746" style:text-position="super 58%" style:font-name="Google Sans" fo:font-size="12pt" style:font-name-asian="Google Sans1" style:font-size-asian="12pt" style:font-name-complex="Google Sans1" style:font-size-complex="12pt"/>
    </style:style>
    <style:style style:name="T8" style:family="text">
      <style:text-properties style:font-name="Google Sans" style:font-name-asian="Google Sans1" style:font-name-complex="Google Sans1"/>
    </style:style>
    <style:style style:name="T9" style:family="text">
      <style:text-properties style:font-name="Google Sans" fo:font-size="12pt" style:font-name-asian="Google Sans1" style:font-size-asian="12pt" style:font-name-complex="Google Sans1" style:font-size-complex="12pt"/>
    </style:style>
    <style:style style:name="T10"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Relatório Exaustivo de Engenharia de Sistemas e Arquitetura Interna em Go</text:span></text:p>
      <text:p text:style-name="P1"><text:span text:style-name="T1">A linguagem de programação Go transcende a sintaxe superficial para operar como uma plataforma de engenharia de sistemas profundamente integrada ao hardware subjacente. Concebida para resolver problemas de escalabilidade em infraestruturas massivas, a linguagem exige dos engenheiros uma compreensão íntima de como o código interage com o escalonador, a memória (RAM) e os ciclos de processamento (CPU). Este relatório disseca a arquitetura interna do Go, seguindo uma progressão metódica desde as diretrizes fundacionais e provérbios pragmáticos, passando pelos paradigmas adotados, até atingir a extrema "simpatia mecânica" no nível do processador.</text:span></text:p>
      <text:p text:style-name="P14"><text:span text:style-name="T1">Fundamentos Pragmáticos: </text:span><text:span text:style-name="T2">Effective Go</text:span></text:p>
      <text:p text:style-name="P1"><text:span text:style-name="T1">O documento </text:span><text:span text:style-name="T3">Effective Go</text:span><text:span text:style-name="T1"> estabelece as fundações semânticas e operacionais que separam o código idiomático em Go de meras traduções de linguagens como C++ ou Java. A premissa central é que a simplicidade da linguagem deve guiar a previsibilidade do comportamento em tempo de execução</text:span><text:span text:style-name="T7">1</text:span><text:span text:style-name="T1">.</text:span></text:p>
      <text:p text:style-name="P1"><text:span text:style-name="T1">A formatação e o estilo não são meras convenções visuais, mas garantias de coesão arquitetural. O uso obrigatório do gofmt assegura que a árvore de sintaxe abstrata (AST) seja traduzida para um formato canônico</text:span><text:span text:style-name="T7">2</text:span><text:span text:style-name="T1">. O </text:span><text:span text:style-name="T3">design</text:span><text:span text:style-name="T1"> de nomenclatura foca na economia de leitura: pacotes utilizam nomes curtos em letras minúsculas sem sublinhados, e o mecanismo de exportação de símbolos é ditado mecanicamente pela capitalização da primeira letra</text:span><text:span text:style-name="T7">1</text:span><text:span text:style-name="T1">. Em relação ao encapsulamento, Go rejeita a terminologia automática de </text:span><text:span text:style-name="T3">getters</text:span><text:span text:style-name="T1"> e </text:span><text:span text:style-name="T3">setters</text:span><text:span text:style-name="T1">. Um campo não exportado owner é acedido pelo método Owner() e modificado por SetOwner(), em vez de GetOwner(), mantendo a clareza concisa do contrato da interface</text:span><text:span text:style-name="T7">2</text:span><text:span text:style-name="T1">.</text:span></text:p>
      <text:p text:style-name="P13"><text:span text:style-name="T1">Mecânica de Alocação: make versus new</text:span></text:p>
      <text:p text:style-name="P1"><text:span text:style-name="T1">A distinção entre make e new é um dos pilares da gestão de memória inicial. O compilador trata estas duas primitivas com finalidades termodinâmicas completamente distintas</text:span><text:span text:style-name="T7">2</text:span><text:span text:style-name="T1">.</text:span></text:p>
      <text:p text:style-name="P1"><text:span text:style-name="T1">A função new(T) é um alocador de memória puro. Ela não inicializa estruturas subjacentes; apenas reserva um espaço na memória preenchido com zeros para o tipo T e devolve o seu endereço de memória (*T)</text:span><text:span text:style-name="T7">2</text:span><text:span text:style-name="T1">. Para estruturas simples, new(T) equivale a utilizar um literal composto vazio &amp;T{}.</text:span></text:p>
      <text:p text:style-name="P1"><text:span text:style-name="T1">Por outro lado, a função make(T, args) é exclusiva para fatias (</text:span><text:span text:style-name="T3">slices</text:span><text:span text:style-name="T1">), mapas (</text:span><text:span text:style-name="T3">maps</text:span><text:span text:style-name="T1">) e canais (</text:span><text:span text:style-name="T3">channels</text:span><text:span text:style-name="T1">). A função make não devolve um ponteiro, mas sim um valor inicializado do tipo T. Esta exigência deriva do facto de estas três estruturas representarem abstrações sobre estruturas de dados complexas geridas pelo </text:span><text:span text:style-name="T3">runtime</text:span><text:span text:style-name="T1">. Por exemplo, um </text:span><text:span text:style-name="T3">slice</text:span><text:span text:style-name="T1"> é um descritor de 24 bytes (em sistemas de 64 bits) composto por três elementos: um ponteiro para o </text:span><text:span text:style-name="T3">array</text:span><text:span text:style-name="T1"> subjacente, um comprimento (len) e uma capacidade (cap). O uso de make([]int, 10, 100) não apenas aloca a memória contígua para 100 inteiros, como também ajusta os metadados do descritor do </text:span><text:span text:style-name="T3">slice</text:span><text:span text:style-name="T1"> para que ele aponte corretamente para a cabeça do </text:span><text:span text:style-name="T3">array</text:span><text:span text:style-name="T1"> com um comprimento inicial funcional</text:span><text:span text:style-name="T7">2</text:span><text:span text:style-name="T1">. Uma chamada de new([]int) resultaria apenas num ponteiro para um </text:span><text:span text:style-name="T3">slice</text:span><text:span text:style-name="T1"> nil, completamente inoperante até ser ativamente reatribuído</text:span><text:span text:style-name="T7">2</text:span><text:span text:style-name="T1">.</text:span></text:p>
      <text:p text:style-name="P13"><text:span text:style-name="T1">A Semântica de Erros e o Desenho de Interfaces</text:span></text:p>
      <text:p text:style-name="P1"><text:span text:style-name="T1">Os erros em Go são tratados como valores de primeira classe. A filosofia impera que mensagens de erro não devem ser capitalizadas (exceto para nomes próprios) e não devem terminar com pontuação, de modo a permitir o seu aninhamento fluido e sem fricção lexical quando registadas em agregadores de </text:span><text:span text:style-name="T3">logs</text:span><text:span text:style-name="T1"> ou envolvidas com fmt.Errorf("... %w", err)</text:span><text:span text:style-name="T7">5</text:span><text:span text:style-name="T1">. Além disso, padrões robustos exigem a análise do tipo de erro ou do seu valor sentinela (como io.EOF) através de errors.Is ou errors.As, em vez de fazer o rastreio cego do texto da </text:span><text:span text:style-name="T3">string</text:span><text:span text:style-name="T1">, isolando falhas numa topologia de dados previsível</text:span><text:span text:style-name="T7">5</text:span><text:span text:style-name="T1">.</text:span></text:p>
      <text:p text:style-name="P1"><text:span text:style-name="T1">No desenho de interfaces, </text:span><text:span text:style-name="T3">Effective Go</text:span><text:span text:style-name="T1"> estabelece a preferência profunda por abstrações mínimas. Interfaces com um único método devem adotar o sufixo "-er" (ex: Reader, Writer, CloseNotifier), e assinaturas canónicas como String() nunca devem ser renomeadas para ToString()</text:span><text:span text:style-name="T7">2</text:span><text:span text:style-name="T1">. Esta filosofia prepara o terreno para a aplicação pragmática de padrões de arquitetura observados nos repositórios mais críticos do mundo.</text:span></text:p>
      <text:p text:style-name="P14"><text:span text:style-name="T2">Go Proverbs</text:span><text:span text:style-name="T1"> e a Arquitetura em Ecossistemas de Ponta (Kubernetes e Docker)</text:span></text:p>
      <text:p text:style-name="P1"><text:span text:style-name="T1">Os chamados </text:span><text:span text:style-name="T3">Go Proverbs</text:span><text:span text:style-name="T1"> resumem a filosofia empírica que sustenta projetos como Kubernetes e Docker</text:span><text:span text:style-name="T7">8</text:span><text:span text:style-name="T1">. A aplicação rigorosa destes provérbios separa arquiteturas resilientes daquelas propensas a falhas sob alta contenção.</text:span></text:p>
      <text:p text:style-name="P1"><text:span text:style-name="T1">A regra </text:span><text:span text:style-name="T3">"The bigger the interface, the weaker the abstraction"</text:span><text:span text:style-name="T1"> (Quanto maior a interface, mais fraca a abstração) dita o design do Docker e de bibliotecas centrais</text:span><text:span text:style-name="T7">6</text:span><text:span text:style-name="T1">. O io.Reader exige apenas Read([]byte) (int, error). No código-fonte destes gigantes, a orquestração de redes e sistemas de ficheiros não utiliza interfaces monolíticas com dezenas de métodos. Em vez disso, usam interfaces cirúrgicas compostas, permitindo polimorfismo maciço e simulações (</text:span><text:span text:style-name="T3">mocking</text:span><text:span text:style-name="T1">) isoladas em testes unitários sem a necessidade de instanciar o mundo inteiro do sistema operacional</text:span><text:span text:style-name="T7">6</text:span><text:span text:style-name="T1">.</text:span></text:p>
      <text:p text:style-name="P1"><text:span text:style-name="T1">Outro pilar de eficiência extrema é o provérbio </text:span><text:span text:style-name="T3">"Make the zero value useful"</text:span><text:span text:style-name="T1"> (Torne o valor zero útil)</text:span><text:span text:style-name="T7">9</text:span><text:span text:style-name="T1">. Em C++ ou Java, tentar invocar métodos sobre objetos não instanciados frequentemente gera exceções catastróficas. Em Go, o ecossistema é projetado para que o estado natural de alocação de memória (tudo a zero) seja inerentemente funcional. Um sync.Mutex recém-alocado (onde os seus bytes são 0) já está pronto a ser bloqueado. Um </text:span><text:span text:style-name="T3">slice</text:span><text:span text:style-name="T1"> nil tem um comprimento de 0 e pode ser adicionado (append) com total segurança sem necessitar de inicialização. No Kubernetes, que lida com milhões de </text:span><text:span text:style-name="T3">Custom Resource Definitions</text:span><text:span text:style-name="T1"> (CRDs) onde muitos campos são opcionais, a utilidade dos valores nulos previne incontáveis ramificações condicionais e operações de inicialização dispendiosas, poupando a CPU</text:span><text:span text:style-name="T7">7</text:span><text:span text:style-name="T1">.</text:span></text:p>
      <text:p text:style-name="P1"><text:span text:style-name="T1">Finalmente, a adoção incansável de tratamentos de erros explícitos no Docker e Kubernetes reforça que as exceções paralisam a coerência da arquitetura, enquanto a devolução sistemática de erros (if err != nil) isola a estabilidade das fronteiras da função</text:span><text:span text:style-name="T7">6</text:span><text:span text:style-name="T1">. O uso criterioso de deferimentos (defer) também obedece a regras de otimização em caminhos quentes, onde os enclausuramentos que capturam variáveis de ciclos (</text:span><text:span text:style-name="T3">loops</text:span><text:span text:style-name="T1">) são evitados devido aos seus impactos no </text:span><text:span text:style-name="T3">Garbage Collector</text:span><text:span text:style-name="T7">12</text:span><text:span text:style-name="T1">.</text:span></text:p>
      <text:p text:style-name="P14"><text:span text:style-name="T1">Paradigmas Sistémicos na Linguagem Go</text:span></text:p>
      <text:p text:style-name="P1"><text:span text:style-name="T1">Para compreender a eficácia singular desta ferramenta no desenvolvimento de </text:span><text:span text:style-name="T3">software</text:span><text:span text:style-name="T1"> infraestrutural, é necessário analisar o núcleo estrutural que dita o seu comportamento.</text:span></text:p>
      <text:p text:style-name="P1"><text:span text:style-name="T1">Utilize a seguinte formulação:</text:span></text:p>
      <text:p text:style-name="P13"><text:soft-page-break/><text:span text:style-name="T1">1. Concurrent Programming (CSP - Communicating Sequential Processes)</text:span></text:p>
      <text:p text:style-name="P1"><text:span text:style-name="T5">Grau de Importância: Crítico / Fundacional</text:span></text:p>
      <text:p text:style-name="P1"><text:span text:style-name="T1">A concorrência não é uma biblioteca acoplada em Go; é o próprio motor de combustão da linguagem, mapeado diretamente para os anéis de execução de hardware (</text:span><text:span text:style-name="T3">hardware execution rings</text:span><text:span text:style-name="T1">). Go abandona a complexidade dos blocos de memória compartilhada tradicionais em favor de </text:span><text:span text:style-name="T3">message passing</text:span><text:span text:style-name="T1">.</text:span></text:p>
      <text:list xml:id="list3853981411" text:style-name="WWNum1">
        <text:list-item>
          <text:p text:style-name="P3"><text:span text:style-name="T5">Mecânica e Arquitetura:</text:span><text:span text:style-name="T1"> A linguagem utiliza goroutines (threads leves multiplexadas sobre threads do sistema operacional) e channels para movimentação de dados. Isso evita gargalos de saturação de barramento (</text:span><text:span text:style-name="T3">bus saturation</text:span><text:span text:style-name="T1">) que ocorrem em modelos baseados em </text:span><text:span text:style-name="T3">locks</text:span><text:span text:style-name="T1"> pesados.</text:span></text:p>
        </text:list-item>
        <text:list-item>
          <text:p text:style-name="P3"><text:span text:style-name="T5">Diagnóstico de Estrutura:</text:span><text:span text:style-name="T1"> A falha em respeitar esse paradigma leva a anomalias severas, como </text:span><text:span text:style-name="T3">naked goroutines</text:span><text:span text:style-name="T1"> (vazamento de memória e execução órfã) ou </text:span><text:span text:style-name="T3">write-starvation</text:span><text:span text:style-name="T1"> no uso incorreto de sync.RWMutex.</text:span></text:p>
        </text:list-item>
        <text:list-item>
          <text:p text:style-name="P3"><text:span text:style-name="T5">A Regra do "Contexto":</text:span><text:span text:style-name="T1"> É aqui que a sua "programação contextual" se manifesta. A arquitetura correta exige uma orquestração de ciclo de vida explícita via </text:span><text:span text:style-name="T3">asynchronous context cancellation</text:span><text:span text:style-name="T1"> e fronteiras de concorrência estritas usando errgroup para garantir que o sistema não deixe processos fantasmas em execução.</text:span></text:p>
        </text:list-item>
      </text:list>
      <text:p text:style-name="P13"><text:span text:style-name="T1">2. Procedural / Imperative Programming</text:span></text:p>
      <text:p text:style-name="P1"><text:span text:style-name="T5">Grau de Importância: Alto / Estrutural</text:span></text:p>
      <text:p text:style-name="P1"><text:span text:style-name="T1">Antes de ser qualquer outra coisa, Go é uma linguagem imperativa de C-family. Ela exige que você dite o fluxo de execução mecânica instrução por instrução.</text:span></text:p>
      <text:list xml:id="list2185497663" text:style-name="WWNum2">
        <text:list-item>
          <text:p text:style-name="P4"><text:span text:style-name="T5">Mecânica e Arquitetura:</text:span><text:span text:style-name="T1"> O foco aqui é o </text:span><text:span text:style-name="T3">low-allocation footprint</text:span><text:span text:style-name="T1">. O código estruturado de forma procedural em Go prioriza caminhos previsíveis de memória (</text:span><text:span text:style-name="T3">memory lanes</text:span><text:span text:style-name="T1">). O compilador pode executar </text:span><text:span text:style-name="T3">escape analysis</text:span><text:span text:style-name="T1"> com alta precisão, mantendo a maioria das variáveis no </text:span><text:span text:style-name="T3">stack</text:span><text:span text:style-name="T1"> em vez de sobrecarregar o </text:span><text:span text:style-name="T3">heap</text:span><text:span text:style-name="T1"> e acionar o </text:span><text:span text:style-name="T3">garbage collector</text:span><text:span text:style-name="T1">.</text:span></text:p>
        </text:list-item>
        <text:list-item>
          <text:p text:style-name="P4"><text:span text:style-name="T5">Diagnóstico de Estrutura:</text:span><text:span text:style-name="T1"> Padrões imperativos em Go exigem </text:span><text:span text:style-name="T3">fail-fast initialization</text:span><text:span text:style-name="T1">. A mutação de estado global é agressivamente desencorajada. O retorno explícito de erros (if err != nil) força o engenheiro a tratar a estabilidade da fronteira de execução imediatamente, em vez de depender de </text:span><text:span text:style-name="T3">unwinding exceptions</text:span><text:span text:style-name="T1"> que quebram o fluxo do </text:span><text:span text:style-name="T3">cache</text:span><text:span text:style-name="T1"> da CPU.</text:span></text:p>
        </text:list-item>
      </text:list>
      <text:p text:style-name="P13"><text:span text:style-name="T1">3. Structural Subtyping (Pragmatic OOP)</text:span></text:p>
      <text:p text:style-name="P1"><text:span text:style-name="T5">Grau de Importância: Médio / Organizacional</text:span></text:p>
      <text:p text:style-name="P1"><text:span text:style-name="T1">Go é orientada a objetos, mas rejeita a herança clássica baseada em classes. Não há hierarquias profundas de objetos, nem </text:span><text:span text:style-name="T3">v-tables</text:span><text:span text:style-name="T1"> massivas que destroem as estratégias de </text:span><text:span text:style-name="T3">cache</text:span><text:span text:style-name="T1"> (como a localidade de dados em </text:span><text:span text:style-name="T3">Radix Tree prefix caching</text:span><text:span text:style-name="T1"> ou as limitações de </text:span><text:span text:style-name="T3">SRAM/HBM tiling</text:span><text:span text:style-name="T1">).</text:span></text:p>
      <text:list xml:id="list3913959965" text:style-name="WWNum3">
        <text:list-item>
          <text:p text:style-name="P5"><text:span text:style-name="T5">Mecânica e Arquitetura:</text:span><text:span text:style-name="T1"> Go utiliza structs para dados e interfaces para comportamento, implementadas implicitamente. Essa abordagem, conhecida como </text:span><text:span text:style-name="T3">structural typing</text:span><text:span text:style-name="T1"> ou </text:span><text:span text:style-name="T3">duck typing</text:span><text:span text:style-name="T1"> em tempo de compilação, permite </text:span><text:span text:style-name="T3">strict boundary separation</text:span><text:span text:style-name="T1">.</text:span></text:p>
        </text:list-item>
        <text:list-item>
          <text:p text:style-name="P5"><text:span text:style-name="T5">Diagnóstico de Estrutura:</text:span><text:span text:style-name="T1"> Ao avaliar a complexidade computacional, a composição sobre a herança em Go garante compressão de estado em </text:span><draw:frame draw:style-name="fr1" draw:name="image1.png" text:anchor-type="as-char" svg:width="0.4429in" svg:height="0.2646in" draw:z-index="0"><draw:image xlink:href="Pictures/1000020100000039000000224A9B561C60B07188.png" xlink:type="simple" xlink:show="embed" xlink:actuate="onLoad" loext:mime-type="image/png"/></draw:frame><text:span text:style-name="T1">, evitando o escalonamento quadrático em grafos de dependência complexos. Permite uma injeção de dependência explícita (</text:span><text:span text:style-name="T3">explicit dependency injection</text:span><text:span text:style-name="T1">), onde o estado encapsulado não vaza para instâncias não autorizadas.</text:span></text:p>
        </text:list-item>
      </text:list>
      <text:p text:style-name="P13"><text:span text:style-name="T1">4. Functional Programming</text:span></text:p>
      <text:p text:style-name="P1"><text:span text:style-name="T5">Grau de Importância: Suplementar / Utilitário</text:span></text:p>
      <text:p text:style-name="P1"><text:span text:style-name="T1">Go suporta funções como cidadãos de primeira classe (</text:span><text:span text:style-name="T3">first-class functions</text:span><text:span text:style-name="T1">), funções de ordem superior e </text:span><text:span text:style-name="T3">closures</text:span><text:span text:style-name="T1">. Com a introdução recente de </text:span><text:span text:style-name="T3">Generics</text:span><text:span text:style-name="T1">, o ferramental funcional se expandiu, mas a linguagem não impõe a imutabilidade termodinâmica típica de linguagens puramente funcionais (como Haskell).</text:span></text:p>
      <text:list xml:id="list3783055078" text:style-name="WWNum4">
        <text:list-item>
          <text:p text:style-name="P6"><text:span text:style-name="T5">Mecânica e Arquitetura:</text:span><text:span text:style-name="T1"> O paradigma funcional em Go é usado como uma ferramenta de precisão, não como uma religião. Ele brilha no padrão de </text:span><text:span text:style-name="T3">Functional Options</text:span><text:span text:style-name="T1"> para inicialização limpa de </text:span><text:span text:style-name="T3">structs</text:span><text:span text:style-name="T1"> e na criação de </text:span><text:span text:style-name="T3">middlewares</text:span><text:span text:style-name="T1"> ou </text:span><text:span text:style-name="T3">wrappers</text:span><text:span text:style-name="T1"> de roteamento.</text:span></text:p>
        </text:list-item>
        <text:list-item>
          <text:p text:style-name="P6"><text:span text:style-name="T5">Diagnóstico de Estrutura:</text:span><text:span text:style-name="T1"> O uso de </text:span><text:span text:style-name="T3">closures</text:span><text:span text:style-name="T1"> deve ser monitorado cuidadosamente no que diz respeito ao </text:span><text:span text:style-name="T3">escape analysis</text:span><text:span text:style-name="T1">, pois o estado capturado frequentemente escapa para o </text:span><text:span text:style-name="T3">heap</text:span><text:span text:style-name="T1">. O uso pragmático do paradigma funcional em Go deve sempre buscar o </text:span><text:span text:style-name="T3">functional state isolation</text:span><text:span text:style-name="T1"> sem sacrificar o acesso determinístico à memória.</text:span></text:p>
        </text:list-item>
      </text:list>
      <text:p text:style-name="P14"><text:soft-page-break/><text:span text:style-name="T1">O Modelo de Concorrência: A Engenharia de Escalonamento e os Canais</text:span></text:p>
      <text:p text:style-name="P1"><text:span text:style-name="T1">Com os paradigmas fundacionais em mente, o aspeto central de Go reside na forma como a concorrência interage com as fronteiras do </text:span><text:span text:style-name="T3">hardware</text:span><text:span text:style-name="T1">. A eliminação das </text:span><text:span text:style-name="T3">threads</text:span><text:span text:style-name="T1"> do sistema operacional (SO) como principal primitivo de paralelismo constitui a maior vitória da "simpatia mecânica" no </text:span><text:span text:style-name="T3">design</text:span><text:span text:style-name="T1"> desta linguagem.</text:span></text:p>
      <text:p text:style-name="P13"><text:span text:style-name="T1">A Anatomia e o Ciclo de Vida do Modelo GMP</text:span></text:p>
      <text:p text:style-name="P1"><text:span text:style-name="T1">A </text:span><text:span text:style-name="T3">runtime</text:span><text:span text:style-name="T1"> de Go implementa o seu próprio escalonador (</text:span><text:span text:style-name="T3">scheduler</text:span><text:span text:style-name="T1">), executado no espaço do utilizador, que mapeia dinamicamente M </text:span><text:span text:style-name="T3">goroutines</text:span><text:span text:style-name="T1"> para N </text:span><text:span text:style-name="T3">threads</text:span><text:span text:style-name="T1"> nativas. Este modelo, conhecido como </text:span><text:span text:style-name="T5">GMP</text:span><text:span text:style-name="T1">, opera através de três componentes inter-relacionados de forma termodinâmica:</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5">Entidade do Modelo GMP</text:span></text:p>
          </table:table-cell>
          <table:table-cell table:style-name="Table1.A1" office:value-type="string">
            <text:p text:style-name="P8"><text:span text:style-name="T5">Arquitetura e Propósito Mecânico</text:span></text:p>
          </table:table-cell>
        </table:table-row>
        <table:table-row table:style-name="Table1.1">
          <table:table-cell table:style-name="Table1.A1" office:value-type="string">
            <text:p text:style-name="P8"><text:span text:style-name="T5">G (</text:span><text:span text:style-name="T4">Goroutine</text:span><text:span text:style-name="T5">)</text:span></text:p>
          </table:table-cell>
          <table:table-cell table:style-name="Table1.A1" office:value-type="string">
            <text:p text:style-name="P1"><text:span text:style-name="T1">Representa o bloco unitário de concorrência. Uma </text:span><text:span text:style-name="T3">goroutine</text:span><text:span text:style-name="T1"> inicia a sua vida com um </text:span><text:span text:style-name="T3">stack</text:span><text:span text:style-name="T1"> mínimo de 2 KB</text:span><text:span text:style-name="T7">13</text:span><text:span text:style-name="T1">. Ela contém o ponteiro da pilha (</text:span><text:span text:style-name="T3">stack pointer</text:span><text:span text:style-name="T1">), o contador do programa (</text:span><text:span text:style-name="T3">program counter</text:span><text:span text:style-name="T1">) e o seu estado interno (em execução, pronta, ou bloqueada). Sendo gerida inteiramente pela </text:span><text:span text:style-name="T3">runtime</text:span><text:span text:style-name="T1">, a sua criação demora apenas cerca de 300 nanossegundos</text:span><text:span text:style-name="T7">13</text:span><text:span text:style-name="T1">.</text:span></text:p>
          </table:table-cell>
        </table:table-row>
        <table:table-row table:style-name="Table1.1">
          <table:table-cell table:style-name="Table1.A1" office:value-type="string">
            <text:p text:style-name="P8"><text:span text:style-name="T5">M (</text:span><text:span text:style-name="T4">Machine</text:span><text:span text:style-name="T5">)</text:span></text:p>
          </table:table-cell>
          <table:table-cell table:style-name="Table1.A1" office:value-type="string">
            <text:p text:style-name="P1"><text:span text:style-name="T1">Representa a </text:span><text:span text:style-name="T3">thread</text:span><text:span text:style-name="T1"> nativa do SO. Encontra-se intimamente ligada ao núcleo do sistema operativo e tem a responsabilidade primária de executar o código das </text:span><text:span text:style-name="T3">goroutines</text:span><text:span text:style-name="T1">. O M absorve o custo pesado da transição do contexto do kernel (cerca de 1 a 10 microssegundos para efetuar trocas de </text:span><text:span text:style-name="T3">threads</text:span><text:span text:style-name="T1"> normais), operando sem contexto Go até que lhe seja atribuído um P</text:span><text:span text:style-name="T7">13</text:span><text:span text:style-name="T1">.</text:span></text:p>
          </table:table-cell>
        </table:table-row>
        <table:table-row table:style-name="Table1.1">
          <table:table-cell table:style-name="Table1.A1" office:value-type="string">
            <text:p text:style-name="P8"><text:span text:style-name="T5">P (</text:span><text:span text:style-name="T4">Processor</text:span><text:span text:style-name="T5">)</text:span></text:p>
          </table:table-cell>
          <table:table-cell table:style-name="Table1.A1" office:value-type="string">
            <text:p text:style-name="P1"><text:span text:style-name="T1">O coração lógico da operação, funcionando como um mediador. Cada P possui uma Fila Local de Execução (</text:span><text:span text:style-name="T3">Local Run Queue</text:span><text:span text:style-name="T1"> - LRQ) com capacidade para armazenar até 256 </text:span><text:span text:style-name="T3">goroutines</text:span><text:span text:style-name="T1"> prontas para execução. O número total de Ps no sistema é ditado por GOMAXPROCS, equivalendo por norma ao número de núcleos físicos/lógicos disponíveis no hardware</text:span><text:span text:style-name="T7">13</text:span><text:span text:style-name="T1">.</text:span></text:p>
          </table:table-cell>
        </table:table-row>
      </table:table>
      <text:p text:style-name="P1"><text:span text:style-name="T1">O ciclo do escalonador não tem tolerância para bloqueios ociosos. Quando um bloco de código executa a diretiva go func(), o compilador instancia uma G e deposita-a na LRQ do processador P atual. Quando uma G necessita de invocar uma chamada do sistema bloqueante (como a leitura intensiva de ficheiros, ou </text:span><text:span text:style-name="T3">syscalls</text:span><text:span text:style-name="T1">), o OS bloqueia o M que executa essa tarefa</text:span><text:span text:style-name="T7">14</text:span><text:span text:style-name="T1">. Num modelo tradicional (1:1), isso paralisaria o núcleo de hardware inteiro. Contudo, em Go, o escalonador desatrela fisicamente o P do M bloqueado, entregando esse P (com as suas restantes </text:span><text:span text:style-name="T3">goroutines</text:span><text:span text:style-name="T1"> prontas) a um M livre (ou criando um novo, se necessário), garantindo que o fluxo de execução global não padece de estagnação</text:span><text:span text:style-name="T7">14</text:span><text:span text:style-name="T1">. Ao terminar a chamada bloqueante, a G original é recolocada numa fila de espera e o M antigo é adormecido ou destruído</text:span><text:span text:style-name="T7">16</text:span><text:span text:style-name="T1">.</text:span></text:p>
      <text:p text:style-name="P1"><text:span text:style-name="T1">No contexto de operações de rede (I/O), a arquitetura é ainda mais agressiva: o bloqueio é tratado pelo </text:span><text:span text:style-name="T3">Network Poller</text:span><text:span text:style-name="T1"> (usando </text:span><text:span text:style-name="T3">epoll</text:span><text:span text:style-name="T1">, </text:span><text:span text:style-name="T3">kqueue</text:span><text:span text:style-name="T1"> ou equivalente). A </text:span><text:span text:style-name="T3">goroutine</text:span><text:span text:style-name="T1"> suspende a sua própria execução e cede imediatamente o controlo do M para outra G, sendo notificada assincronamente pelo sistema operativo através da placa de rede</text:span><text:span text:style-name="T7">14</text:span><text:span text:style-name="T1">.</text:span></text:p>
      <text:p text:style-name="P1"><text:span text:style-name="T1">A justiça computacional (evitar que uma função maliciosa ou pesada engula a CPU) é garantida por preempção. Uma </text:span><text:span text:style-name="T3">thread</text:span><text:span text:style-name="T1"> invisível do sistema chamada sysmon vigia os processadores e, caso detete uma G a rodar de forma contínua por mais de 10 milissegundos sem devolver o controlo, a sysmon envia um sinal do sistema operacional (SIGURG) ao M. O intercetador no </text:span><text:span text:style-name="T3">runtime</text:span><text:span text:style-name="T1"> de Go modifica o contador de programa para forçar a G a uma função interna que a estaciona na Fila Global de Execução (</text:span><text:span text:style-name="T3">Global Run Queue</text:span><text:span text:style-name="T1"> - GRQ), retomando o fluxo da LRQ</text:span><text:span text:style-name="T7">14</text:span><text:span text:style-name="T1">.</text:span></text:p>
      <text:p text:style-name="P1"><text:span text:style-name="T1">Para distribuir o trabalho de forma eficiente, a </text:span><text:span text:style-name="T3">runtime</text:span><text:span text:style-name="T1"> confia no algoritmo de </text:span><text:span text:style-name="T3">work-stealing</text:span><text:span text:style-name="T1">: caso um P não tenha </text:span><text:span text:style-name="T3">goroutines</text:span><text:span text:style-name="T1"> na sua fila e não encontre nada no </text:span><text:span text:style-name="T3">Network Poller</text:span><text:span text:style-name="T1"> nem na Fila Global, ele tentará roubar de forma atómica exatamente metade da carga da LRQ pertencente a um P adjacente</text:span><text:span text:style-name="T7">13</text:span><text:span text:style-name="T1">.</text:span></text:p>
      <text:p text:style-name="P13"><text:span text:style-name="T1">Canais (hchan) e Mutexes em Baixo Nível</text:span></text:p>
      <text:p text:style-name="P1"><text:span text:style-name="T1">A sincronização de mensagens do paradigma CSP não é uma abstração vazia. Por trás de toda a sintaxe ch &lt;- data reside um tipo não exportado no </text:span><text:span text:style-name="T3">runtime</text:span><text:span text:style-name="T1"> chamado hchan. Esta estrutura ocupa o </text:span><text:span text:style-name="T3">heap</text:span><text:span text:style-name="T1"> e intermedeia a física da transferência</text:span><text:span text:style-name="T7">20</text:span><text:span text:style-name="T1">.</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5">Campo em hchan</text:span></text:p>
          </table:table-cell>
          <table:table-cell table:style-name="Table2.A1" office:value-type="string">
            <text:p text:style-name="P8"><text:span text:style-name="T5">Papel na Topologia Concorrente</text:span></text:p>
          </table:table-cell>
        </table:table-row>
        <table:table-row table:style-name="Table2.1">
          <table:table-cell table:style-name="Table2.A1" office:value-type="string">
            <text:p text:style-name="P8"><text:span text:style-name="T1">buf</text:span></text:p>
          </table:table-cell>
          <table:table-cell table:style-name="Table2.A1" office:value-type="string">
            <text:p text:style-name="P1"><text:span text:style-name="T1">Ponteiro unsafe.Pointer que aponta para o </text:span><text:span text:style-name="T3">buffer</text:span><text:span text:style-name="T1"> de memória, implementado sob a forma de uma fila circular</text:span><text:span text:style-name="T7">20</text:span><text:span text:style-name="T1">. Só é preenchido em canais cujo dataqsiz (tamanho alocado na chamada de make) é maior que zero</text:span><text:span text:style-name="T7">21</text:span><text:span text:style-name="T1">.</text:span></text:p>
          </table:table-cell>
        </table:table-row>
        <table:table-row table:style-name="Table2.1">
          <table:table-cell table:style-name="Table2.A1" office:value-type="string">
            <text:p text:style-name="P8"><text:span text:style-name="T1">sendx e recvx</text:span></text:p>
          </table:table-cell>
          <table:table-cell table:style-name="Table2.A1" office:value-type="string">
            <text:p text:style-name="P1"><text:span text:style-name="T1">Contadores inteiros que determinam, em índices relativos, a posição exata onde o próximo transmissor (sendx) vai escrever a memória e onde o próximo recetor (recvx) vai lê-la</text:span><text:span text:style-name="T7">20</text:span><text:span text:style-name="T1">.</text:span></text:p>
          </table:table-cell>
        </table:table-row>
        <table:table-row table:style-name="Table2.1">
          <table:table-cell table:style-name="Table2.A1" office:value-type="string">
            <text:p text:style-name="P8"><text:span text:style-name="T1">sendq e recvq</text:span></text:p>
          </table:table-cell>
          <table:table-cell table:style-name="Table2.A1" office:value-type="string">
            <text:p text:style-name="P1"><text:span text:style-name="T1">Filas duplamente encadeadas baseadas na abstração estrutural waitq. Guardam os ponteiros para a fila de </text:span><text:span text:style-name="T3">goroutines</text:span><text:span text:style-name="T1"> estacionadas à espera que o canal esvazie ou encha</text:span><text:span text:style-name="T7">21</text:span><text:span text:style-name="T1">.</text:span></text:p>
          </table:table-cell>
        </table:table-row>
        <table:table-row table:style-name="Table2.1">
          <table:table-cell table:style-name="Table2.A1" office:value-type="string">
            <text:p text:style-name="P8"><text:span text:style-name="T1">lock</text:span></text:p>
          </table:table-cell>
          <table:table-cell table:style-name="Table2.A1" office:value-type="string">
            <text:p text:style-name="P1"><text:span text:style-name="T1">O mecanismo vital de exclusão mútua (sync.Mutex). Este trinco lógico protege as alterações a todas as variáveis supracitadas. Qualquer transação bloqueia-o numa escala de microssegundos</text:span><text:span text:style-name="T7">20</text:span><text:span text:style-name="T1">.</text:span></text:p>
          </table:table-cell>
        </table:table-row>
      </table:table>
      <text:p text:style-name="P1"><text:soft-page-break/><text:span text:style-name="T1">Quando uma </text:span><text:span text:style-name="T3">goroutine</text:span><text:span text:style-name="T1"> tenta ler um canal sem dados, o </text:span><text:span text:style-name="T3">runtime</text:span><text:span text:style-name="T1"> invoca gopark. Ele empacota essa </text:span><text:span text:style-name="T3">goroutine</text:span><text:span text:style-name="T1"> com o endereço de memória que espera receber dentro de uma super-estrutura de sincronização chamada sudog</text:span><text:span text:style-name="T7">20</text:span><text:span text:style-name="T1">. Este sudog é inserido na fila recvq. O bloqueio é largado e o núcleo passa para outra tarefa</text:span><text:span text:style-name="T7">20</text:span><text:span text:style-name="T1">.</text:span></text:p>
      <text:p text:style-name="P1"><text:span text:style-name="T1">A genialidade manifesta-se assim que o emissor surge. Quando uma nova </text:span><text:span text:style-name="T3">goroutine</text:span><text:span text:style-name="T1"> adquire o bloqueio para escrever no canal e deteta que há um recetor faminto acampado na recvq, em vez de gravar os dados na fila circular (buf) para que o recetor os vá buscar mais tarde, a linguagem aplica uma otimização fulminante. Através da função interna sendDirect, os dados são submetidos a uma cópia de memória (memmove) originada </text:span><text:span text:style-name="T5">diretamente a partir do bloco de variáveis da pilha (</text:span><text:span text:style-name="T4">stack</text:span><text:span text:style-name="T5">) do emissor para a pilha (</text:span><text:span text:style-name="T4">stack</text:span><text:span text:style-name="T5">) da </text:span><text:span text:style-name="T4">goroutine</text:span><text:span text:style-name="T5"> bloqueada do recetor</text:span><text:span text:style-name="T7">22</text:span><text:span text:style-name="T1">. Esta transação cirúrgica poupa bloqueios subsequentes, dispensa ciclos intermédios e acorda a </text:span><text:span text:style-name="T3">goroutine</text:span><text:span text:style-name="T1"> adormecida de imediato, ilustrando a capacidade extraordinária do Go em minar a sobrecarga da transferência de dados.</text:span></text:p>
      <text:p text:style-name="P1"><text:span text:style-name="T1">Nas sintaxes complexas com a palavra-chave select lidando com múltiplos canais, o </text:span><text:span text:style-name="T3">runtime</text:span><text:span text:style-name="T1"> pseudo-aleatoriza os casos invocados e varre sequencialmente o lock de todos eles. Sem a </text:span><text:span text:style-name="T3">keyword</text:span><text:span text:style-name="T1"> default, a </text:span><text:span text:style-name="T3">goroutine</text:span><text:span text:style-name="T1"> constrói uma fila de instâncias de sudog depositando uma cópia em todas as sendq ou recvq de todos os canais visados simultaneamente. Assim que um único canal for acedido noutro lado do programa, a </text:span><text:span text:style-name="T3">goroutine</text:span><text:span text:style-name="T1"> principal é acordada e uma fase de varredura destrói ativamente todos os outros sudogs órfãos, devolvendo a </text:span><text:span text:style-name="T3">goroutine</text:span><text:span text:style-name="T1"> ao fluxo do escalonador</text:span><text:span text:style-name="T7">22</text:span><text:span text:style-name="T1">.</text:span></text:p>
      <text:p text:style-name="P14"><text:span text:style-name="T1">Gestão de RAM: Alocação, Análise de Fuga e a Recolha de Lixo</text:span></text:p>
      <text:p text:style-name="P1"><text:span text:style-name="T1">Numa aplicação gerida (</text:span><text:span text:style-name="T3">managed runtime</text:span><text:span text:style-name="T1">), o tratamento ineficiente da memória sobrecarrega a infraestrutura e condena sistemas operacionais a latências instáveis e congelamentos do processo (</text:span><text:span text:style-name="T3">pauses</text:span><text:span text:style-name="T1">). Go equilibra isso mantendo as alocações contidas através de </text:span><text:span text:style-name="T3">Escape Analysis</text:span><text:span text:style-name="T1"> severa e com um algoritmo avançado de </text:span><text:span text:style-name="T3">Garbage Collector</text:span><text:span text:style-name="T1"> (GC).</text:span></text:p>
      <text:p text:style-name="P13"><text:span text:style-name="T1">O Funcionamento do </text:span><text:span text:style-name="T6">Garbage Collector</text:span><text:span text:style-name="T1"> (GC) em Go</text:span></text:p>
      <text:p text:style-name="P1"><text:span text:style-name="T1">Para servir serviços escaláveis à internet, Go implementa uma lógica de </text:span><text:span text:style-name="T5">Varredura e Marcação Tricolor Concorrente (</text:span><text:span text:style-name="T4">Concurrent Tri-color Mark and Sweep</text:span><text:span text:style-name="T5">)</text:span><text:span text:style-name="T1">. Historicamente, os sistemas com GC paralisavam o mundo da aplicação (</text:span><text:span text:style-name="T3">Stop-The-World</text:span><text:span text:style-name="T1"> ou STW) na sua totalidade para vasculharem toda a árvore do </text:span><text:span text:style-name="T3">heap</text:span><text:span text:style-name="T1">, limpando depois os destroços não mapeados</text:span><text:span text:style-name="T7">25</text:span><text:span text:style-name="T1">. Em vez disso, Go permite que a aplicação (designada de </text:span><text:span text:style-name="T3">mutator</text:span><text:span text:style-name="T1">) corra lado-a-lado com as rotinas da reciclagem em 25% da CPU total, segmentando o reconhecimento de grafos lógicos por três categorias heurísticas</text:span><text:span text:style-name="T7">25</text:span><text:span text:style-name="T1">:</text:span></text:p>
      <text:list xml:id="list3587544337" text:style-name="WWNum5">
        <text:list-item>
          <text:p text:style-name="P7"><text:span text:style-name="T5">Branco:</text:span><text:span text:style-name="T1"> Objetos cujo acesso não foi demonstrado. Representam o lixo se continuarem nesta coloração no fim do ciclo</text:span><text:span text:style-name="T7">25</text:span><text:span text:style-name="T1">.</text:span></text:p>
        </text:list-item>
        <text:list-item>
          <text:p text:style-name="P7"><text:span text:style-name="T5">Cinzento:</text:span><text:span text:style-name="T1"> Objetos visitados na travessia raiz, que comprovadamente estão ativos e vivos. Contudo, as ramificações sob o objeto ainda se encontram obscuras</text:span><text:span text:style-name="T7">25</text:span><text:span text:style-name="T1">.</text:span></text:p>
        </text:list-item>
        <text:list-item>
          <text:p text:style-name="P7"><text:span text:style-name="T5">Preto:</text:span><text:span text:style-name="T1"> O grafo total já foi mapeado de ponta-a-ponta, comprovando a vivacidade do nó pai e dos filhos associados</text:span><text:span text:style-name="T7">25</text:span><text:span text:style-name="T1">.</text:span></text:p>
        </text:list-item>
      </text:list>
      <text:p text:style-name="P1"><text:span text:style-name="T1">Quando o limiar do Pacer do GC é atingido, o estado passa para rastreamento. As raízes dos dados globais e as pilhas das goroutines (</text:span><text:span text:style-name="T3">stacks</text:span><text:span text:style-name="T1">) ativas são avaliadas, atirando as suas fronteiras para um pote cinzento. A tarefa varre e colore os adjacentes para cinzento e solidifica as origens a preto, prosseguindo até não restar nenhum vestígio cinzento. Terminado este passo, todas as entidades brancas passam à purga na varredura paralela (</text:span><text:span text:style-name="T3">concurrent sweep</text:span><text:span text:style-name="T1">) que devolve os intervalos apagados a uma Lista de Memória Livre (</text:span><text:span text:style-name="T3">Free List</text:span><text:span text:style-name="T1">) com vista a futura absorção pelos alocadores</text:span><text:span text:style-name="T7">25</text:span><text:span text:style-name="T1">.</text:span></text:p>
      <text:p text:style-name="P1"><text:span text:style-name="T1">A revolução desta abordagem recai sobre a </text:span><text:span text:style-name="T5">Barreira Híbrida de Escrita (</text:span><text:span text:style-name="T4">Hybrid Write Barrier</text:span><text:span text:style-name="T5">)</text:span><text:span text:style-name="T1"> (a partir do Go 1.8), que combina as barreiras de inserção de Dijkstra e as barreiras de exclusão de Yuasa</text:span><text:span text:style-name="T7">25</text:span><text:span text:style-name="T1">. Se a aplicação continuasse a modificar ponteiros num mundo aberto concorrente à fase de marcação, o programador poderia extrair um objeto de um ramo Branco, alocando-o sobre o regaço de um objeto Preto. O rastreio, considerando a região Preta segura, não revistaria o nodo em questão, condenando a parte Branca (agora fundamental para o funcionamento da </text:span><text:span text:style-name="T3">thread</text:span><text:span text:style-name="T1">) a desaparecer de forma violenta, originando uma corrupção letal (</text:span><text:span text:style-name="T3">dangling pointer</text:span><text:span text:style-name="T1"> / colisão fatal na memória)</text:span><text:span text:style-name="T7">30</text:span><text:span text:style-name="T1">.</text:span></text:p>
      <text:p text:style-name="P1"><text:span text:style-name="T1">O compilador defende o programa em tempo de execução alavancando as </text:span><text:span text:style-name="T3">Write Barriers</text:span><text:span text:style-name="T1">: segmentos minúsculos do código de máquina implantados ativamente a cada instrução de gravação do tipo *ptr = novoEndereço. Quando o GC entra em estado reativo, estas barreiras entram num estado engatilhado. Ao se invocar a gravação, a barreira sub-repticiamente altera as cores lógicas do endereço </text:span><text:span text:style-name="T5">anterior</text:span><text:span text:style-name="T1"> do slot visado, bem como a do </text:span><text:span text:style-name="T5">novo</text:span><text:span text:style-name="T1"> ponteiro, para a cor cinzenta</text:span><text:span text:style-name="T7">32</text:span><text:span text:style-name="T1">. Essa ação drástica notifica as estruturas de recolha para reavalurem aquela localidade na memória antes de permitirem a sua morte silenciosa. A eficácia atómica deste preceito aboliu o re-escaneio da pilha final das antigas versões do Go, condensando a paralisação STW a durações microscópicas de aproximadamente 0.1 milissegundos a 0.6 milissegundos</text:span><text:span text:style-name="T7">25</text:span><text:span text:style-name="T1">.</text:span></text:p>
      <text:p text:style-name="P13"><text:span text:style-name="T1">A Mecânica </text:span><text:span text:style-name="T6">Stack</text:span><text:span text:style-name="T1"> versus </text:span><text:span text:style-name="T6">Heap</text:span><text:span text:style-name="T1"> e a Análise de Fuga</text:span></text:p>
      <text:p text:style-name="P1"><text:span text:style-name="T1">A minimização radical das ramificações da memória, que desancora os ciclos laboriosos de CPU focados na reciclagem (o GC), alcança-se alojando objetos apenas na Pilha (</text:span><text:span text:style-name="T3">Stack</text:span><text:span text:style-name="T1">). Cada </text:span><text:span text:style-name="T3">goroutine</text:span><text:span text:style-name="T1">, dispondo inicialmente dos seus 2 KB, administra a sua pilha sem perdas termodinâmicas: subtrair a área no regresso da função é o custo solitário da libertação completa</text:span><text:span text:style-name="T7">19</text:span><text:span text:style-name="T1">.</text:span></text:p>
      <text:p text:style-name="P1"><text:span text:style-name="T1">O compilador toma a grande decisão arquitetural via </text:span><text:span text:style-name="T5">Análise de Fuga (</text:span><text:span text:style-name="T4">Escape Analysis</text:span><text:span text:style-name="T5">)</text:span><text:span text:style-name="T1"> durante a fase final da compilação (</text:span><text:span text:style-name="T3">Middle-End</text:span><text:span text:style-name="T1">), que se pode rastrear via diretriz -gcflags="-m -l"</text:span><text:span text:style-name="T7">36</text:span><text:span text:style-name="T1">. O fluxo constrói um percurso topológico dos nós de abstração intermédios em prol da prova da vida das variáveis</text:span><text:span text:style-name="T7">36</text:span><text:span text:style-name="T1">.</text:span></text:p>
      <text:p text:style-name="P1"><text:span text:style-name="T1">Uma variável vaza obrigatoriamente para o domínio do </text:span><text:span text:style-name="T3">Heap</text:span><text:span text:style-name="T1"> se for detetada alguma das premissas destrutivas:</text:span></text:p>
      <text:list xml:id="list778914175" text:style-name="WWNum6">
        <text:list-item>
          <text:p text:style-name="P9"><text:span text:style-name="T5">O Tempo de Vida Físico Rompe a </text:span><text:span text:style-name="T4">Frame</text:span><text:span text:style-name="T5"> da Função:</text:span><text:span text:style-name="T1"> Retornar o endereço de um bloco originado na localidade de escopo atual (return &amp;x) força a elevação a alocação de longo termo, prevenindo a anulação referencial</text:span><text:span text:style-name="T7">35</text:span><text:span text:style-name="T1">.</text:span></text:p>
        </text:list-item>
        <text:list-item>
          <text:p text:style-name="P9"><text:span text:style-name="T5">Cargas de Dimensão Interditada:</text:span><text:span text:style-name="T1"> Alocar matrizes dinâmicas via make([]byte, size) cujo tamanho escapa à predição hermética do processo de compilação ou ultrapassa o linear nativo (MaxStackVarSize, tipicamente superior a cerca de 64 KB) obriga o deslocamento de toda a alocação para a abstração do </text:span><text:span text:style-name="T3">heap</text:span><text:span text:style-name="T7">34</text:span><text:span text:style-name="T1">.</text:span></text:p>
        </text:list-item>
        <text:list-item>
          <text:p text:style-name="P9"><text:span text:style-name="T5">Aprisionamento em </text:span><text:span text:style-name="T4">Closures</text:span><text:span text:style-name="T5">:</text:span><text:span text:style-name="T1"> Um </text:span><text:span text:style-name="T3">closure</text:span><text:span text:style-name="T1"> que encerra referências externas cria elos duradouros sob variáveis transitórias. Ao prever um aprisionamento sem retorno delimitado, o compilador migra obrigatoriamente os dados para o cofre massivo do </text:span><text:span text:style-name="T3">heap</text:span><text:span text:style-name="T1">, aliviando qualquer assimetria fatal entre o fecho da pilha originadora e a propagação diferida do contexto</text:span><text:span text:style-name="T7">12</text:span><text:span text:style-name="T1">.</text:span></text:p>
        </text:list-item>
        <text:list-item>
          <text:p text:style-name="P9"><text:span text:style-name="T5">Armadilhas do Envelopamento em Interfaces:</text:span><text:span text:style-name="T1"> Transformar sub-rotinas rígidas em polimorfismos soltos via interface{} ou uso indiscriminado de reflexão (como o famigerado fmt.Println()) atira a predição para o abismo, transformando dados empilháveis numa alocação dinâmica forçada</text:span><text:span text:style-name="T7">34</text:span><text:span text:style-name="T1">.</text:span></text:p>
        </text:list-item>
      </text:list>
      <text:p text:style-name="P1"><text:soft-page-break/><text:span text:style-name="T1">A arquitetura interna dos contentores das interfaces justifica este fenómeno. Ao compilar Go, cada interface materializa-se como um caixote estrutural de dois ponteiros de 8 bytes cada (ocupando os respetivos 16 bytes sob a máquina virtual AMD64). Numa subestrutura com métodos, invoca-se o </text:span><text:span text:style-name="T5">iface</text:span><text:span text:style-name="T1">: constituído por tab *itab (a grelha indexante que hospeda o recetor metodológico virtual e informações primitivas do tipo concreto da base) e data unsafe.Pointer (o apontador isolado direcionando para a bagagem armazenada nativamente no </text:span><text:span text:style-name="T3">heap</text:span><text:span text:style-name="T1">)</text:span><text:span text:style-name="T7">42</text:span><text:span text:style-name="T1">. O uso de um invólucro de interface nua e estéril converte-se internamente em </text:span><text:span text:style-name="T5">eface</text:span><text:span text:style-name="T1">, cuja topologia detém a estrutura metafísica de compilação no eixo de _type *_type em vez de reações com </text:span><text:span text:style-name="T3">tables</text:span><text:span text:style-name="T1">, culminando da mesma maneira no atiramento do data unsafe.Pointer sobre o campo dispersivo do </text:span><text:span text:style-name="T3">heap</text:span><text:span text:style-name="T7">10</text:span><text:span text:style-name="T1">. Esta separação entre </text:span><text:span text:style-name="T3">data</text:span><text:span text:style-name="T1"> e comportamento impõe o desfasamento das estruturas originais de </text:span><text:span text:style-name="T3">structs</text:span><text:span text:style-name="T1">, induzindo um desvio indireto e custoso às linhas da CPU aquando de conversões tipográficas.</text:span></text:p>
      <text:p text:style-name="P1"><text:span text:style-name="T1">Caso o crescimento da pilha local esmague os exíguos quilobytes de teto, uma injeção cirúrgica de assembly chamada de runtime.morestack trava a progressão. Este subcomité arquitetural dobra imediatamente o tamanho originário da placa alocadora. De forma metódica, transporta todas as alocações bit-a-bit à frente e redesenha o rastro matemático dos inter-ponteiros nativos (pointer updating) com eficácia absoluta. Finalizada a transmutação em memória limpa sem fragmentação, devolve o bloco recém-amaciado às diretivas</text:span><text:span text:style-name="T7">15</text:span><text:span text:style-name="T1">.</text:span></text:p>
      <text:p text:style-name="P13"><text:span text:style-name="T1">Otimizações Extremas do Lixo: </text:span><text:span text:style-name="T6">Zero-Allocation</text:span><text:span text:style-name="T1"> e sync.Pool</text:span></text:p>
      <text:p text:style-name="P1"><text:span text:style-name="T1">Para assegurar o domínio das micro-latências de I/O na casa milimétrica, a escola de engenharia adota táticas profundas em </text:span><text:span text:style-name="T3">Zero-Allocation</text:span><text:span text:style-name="T1">, isolando percursos quentes (</text:span><text:span text:style-name="T3">hot paths</text:span><text:span text:style-name="T1">)</text:span><text:span text:style-name="T7">50</text:span><text:span text:style-name="T1">.</text:span></text:p>
      <text:p text:style-name="P1"><text:span text:style-name="T1">Entre estas destaca-se o banimento generalizado à criação implícita de variáveis descartáveis por iteração. A operação clássica sobre fatias num anel fechado beneficia-se de alocação previsível ativando a macro make([]T, 0, capacity) garantida na fronteira para anular sub-rotinas dispendiosas que forçariam ao alastramento repetido da RAM, as quais disparam os multiplicadores decrescentes de classe (de alocação 2x para limiares mais suaves, até 1.25x)</text:span><text:span text:style-name="T7">4</text:span><text:span text:style-name="T1">. De igual monta, o aglomerado de </text:span><text:span text:style-name="T3">strings</text:span><text:span text:style-name="T1"> intermutáveis sobre strings.Builder (com um Grow() submetido no início) encapsula a cópia de memórias díspares</text:span><text:span text:style-name="T7">50</text:span><text:span text:style-name="T1">.</text:span></text:p>
      <text:p text:style-name="P1"><text:span text:style-name="T1">A armadilha sistémica resolve-se muitas vezes alugando e reutilizando blocos mortos da RAM através da super-primitiva sync.Pool. Em rotas críticas HTTP, </text:span><text:span text:style-name="T3">buffers</text:span><text:span text:style-name="T1"> gigantescos []byte encarregues da interpretação dos cabeçalhos abandonam a volatilidade descartável; um ciclo liberta as instâncias desfiguradas com limpezas rudimentares (via Reset()) empurrando-as novamente no ecossistema do poço bufferPool.Put(buf). No advento do próximo apelo à infraestrutura, bufferPool.Get() resgata estaticamente os nacos já processados, impedindo alocações nativas no lixo da memória</text:span><text:span text:style-name="T7">50</text:span><text:span text:style-name="T1">. Notoriamente, colocar </text:span><text:span text:style-name="T3">fatias</text:span><text:span text:style-name="T1"> em sync.Pool obriga à conversão para interface{}, e com as suas restrições espaciais restritas (16 bytes), o []byte excedente resvala no lixo do </text:span><text:span text:style-name="T3">heap</text:span><text:span text:style-name="T1">; a simetria ótima implica enclausurar sempre na </text:span><text:span text:style-name="T3">Pool</text:span><text:span text:style-name="T1"> as localizações dos ponteiros nativos atómicos *[]byte ou *bytes.Buffer, preservando a evasão termodinâmica idealizada</text:span><text:span text:style-name="T7">54</text:span><text:span text:style-name="T1">.</text:span></text:p>
      <text:p text:style-name="P14"><text:span text:style-name="T1">CPU: Fronteiras Dinâmicas, Cache Hierárquico e </text:span><text:span text:style-name="T2">Padding</text:span><text:span text:style-name="T1"> de Structs</text:span></text:p>
      <text:p text:style-name="P1"><text:span text:style-name="T1">A execução puramente escalar e alocação hermética é subjugada se não espelhar a sintonia atómica do cérebro de processamento moderno: as regras arquiteturais da Unidade Central de Processamento (CPU).</text:span></text:p>
      <text:p text:style-name="P1"><text:span text:style-name="T1">O esgotamento sistémico de uma execução dita otimizada pode originar-se na latência implacável entre núcleos concorrentes sobrepondo a gestão nativa da coerência das caches L1, L2 e L3. Uma leitura efetuada em registo cache L1 ou L2 decorre instantaneamente sobre o limiar de cerca de 1 a 5 ciclos (</text:span><text:span text:style-name="T3">clock cycles</text:span><text:span text:style-name="T1">). Por outro lado, quebrar o limiar para transações originárias no deserto da RAM desintegra os perfis num fosso caótico de 100 até 300 ciclos por ocorrência unitária</text:span><text:span text:style-name="T7">53</text:span><text:span text:style-name="T1">.</text:span></text:p>
      <text:p text:style-name="P13"><text:span text:style-name="T1">O Veneno do </text:span><text:span text:style-name="T6">False Sharing</text:span><text:span text:style-name="T1"> e Protocolos MESI</text:span></text:p>
      <text:p text:style-name="P1"><text:span text:style-name="T1">Este problema de fronteira cristaliza-se no flagelo letal chamado Falso Compartilhamento (</text:span><text:span text:style-name="T3">False Sharing</text:span><text:span text:style-name="T1">). O sistema não recupera as matrizes alvos isolando um mero </text:span><text:span text:style-name="T3">byte</text:span><text:span text:style-name="T1">. A CPU exige sempre a migração inteira, agrupando a localidade numa formatação indestrutível e adjacente de </text:span><text:span text:style-name="T5">Linhas de Cache de 64 bytes</text:span><text:span text:style-name="T1"> (</text:span><text:span text:style-name="T3">Cache Lines</text:span><text:span text:style-name="T1">)</text:span><text:span text:style-name="T7">53</text:span><text:span text:style-name="T1">.</text:span></text:p>
      <text:p text:style-name="P1"><text:span text:style-name="T1">O cenário apocalíptico manifesta-se quando duas goroutines desvinculadas, hospedadas sobre processadores paralelos (Core A e Core B), recebem ordem de mutação agressiva e assíncrona sobre campos atómicos subjacentes mas encostados numa hierarquia nativa partilhada</text:span><text:span text:style-name="T7">60</text:span><text:span text:style-name="T1">.</text:span></text:p>
      <text:p text:style-name="P2"/>
      <table:table table:name="Table3" table:style-name="Table3">
        <table:table-column table:style-name="Table3.A"/>
        <table:table-column table:style-name="Table3.B"/>
        <table:table-row table:style-name="Table3.1">
          <table:table-cell table:style-name="Table3.A1" office:value-type="string">
            <text:p text:style-name="P8"><text:span text:style-name="T5">Contexto do Problema</text:span></text:p>
          </table:table-cell>
          <table:table-cell table:style-name="Table3.A1" office:value-type="string">
            <text:p text:style-name="P8"><text:span text:style-name="T5">Descrição Atómica</text:span></text:p>
          </table:table-cell>
        </table:table-row>
        <table:table-row table:style-name="Table3.1">
          <table:table-cell table:style-name="Table3.A1" office:value-type="string">
            <text:p text:style-name="P8"><text:span text:style-name="T5">A Estrutura Problemática</text:span></text:p>
          </table:table-cell>
          <table:table-cell table:style-name="Table3.A1" office:value-type="string">
            <text:p text:style-name="P1"><text:span text:style-name="T1">struct { CountA int64; CountB int64 } alocada sequencialmente a 16 bytes na memória interligada</text:span><text:span text:style-name="T7">60</text:span><text:span text:style-name="T1">.</text:span></text:p>
          </table:table-cell>
        </table:table-row>
        <table:table-row table:style-name="Table3.1">
          <table:table-cell table:style-name="Table3.A1" office:value-type="string">
            <text:p text:style-name="P8"><text:span text:style-name="T5">Recolha a Núcleos Distintos</text:span></text:p>
          </table:table-cell>
          <table:table-cell table:style-name="Table3.A1" office:value-type="string">
            <text:p text:style-name="P1"><text:span text:style-name="T1">A CPU extrai a caixa cega e insere a janela adjacente [CountA + CountB] no sub-registo em cache interno individualmente nos dois núcleos (Core 1 e Core 2) simultaneamente</text:span><text:span text:style-name="T7">62</text:span><text:span text:style-name="T1">.</text:span></text:p>
          </table:table-cell>
        </table:table-row>
        <table:table-row table:style-name="Table3.1">
          <table:table-cell table:style-name="Table3.A1" office:value-type="string">
            <text:p text:style-name="P8"><text:span text:style-name="T5">Invalidade do Cache (MESI)</text:span></text:p>
          </table:table-cell>
          <table:table-cell table:style-name="Table3.A1" office:value-type="string">
            <text:p text:style-name="P1"><text:span text:style-name="T1">O instante em que a goroutine do Core 1 perturba ativamente o espetro CountA, o protocolo hardware rígido universal MESI (Modificado, Exclusivo, Partilhado, Inválido) acusa modificação integral da base</text:span><text:span text:style-name="T7">53</text:span><text:span text:style-name="T1">.</text:span></text:p>
          </table:table-cell>
        </table:table-row>
        <table:table-row table:style-name="Table3.1">
          <table:table-cell table:style-name="Table3.A1" office:value-type="string">
            <text:p text:style-name="P8"><text:span text:style-name="T5">O Colapso do Barramento</text:span></text:p>
          </table:table-cell>
          <table:table-cell table:style-name="Table3.A1" office:value-type="string">
            <text:p text:style-name="P1"><text:span text:style-name="T1">O Core 1 envia eletronicamente um relâmpago de difusão (</text:span><text:span text:style-name="T3">broadcast</text:span><text:span text:style-name="T1">) de invalidez e destrói inteiramente a linha 64-bytes hospedada no Core 2. Quando este tentar reajustar pacificamente a não afetada zona do CountB, irá sofrer uma </text:span><text:span text:style-name="T3">Cache Miss</text:span><text:span text:style-name="T1"> de 300 ciclos letal</text:span><text:span text:style-name="T7">59</text:span><text:span text:style-name="T1">.</text:span></text:p>
          </table:table-cell>
        </table:table-row>
      </table:table>
      <text:p text:style-name="P1"><text:span text:style-name="T1">As instâncias engasgam com perdas exponenciais mascaradas como saturações inter-lock. A Go neutraliza arquiteturalmente o esgotamento infundindo uma técnica bruta e implacável de enclausuramento: as Barreira de Preenchimento ou </text:span><text:span text:style-name="T5">Padding Estrutural</text:span><text:span text:style-name="T1">. A inclusão passiva de vazios artificiais — injetando um silêncio virtual via limites anónimos contendo _ [56]byte (ou dezoito alinhamentos em processadores não padronizados) na zona intersticial entre alvos vulneráveis — espalha as áreas hostis. A intersecção espacial empurra as instâncias CountA e CountB para além das vizinhas estritas dos 64 bytes, reabilitando a independência natural no isolamento completo dos caches L1 nos dois núcleos envolvidos. É, não coincidentemente, a mesmíssima estrutura implementada pelos </text:span><text:span text:style-name="T3">engineers</text:span><text:span text:style-name="T1"> na arquitetura mãe que aloja a topologia de nós escalares do Processador P em Go e do mecanismo sync.Pool</text:span><text:span text:style-name="T7">59</text:span><text:span text:style-name="T1">.</text:span></text:p>
      <text:p text:style-name="P13"><text:span text:style-name="T1">Alinhamento Estático e a Barreira dos </text:span><text:span text:style-name="T6">Structs</text:span></text:p>
      <text:p text:style-name="P1"><text:span text:style-name="T1">Na ausência de intervenção deliberada, os recetores e frotas de alocação perdem tração de memória sem falhas da CPU ao misturarem variáveis e dados irregulares na raiz primitiva do objeto. Cada barramento do chip exige extrações baseadas em fatores inteiros da topologia nativa computacional (por norma, a dimensão total de uma Palavra ou </text:span><text:span text:style-name="T3">Word Size</text:span><text:span text:style-name="T1"> — 8 bytes em sistemas a 64 bits)</text:span><text:span text:style-name="T7">4</text:span><text:span text:style-name="T1">.</text:span></text:p>
      <text:p text:style-name="P1"><text:soft-page-break/><text:span text:style-name="T1">A arquitetura do compilador em Go respeita esse limite insuperável e reage por preenchimento fantasma oculto. Se um engenheiro estruturar incorretamente um campo estéril bool (1 byte) no início, seguido bruscamente de um bloco denso int64 (8 bytes), e terminar no regresso de outro bool (1 byte), a formatação da compilação instaura buracos repletos de nada entre fronteiras: introduz 7 bytes passivos a separar a colisão e injeta uma coroa redundante de mais 7 bytes puramente para acomodar o múltiplo imperioso da palavra base no final do espetro</text:span><text:span text:style-name="T7">60</text:span><text:span text:style-name="T1">.</text:span></text:p>
      <text:p text:style-name="P1"><text:span text:style-name="T1">O esvaziamento resultante insufla um vetor que poderia ter durado compactamente contíguo num fosso predatório aos L2 e L3. A ordenação decrescente restrita em </text:span><text:span text:style-name="T3">design</text:span><text:span text:style-name="T1"> modular reescreve a semântica do compilador: colocar na cabeça todas as superestruturas do campo de grandeza super-densos (int64, float64, pointer), seguidas na cascata em declive decrescente para os fragmentos menores de menor impacto (int32, int16, byte, bool). Os resíduos microscópicos ocupam com precisão sub-aberturas vazias remanescentes no </text:span><text:span text:style-name="T3">stack</text:span><text:span text:style-name="T1">, enxugando as perdas totais até limites próximos ao estático na faixa ideal contida sobre menos do que uma fração isolada de bloco L1, acelerando varreduras paralelas imensamente</text:span><text:span text:style-name="T7">60</text:span><text:span text:style-name="T1">.</text:span></text:p>
      <text:p text:style-name="P13"><text:span text:style-name="T1">A Guerra Linear: </text:span><text:span text:style-name="T6">Pointer Chasing</text:span><text:span text:style-name="T1"> versus </text:span><text:span text:style-name="T6">Slices</text:span></text:p>
      <text:p text:style-name="P1"><text:span text:style-name="T1">Mesmo com um preenchimento matemático cirúrgico das matrizes e proteção por concorrência atómica na RAM, as infraestruturas colapsam contra a lógica fundamental do silício ao adotarem desenhos algorítmicos em Grafos de Dependência Linear Lenta, a temível Praga de </text:span><text:span text:style-name="T5">Perseguição por Ponteiros (</text:span><text:span text:style-name="T4">Pointer Chasing</text:span><text:span text:style-name="T5">)</text:span><text:span text:style-name="T7">53</text:span><text:span text:style-name="T1">.</text:span></text:p>
      <text:p text:style-name="P1"><text:span text:style-name="T1">Topologias puristas de árvores entrelaçadas estritamente baseadas em ponteiros de navegação avulsa (ex: uma </text:span><text:span text:style-name="T3">Linked List</text:span><text:span text:style-name="T1"> dispersa node = head; for node != nil { node = node.next }) criam pontos aleatórios isolados do grafo de memória originário</text:span><text:span text:style-name="T7">57</text:span><text:span text:style-name="T1">. Essa assimetria topológica priva o </text:span><text:span text:style-name="T3">kernel</text:span><text:span text:style-name="T1"> inteligente e previsor espacial do chip (o </text:span><text:span text:style-name="T3">Prefetcher</text:span><text:span text:style-name="T1">) da capacidade computacional de decifrar atempadamente o enredo subsequente da máquina. O processador congela inevitavelmente o canal e interrompe violentamente as predições de saltos em paralelo (aniquilação da </text:span><text:span text:style-name="T3">Memory-Level Parallelism</text:span><text:span text:style-name="T1"> — a técnica fundamental moderna de esconder a latência ao carregar chamadas pendentes múltiplas ao barramento RAM). O fluxo exige resolução dependente total; tem que avaliar o nodo e inferir estaticamente onde na galáxia alocacional estará guardada a chave final subsequente</text:span><text:span text:style-name="T7">53</text:span><text:span text:style-name="T1">.</text:span></text:p>
      <text:p text:style-name="P11"><text:span text:style-name="T1">A reposta implacável ditada pela construção primitiva da linguagem em Go baseia-se na centralidade mecânica sagrada e massiva aos </text:span><text:span text:style-name="T5">Slices e Arrays</text:span><text:span text:style-name="T1">. Uma estrutura sequencial adjacente nativa que compacta homogeneamente as linhas ininterruptas em posições consecutivas físicas na topologia de memória subjacente. A CPU abrange o </text:span><text:span text:style-name="T3">loop</text:span><text:span text:style-name="T1">, descarrega eficientemente dezenas de referências atómicas simultâneas a cada acesso contíguo pela </text:span><text:span text:style-name="T3">cache line</text:span><text:span text:style-name="T1"> pré-requerida instantes antes pela intuição lógica da máquina. A sintaxe liberta as portas restritivas das </text:span><text:span text:style-name="T3">pipelines</text:span><text:span text:style-name="T1">, traduzindo o controlo na CPU para uma velocidade de </text:span><text:span text:style-name="T3">throughput</text:span><text:span text:style-name="T1"> infinitamente desimpedida na engenharia global paralela</text:span><text:span text:style-name="T7">53</text:span><text:span text:style-name="T1">.</text:span></text:p>
      <text:p text:style-name="P15"><text:span text:style-name="T8">Referências citadas</text:span></text:p>
      <text:list xml:id="list3626224734" text:style-name="WWNum7">
        <text:list-item>
          <text:p text:style-name="P10"><text:span text:style-name="T9">Effective Go, </text:span><text:a xlink:type="simple" xlink:href="https://www.math.bas.bg/softeng/bantchev/place/go/effective-go.pdf" text:style-name="ListLabel_20_64" text:visited-style-name="ListLabel_20_64"><text:span text:style-name="T10">https://www.math.bas.bg/softeng/bantchev/place/go/effective-go.pdf</text:span></text:a></text:p>
        </text:list-item>
        <text:list-item>
          <text:p text:style-name="P10"><text:span text:style-name="T9">Effective Go - The Go Programming Language, </text:span><text:a xlink:type="simple" xlink:href="https://go.dev/doc/effective_go" text:style-name="ListLabel_20_64" text:visited-style-name="ListLabel_20_64"><text:span text:style-name="T10">https://go.dev/doc/effective_go</text:span></text:a></text:p>
        </text:list-item>
        <text:list-item>
          <text:p text:style-name="P10"><text:span text:style-name="T9">doc/effective_go.html - go - Git at Google, </text:span><text:a xlink:type="simple" xlink:href="https://go.googlesource.com/go/+/9cd759a/doc/effective_go.html" text:style-name="ListLabel_20_64" text:visited-style-name="ListLabel_20_64"><text:span text:style-name="T10">https://go.googlesource.com/go/+/9cd759a/doc/effective_go.html</text:span></text:a></text:p>
        </text:list-item>
        <text:list-item>
          <text:p text:style-name="P10"><text:span text:style-name="T9">Slice Internals in Go: How the Runtime Expands Slices Efficiently - Mohamed Said, </text:span><text:a xlink:type="simple" xlink:href="https://themsaid.com/slice-internals-in-go" text:style-name="ListLabel_20_64" text:visited-style-name="ListLabel_20_64"><text:span text:style-name="T10">https://themsaid.com/slice-internals-in-go</text:span></text:a></text:p>
        </text:list-item>
        <text:list-item>
          <text:p text:style-name="P10"><text:span text:style-name="T9">GitHub - pthethanh/effective-go: a list of effective go, best practices and go idiomatic, </text:span><text:a xlink:type="simple" xlink:href="https://github.com/pthethanh/effective-go" text:style-name="ListLabel_20_64" text:visited-style-name="ListLabel_20_64"><text:span text:style-name="T10">https://github.com/pthethanh/effective-go</text:span></text:a></text:p>
        </text:list-item>
        <text:list-item>
          <text:p text:style-name="P10"><text:span text:style-name="T9">Go Code Review Checklist: Concurrency Guide - Pull Panda, </text:span><text:a xlink:type="simple" xlink:href="https://pullpanda.io/blog/go-code-review-checklist" text:style-name="ListLabel_20_64" text:visited-style-name="ListLabel_20_64"><text:span text:style-name="T10">https://pullpanda.io/blog/go-code-review-checklist</text:span></text:a></text:p>
        </text:list-item>
        <text:list-item>
          <text:p text:style-name="P10"><text:span text:style-name="T9">golang-pro.md - awesome-claude-code-subagents - GitHub, </text:span><text:a xlink:type="simple" xlink:href="https://github.com/VoltAgent/awesome-claude-code-subagents/blob/main/categories/02-language-specialists/golang-pro.md" text:style-name="ListLabel_20_64" text:visited-style-name="ListLabel_20_64"><text:span text:style-name="T10">https://github.com/VoltAgent/awesome-claude-code-subagents/blob/main/categories/02-language-specialists/golang-pro.md</text:span></text:a></text:p>
        </text:list-item>
        <text:list-item>
          <text:p text:style-name="P10"><text:span text:style-name="T9">AI agent framework decision guide 2026: CrewAI, LangGraph, Mastra, and more ranked by real-world fit - MadAppGang, </text:span><text:a xlink:type="simple" xlink:href="https://madappgang.com/blog/ai-agent-framework-decision-guide-2026/" text:style-name="ListLabel_20_64" text:visited-style-name="ListLabel_20_64"><text:span text:style-name="T10">https://madappgang.com/blog/ai-agent-framework-decision-guide-2026/</text:span></text:a></text:p>
        </text:list-item>
        <text:list-item>
          <text:p text:style-name="P10"><text:span text:style-name="T9">Is it just me or does nobody really know what idiomatic Go is. : r/golang - Reddit, </text:span><text:a xlink:type="simple" xlink:href="https://www.reddit.com/r/golang/comments/10b9tto/is_it_just_me_or_does_nobody_really_know_what/" text:style-name="ListLabel_20_64" text:visited-style-name="ListLabel_20_64"><text:span text:style-name="T10">https://www.reddit.com/r/golang/comments/10b9tto/is_it_just_me_or_does_nobody_really_know_what/</text:span></text:a></text:p>
        </text:list-item>
        <text:list-item>
          <text:p text:style-name="P10"><text:span text:style-name="T9">nil in Go: Is More Complicated Than You Think - DEV Community, </text:span><text:a xlink:type="simple" xlink:href="https://dev.to/leapcell/nil-in-go-is-more-complicated-than-you-think-29gp" text:style-name="ListLabel_20_64" text:visited-style-name="ListLabel_20_64"><text:span text:style-name="T10">https://dev.to/leapcell/nil-in-go-is-more-complicated-than-you-think-29gp</text:span></text:a></text:p>
        </text:list-item>
        <text:list-item>
          <text:p text:style-name="P10"><text:span text:style-name="T9">claude-code-templates/cli-tool/components/agents/programming-languages/golang-pro.md at main - GitHub, </text:span><text:a xlink:type="simple" xlink:href="https://github.com/davila7/claude-code-templates/blob/main/cli-tool/components/agents/programming-languages/golang-pro.md" text:style-name="ListLabel_20_64" text:visited-style-name="ListLabel_20_64"><text:span text:style-name="T10">https://github.com/davila7/claude-code-templates/blob/main/cli-tool/components/agents/programming-languages/golang-pro.md</text:span></text:a></text:p>
        </text:list-item>
        <text:list-item>
          <text:p text:style-name="P10"><text:span text:style-name="T9">Defer Has 3 Performance Cliffs. Here's How to See Them - DEV Community, </text:span><text:a xlink:type="simple" xlink:href="https://dev.to/gabrielanhaia/defer-has-3-performance-cliffs-heres-how-to-see-them-l98" text:style-name="ListLabel_20_64" text:visited-style-name="ListLabel_20_64"><text:span text:style-name="T10">https://dev.to/gabrielanhaia/defer-has-3-performance-cliffs-heres-how-to-see-them-l98</text:span></text:a></text:p>
        </text:list-item>
        <text:list-item>
          <text:p text:style-name="P10"><text:span text:style-name="T9">Goroutines and Scheduler | Concurrency Interview - AlgoMaster.io, </text:span><text:a xlink:type="simple" xlink:href="https://algomaster.io/learn/concurrency-interview/go-goroutines-and-scheduler" text:style-name="ListLabel_20_64" text:visited-style-name="ListLabel_20_64"><text:span text:style-name="T10">https://algomaster.io/learn/concurrency-interview/go-goroutines-and-scheduler</text:span></text:a></text:p>
        </text:list-item>
        <text:list-item>
          <text:p text:style-name="P10"><text:span text:style-name="T9">Go Concurrency Model: Goroutines and the GMP Scheduler | projectlighthouse, </text:span><text:a xlink:type="simple" xlink:href="https://projectlighthouse.io/en/books/go-intermediate/pages/concurrency-model" text:style-name="ListLabel_20_64" text:visited-style-name="ListLabel_20_64"><text:span text:style-name="T10">https://projectlighthouse.io/en/books/go-intermediate/pages/concurrency-model</text:span></text:a></text:p>
        </text:list-item>
        <text:list-item>
          <text:p text:style-name="P10"><text:soft-page-break/><text:span text:style-name="T9">Why Goroutines Scale: Stack Growth, Compiler Tricks, and Context Switching, </text:span><text:a xlink:type="simple" xlink:href="https://dev.to/ayush-k-anand/why-goroutines-scale-stack-growth-compiler-tricks-and-context-switching-k54" text:style-name="ListLabel_20_64" text:visited-style-name="ListLabel_20_64"><text:span text:style-name="T10">https://dev.to/ayush-k-anand/why-goroutines-scale-stack-growth-compiler-tricks-and-context-switching-k54</text:span></text:a></text:p>
        </text:list-item>
        <text:list-item>
          <text:p text:style-name="P10"><text:span text:style-name="T9">Understanding the Go Scheduler: The GMP Model Explained | by Sarvesh Sharma, </text:span><text:a xlink:type="simple" xlink:href="https://medium.com/@sharmasarvesh826/understanding-the-go-scheduler-the-gmp-model-explained-dee532c15c5f" text:style-name="ListLabel_20_64" text:visited-style-name="ListLabel_20_64"><text:span text:style-name="T10">https://medium.com/@sharmasarvesh826/understanding-the-go-scheduler-the-gmp-model-explained-dee532c15c5f</text:span></text:a></text:p>
        </text:list-item>
        <text:list-item>
          <text:p text:style-name="P10"><text:span text:style-name="T9">Golang Goroutine and GMP Model In-Depth Analysis | Alan Zhan Blog, </text:span><text:a xlink:type="simple" xlink:href="https://alanzhan.dev/en/post/2022-01-24-golang-goroutine/" text:style-name="ListLabel_20_64" text:visited-style-name="ListLabel_20_64"><text:span text:style-name="T10">https://alanzhan.dev/en/post/2022-01-24-golang-goroutine/</text:span></text:a></text:p>
        </text:list-item>
        <text:list-item>
          <text:p text:style-name="P10"><text:span text:style-name="T9">How Go (Golang) Works — A Deep Dive into Runtime Internals - Murat Demirci, </text:span><text:a xlink:type="simple" xlink:href="https://muratdemirci.com.tr/en/go-runtime-internals/" text:style-name="ListLabel_20_64" text:visited-style-name="ListLabel_20_64"><text:span text:style-name="T10">https://muratdemirci.com.tr/en/go-runtime-internals/</text:span></text:a></text:p>
        </text:list-item>
        <text:list-item>
          <text:p text:style-name="P10"><text:span text:style-name="T9">Goroutine Scheduling: GMP Model, Schedule Loop, Preemption &amp; Stack Management, </text:span><text:a xlink:type="simple" xlink:href="https://dev.to/jamesli/goroutine-scheduling-gmp-model-schedule-loop-preemption-stack-management-395p" text:style-name="ListLabel_20_64" text:visited-style-name="ListLabel_20_64"><text:span text:style-name="T10">https://dev.to/jamesli/goroutine-scheduling-gmp-model-schedule-loop-preemption-stack-management-395p</text:span></text:a></text:p>
        </text:list-item>
        <text:list-item>
          <text:p text:style-name="P10"><text:span text:style-name="T9">The internals of Go Channels - Level Up Coding, </text:span><text:a xlink:type="simple" xlink:href="https://levelup.gitconnected.com/the-internals-of-go-channels-664425a7b59c" text:style-name="ListLabel_20_64" text:visited-style-name="ListLabel_20_64"><text:span text:style-name="T10">https://levelup.gitconnected.com/the-internals-of-go-channels-664425a7b59c</text:span></text:a></text:p>
        </text:list-item>
        <text:list-item>
          <text:p text:style-name="P10"><text:span text:style-name="T9">Exploring the Internals of Channels in Go | by Kamna Garg | Women in Technology, </text:span><text:a xlink:type="simple" xlink:href="https://medium.com/womenintechnology/exploring-the-internals-of-channels-in-go-f01ac6e884dc" text:style-name="ListLabel_20_64" text:visited-style-name="ListLabel_20_64"><text:span text:style-name="T10">https://medium.com/womenintechnology/exploring-the-internals-of-channels-in-go-f01ac6e884dc</text:span></text:a></text:p>
        </text:list-item>
        <text:list-item>
          <text:p text:style-name="P10"><text:span text:style-name="T9">Inside Go Channels: A deep dive into the Runtime's concurrency magic | by Rushikesh Ghatpande | Medium, </text:span><text:a xlink:type="simple" xlink:href="https://medium.com/@rushikeshghatpande/inside-go-channels-a-deep-dive-into-the-runtimes-concurrency-magic-c17b1c983dfe" text:style-name="ListLabel_20_64" text:visited-style-name="ListLabel_20_64"><text:span text:style-name="T10">https://medium.com/@rushikeshghatpande/inside-go-channels-a-deep-dive-into-the-runtimes-concurrency-magic-c17b1c983dfe</text:span></text:a></text:p>
        </text:list-item>
        <text:list-item>
          <text:p text:style-name="P10"><text:span text:style-name="T9">Go's Concurrency and Channel Internals | Yet Another Dev Blog, </text:span><text:a xlink:type="simple" xlink:href="https://blog.bullgare.com/2022/12/gos-concurrency-and-channel-internals/" text:style-name="ListLabel_20_64" text:visited-style-name="ListLabel_20_64"><text:span text:style-name="T10">https://blog.bullgare.com/2022/12/gos-concurrency-and-channel-internals/</text:span></text:a></text:p>
        </text:list-item>
        <text:list-item>
          <text:p text:style-name="P10"><text:span text:style-name="T9">Getting Started With Golang Channels! Here's Everything You Need to Know, </text:span><text:a xlink:type="simple" xlink:href="https://www.velotio.com/engineering-blog/understanding-golang-channels" text:style-name="ListLabel_20_64" text:visited-style-name="ListLabel_20_64"><text:span text:style-name="T10">https://www.velotio.com/engineering-blog/understanding-golang-channels</text:span></text:a></text:p>
        </text:list-item>
        <text:list-item>
          <text:p text:style-name="P10"><text:span text:style-name="T9">Garbage Collection: From First Principles to Modern Collectors in Java, Go and Python, </text:span><text:a xlink:type="simple" xlink:href="https://shbhmrzd.github.io/systems/garbage-collection/memory-management/2026/04/01/garbage-collectors-deep-dive.html" text:style-name="ListLabel_20_64" text:visited-style-name="ListLabel_20_64"><text:span text:style-name="T10">https://shbhmrzd.github.io/systems/garbage-collection/memory-management/2026/04/01/garbage-collectors-deep-dive.html</text:span></text:a></text:p>
        </text:list-item>
        <text:list-item>
          <text:p text:style-name="P10"><text:span text:style-name="T9">Under the Hood: Exploring the Inner Workings of Garbage Collection in Golang - Medium, </text:span><text:a xlink:type="simple" xlink:href="https://medium.com/@souravchoudhary0306/under-the-hood-exploring-the-inner-workings-of-garbage-collection-in-golang-95b50bc8ce1d" text:style-name="ListLabel_20_64" text:visited-style-name="ListLabel_20_64"><text:span text:style-name="T10">https://medium.com/@souravchoudhary0306/under-the-hood-exploring-the-inner-workings-of-garbage-collection-in-golang-95b50bc8ce1d</text:span></text:a></text:p>
        </text:list-item>
        <text:list-item>
          <text:p text:style-name="P10"><text:span text:style-name="T9">(Golang Triad)-II-Comprehensive Analysis of Go's Hybrid Write Barrier Garbage Collection, </text:span><text:a xlink:type="simple" xlink:href="https://dev.to/aceld/golang-triad-ii-comprehensive-analysis-of-gos-hybrid-write-barrier-garbage-collection-3knh" text:style-name="ListLabel_20_64" text:visited-style-name="ListLabel_20_64"><text:span text:style-name="T10">https://dev.to/aceld/golang-triad-ii-comprehensive-analysis-of-gos-hybrid-write-barrier-garbage-collection-3knh</text:span></text:a></text:p>
        </text:list-item>
        <text:list-item>
          <text:p text:style-name="P10"><text:span text:style-name="T9">Go's Garbage Collector. The Unsung Hero Behind Scalable… | by Gayathiri Muralitharan | The PickMe Engineering Blog | Medium, </text:span><text:a xlink:type="simple" xlink:href="https://medium.com/pickme-engineering-blog/gos-garbage-collector-5f6c6f5ddf20" text:style-name="ListLabel_20_64" text:visited-style-name="ListLabel_20_64"><text:span text:style-name="T10">https://medium.com/pickme-engineering-blog/gos-garbage-collector-5f6c6f5ddf20</text:span></text:a></text:p>
        </text:list-item>
        <text:list-item>
          <text:p text:style-name="P10"><text:span text:style-name="T9">Contribution Guide - Nature Programming Language, </text:span><text:a xlink:type="simple" xlink:href="https://nature-lang.org/docs/contribute" text:style-name="ListLabel_20_64" text:visited-style-name="ListLabel_20_64"><text:span text:style-name="T10">https://nature-lang.org/docs/contribute</text:span></text:a></text:p>
        </text:list-item>
        <text:list-item>
          <text:p text:style-name="P10"><text:span text:style-name="T9">Understanding Garbage Collection in Go | Blog | Keep It Simple, </text:span><text:a xlink:type="simple" xlink:href="https://www.dingyuqi.com/en/article/go-garbage-collection/" text:style-name="ListLabel_20_64" text:visited-style-name="ListLabel_20_64"><text:span text:style-name="T10">https://www.dingyuqi.com/en/article/go-garbage-collection/</text:span></text:a></text:p>
        </text:list-item>
        <text:list-item>
          <text:p text:style-name="P10"><text:span text:style-name="T9">Essence of Modern Tracing Garbage Collector | by Gang Peng - Medium, </text:span><text:a xlink:type="simple" xlink:href="https://medium.com/@dsfan/essence-of-modern-tracing-garbage-collector-ec6c64a9bfd8" text:style-name="ListLabel_20_64" text:visited-style-name="ListLabel_20_64"><text:span text:style-name="T10">https://medium.com/@dsfan/essence-of-modern-tracing-garbage-collector-ec6c64a9bfd8</text:span></text:a></text:p>
        </text:list-item>
        <text:list-item>
          <text:p text:style-name="P10"><text:span text:style-name="T9">Writing Barriers in Go Garbage Collection - Medium, </text:span><text:a xlink:type="simple" xlink:href="https://medium.com/@AlexanderObregon/writing-barriers-in-go-garbage-collection-baf72a4ee088" text:style-name="ListLabel_20_64" text:visited-style-name="ListLabel_20_64"><text:span text:style-name="T10">https://medium.com/@AlexanderObregon/writing-barriers-in-go-garbage-collection-baf72a4ee088</text:span></text:a></text:p>
        </text:list-item>
        <text:list-item>
          <text:p text:style-name="P10"><text:span text:style-name="T9">Why does the Go GC have to pause? : r/golang - Reddit, </text:span><text:a xlink:type="simple" xlink:href="https://www.reddit.com/r/golang/comments/1keo1t0/why_does_the_go_gc_have_to_pause/" text:style-name="ListLabel_20_64" text:visited-style-name="ListLabel_20_64"><text:span text:style-name="T10">https://www.reddit.com/r/golang/comments/1keo1t0/why_does_the_go_gc_have_to_pause/</text:span></text:a></text:p>
        </text:list-item>
        <text:list-item>
          <text:p text:style-name="P10"><text:span text:style-name="T9">Memory Mechanics In Go - Stack vs Heap | Lorbic, </text:span><text:a xlink:type="simple" xlink:href="https://lorbic.com/memory-mechanics-stack-vs-heap-in-go/" text:style-name="ListLabel_20_64" text:visited-style-name="ListLabel_20_64"><text:span text:style-name="T10">https://lorbic.com/memory-mechanics-stack-vs-heap-in-go/</text:span></text:a></text:p>
        </text:list-item>
        <text:list-item>
          <text:p text:style-name="P10"><text:span text:style-name="T9">Go's Escape Analysis Demystified: When Variables Move to the Heap (and Why It Matters) | by Isuru Cumaranathunga | CodeX | Medium, </text:span><text:a xlink:type="simple" xlink:href="https://medium.com/codex/gos-escape-analysis-demystified-when-variables-move-to-the-heap-and-why-it-matters-91200e34729d" text:style-name="ListLabel_20_64" text:visited-style-name="ListLabel_20_64"><text:span text:style-name="T10">https://medium.com/codex/gos-escape-analysis-demystified-when-variables-move-to-the-heap-and-why-it-matters-91200e34729d</text:span></text:a></text:p>
        </text:list-item>
        <text:list-item>
          <text:p text:style-name="P10"><text:soft-page-break/><text:span text:style-name="T9">Escape Paths in Go Closures - Medium, </text:span><text:a xlink:type="simple" xlink:href="https://medium.com/@AlexanderObregon/escape-paths-in-go-closures-2eeba4bf119e" text:style-name="ListLabel_20_64" text:visited-style-name="ListLabel_20_64"><text:span text:style-name="T10">https://medium.com/@AlexanderObregon/escape-paths-in-go-closures-2eeba4bf119e</text:span></text:a></text:p>
        </text:list-item>
        <text:list-item>
          <text:p text:style-name="P10"><text:span text:style-name="T9">Understanding Escape Analysis in Go – Explained with Example Code - freeCodeCamp, </text:span><text:a xlink:type="simple" xlink:href="https://www.freecodecamp.org/news/understanding-escape-analysis-in-go/" text:style-name="ListLabel_20_64" text:visited-style-name="ListLabel_20_64"><text:span text:style-name="T10">https://www.freecodecamp.org/news/understanding-escape-analysis-in-go/</text:span></text:a></text:p>
        </text:list-item>
        <text:list-item>
          <text:p text:style-name="P10"><text:span text:style-name="T9">Escape Analysis in Go: Understanding Memory Optimization | by Mykola Guley - Dev Genius, </text:span><text:a xlink:type="simple" xlink:href="https://blog.devgenius.io/escape-analysis-in-go-understanding-memory-optimization-83d29f13fa1d" text:style-name="ListLabel_20_64" text:visited-style-name="ListLabel_20_64"><text:span text:style-name="T10">https://blog.devgenius.io/escape-analysis-in-go-understanding-memory-optimization-83d29f13fa1d</text:span></text:a></text:p>
        </text:list-item>
        <text:list-item>
          <text:p text:style-name="P10"><text:span text:style-name="T9">Introduction to the Go compiler - - The Go Programming Language, </text:span><text:a xlink:type="simple" xlink:href="https://go.dev/src/cmd/compile/README" text:style-name="ListLabel_20_64" text:visited-style-name="ListLabel_20_64"><text:span text:style-name="T10">https://go.dev/src/cmd/compile/README</text:span></text:a></text:p>
        </text:list-item>
        <text:list-item>
          <text:p text:style-name="P10"><text:span text:style-name="T9">Escape analysis - Grokipedia, </text:span><text:a xlink:type="simple" xlink:href="https://grokipedia.com/page/Escape_analysis" text:style-name="ListLabel_20_64" text:visited-style-name="ListLabel_20_64"><text:span text:style-name="T10">https://grokipedia.com/page/Escape_analysis</text:span></text:a></text:p>
        </text:list-item>
        <text:list-item>
          <text:p text:style-name="P10"><text:span text:style-name="T9">What is considered "small" object in Go regarding stack allocation?, </text:span><text:a xlink:type="simple" xlink:href="https://stackoverflow.com/questions/42243197/what-is-considered-small-object-in-go-regarding-stack-allocation" text:style-name="ListLabel_20_64" text:visited-style-name="ListLabel_20_64"><text:span text:style-name="T10">https://stackoverflow.com/questions/42243197/what-is-considered-small-object-in-go-regarding-stack-allocation</text:span></text:a></text:p>
        </text:list-item>
        <text:list-item>
          <text:p text:style-name="P10"><text:span text:style-name="T9">Interface Internals in go - by Nikhil Matta - Medium, </text:span><text:a xlink:type="simple" xlink:href="https://medium.com/@nikhilmatta45/interface-internals-in-go-bd0afc404949" text:style-name="ListLabel_20_64" text:visited-style-name="ListLabel_20_64"><text:span text:style-name="T10">https://medium.com/@nikhilmatta45/interface-internals-in-go-bd0afc404949</text:span></text:a></text:p>
        </text:list-item>
        <text:list-item>
          <text:p text:style-name="P10"><text:span text:style-name="T9">Go interfaces deep dive | .pagefile, </text:span><text:a xlink:type="simple" xlink:href="https://tul.github.io/2018/07/23/go-interfaces-deep-dive.html" text:style-name="ListLabel_20_64" text:visited-style-name="ListLabel_20_64"><text:span text:style-name="T10">https://tul.github.io/2018/07/23/go-interfaces-deep-dive.html</text:span></text:a></text:p>
        </text:list-item>
        <text:list-item>
          <text:p text:style-name="P10"><text:span text:style-name="T9">go-internals/chapter2_interfaces/README.md at master - GitHub, </text:span><text:a xlink:type="simple" xlink:href="https://github.com/teh-cmc/go-internals/blob/master/chapter2_interfaces/README.md" text:style-name="ListLabel_20_64" text:visited-style-name="ListLabel_20_64"><text:span text:style-name="T10">https://github.com/teh-cmc/go-internals/blob/master/chapter2_interfaces/README.md</text:span></text:a></text:p>
        </text:list-item>
        <text:list-item>
          <text:p text:style-name="P10"><text:span text:style-name="T9">Unveiling the Mechanisms: The Hidden World of Go Interface Values | Leapcell, </text:span><text:a xlink:type="simple" xlink:href="https://leapcell.io/blog/unveiling-the-mechanisms-the-hidden-world-of-go-interface-values" text:style-name="ListLabel_20_64" text:visited-style-name="ListLabel_20_64"><text:span text:style-name="T10">https://leapcell.io/blog/unveiling-the-mechanisms-the-hidden-world-of-go-interface-values</text:span></text:a></text:p>
        </text:list-item>
        <text:list-item>
          <text:p text:style-name="P10"><text:span text:style-name="T9">Go Embedding Series — 02. Interface Embedding in Go Design and Patterns | HEWEN's blog, </text:span><text:a xlink:type="simple" xlink:href="https://ehewen.com/en/blog/go-interface-embedding/" text:style-name="ListLabel_20_64" text:visited-style-name="ListLabel_20_64"><text:span text:style-name="T10">https://ehewen.com/en/blog/go-interface-embedding/</text:span></text:a></text:p>
        </text:list-item>
        <text:list-item>
          <text:p text:style-name="P10"><text:span text:style-name="T9">Go — Interfaces (the fat pointer illusion) | by mokshrchadha | May, 2026 - Medium, </text:span><text:a xlink:type="simple" xlink:href="https://medium.com/@chadhamoksh/go-interfaces-the-fat-pointer-illusion-39f44bc7efef" text:style-name="ListLabel_20_64" text:visited-style-name="ListLabel_20_64"><text:span text:style-name="T10">https://medium.com/@chadhamoksh/go-interfaces-the-fat-pointer-illusion-39f44bc7efef</text:span></text:a></text:p>
        </text:list-item>
        <text:list-item>
          <text:p text:style-name="P10"><text:span text:style-name="T9">Chapter II: Interfaces | Go Internals - GitBook, </text:span><text:a xlink:type="simple" xlink:href="https://cmc.gitbook.io/go-internals/chapter-ii-interfaces" text:style-name="ListLabel_20_64" text:visited-style-name="ListLabel_20_64"><text:span text:style-name="T10">https://cmc.gitbook.io/go-internals/chapter-ii-interfaces</text:span></text:a></text:p>
        </text:list-item>
        <text:list-item>
          <text:p text:style-name="P10"><text:span text:style-name="T9">Go Stack Growth Explained: How Goroutines Start Tiny and Scale Without Crashing | by Shubratha | Medium, </text:span><text:a xlink:type="simple" xlink:href="https://medium.com/@shubratha/go-stack-growth-explained-how-goroutines-start-tiny-and-scale-without-crashing-1cc46301bf87" text:style-name="ListLabel_20_64" text:visited-style-name="ListLabel_20_64"><text:span text:style-name="T10">https://medium.com/@shubratha/go-stack-growth-explained-how-goroutines-start-tiny-and-scale-without-crashing-1cc46301bf87</text:span></text:a></text:p>
        </text:list-item>
        <text:list-item>
          <text:p text:style-name="P10"><text:span text:style-name="T9">Zero-Allocation in Go (Golang) - DEV Community, </text:span><text:a xlink:type="simple" xlink:href="https://dev.to/saleh_rahimzadeh/zero-allocation-in-go-golang-237k" text:style-name="ListLabel_20_64" text:visited-style-name="ListLabel_20_64"><text:span text:style-name="T10">https://dev.to/saleh_rahimzadeh/zero-allocation-in-go-golang-237k</text:span></text:a></text:p>
        </text:list-item>
        <text:list-item>
          <text:p text:style-name="P10"><text:span text:style-name="T9">Zero Allocation in Go: Writing Faster Code | by Lince Mathew - Medium, </text:span><text:a xlink:type="simple" xlink:href="https://medium.com/@linz07m/zero-allocation-in-go-writing-faster-code-7b9b91f4f899" text:style-name="ListLabel_20_64" text:visited-style-name="ListLabel_20_64"><text:span text:style-name="T10">https://medium.com/@linz07m/zero-allocation-in-go-writing-faster-code-7b9b91f4f899</text:span></text:a></text:p>
        </text:list-item>
        <text:list-item>
          <text:p text:style-name="P10"><text:span text:style-name="T9">Allocating on the Stack - The Go Programming Language, </text:span><text:a xlink:type="simple" xlink:href="https://go.dev/blog/allocation-optimizations" text:style-name="ListLabel_20_64" text:visited-style-name="ListLabel_20_64"><text:span text:style-name="T10">https://go.dev/blog/allocation-optimizations</text:span></text:a></text:p>
        </text:list-item>
        <text:list-item>
          <text:p text:style-name="P10"><text:span text:style-name="T9">Understanding CPU Caches in Go - Lorbic, </text:span><text:a xlink:type="simple" xlink:href="https://lorbic.com/cpu-caches-in-go/" text:style-name="ListLabel_20_64" text:visited-style-name="ListLabel_20_64"><text:span text:style-name="T10">https://lorbic.com/cpu-caches-in-go/</text:span></text:a></text:p>
        </text:list-item>
        <text:list-item>
          <text:p text:style-name="P10"><text:span text:style-name="T9">github.com/colega/zeropool: zero-allocation type-safe sync.Pool alternative : r/golang, </text:span><text:a xlink:type="simple" xlink:href="https://www.reddit.com/r/golang/comments/123zhi7/githubcomcolegazeropool_zeroallocation_typesafe/" text:style-name="ListLabel_20_64" text:visited-style-name="ListLabel_20_64"><text:span text:style-name="T10">https://www.reddit.com/r/golang/comments/123zhi7/githubcomcolegazeropool_zeroallocation_typesafe/</text:span></text:a></text:p>
        </text:list-item>
        <text:list-item>
          <text:p text:style-name="P10"><text:span text:style-name="T9">MYK12397/gohotpool: A PostgreSQL-inspired byte buffer pool for Go with advanced eviction strategies, pin/usage count mechanisms, and dirty buffer tracking. - GitHub, </text:span><text:a xlink:type="simple" xlink:href="https://github.com/MYK12397/gohotpool" text:style-name="ListLabel_20_64" text:visited-style-name="ListLabel_20_64"><text:span text:style-name="T10">https://github.com/MYK12397/gohotpool</text:span></text:a></text:p>
        </text:list-item>
        <text:list-item>
          <text:p text:style-name="P10"><text:span text:style-name="T9">Zero-Allocation and Raw Injection in Go-Templ | by Lince Mathew | Medium, </text:span><text:a xlink:type="simple" xlink:href="https://medium.com/@linz07m/zero-allocation-and-raw-injection-in-go-templ-d75c6fbafa92" text:style-name="ListLabel_20_64" text:visited-style-name="ListLabel_20_64"><text:span text:style-name="T10">https://medium.com/@linz07m/zero-allocation-and-raw-injection-in-go-templ-d75c6fbafa92</text:span></text:a></text:p>
        </text:list-item>
        <text:list-item>
          <text:p text:style-name="P10"><text:soft-page-break/><text:span text:style-name="T9">Pointer Chasing in Modern Systems: Why it hurts, When it helps, and How real applications use it - Sourav Paul, </text:span><text:a xlink:type="simple" xlink:href="https://sourav-k-paul.medium.com/pointer-chasing-in-modern-systems-why-it-hurts-when-it-helps-and-how-real-applications-use-4de83de4a6ac" text:style-name="ListLabel_20_64" text:visited-style-name="ListLabel_20_64"><text:span text:style-name="T10">https://sourav-k-paul.medium.com/pointer-chasing-in-modern-systems-why-it-hurts-when-it-helps-and-how-real-applications-use-4de83de4a6ac</text:span></text:a></text:p>
        </text:list-item>
        <text:list-item>
          <text:p text:style-name="P10"><text:span text:style-name="T9">CPU performance - CuriousCoding, </text:span><text:a xlink:type="simple" xlink:href="https://curiouscoding.nl/posts/cpu-benchmarks/" text:style-name="ListLabel_20_64" text:visited-style-name="ListLabel_20_64"><text:span text:style-name="T10">https://curiouscoding.nl/posts/cpu-benchmarks/</text:span></text:a></text:p>
        </text:list-item>
        <text:list-item>
          <text:p text:style-name="P10"><text:span text:style-name="T9">False Sharing: The Silent Performance Killer in Concurrent Go | by Kamal Namdeo | Medium, </text:span><text:a xlink:type="simple" xlink:href="https://medium.com/@kamal.g.namdeo/false-sharing-the-silent-performance-killer-in-concurrent-go-de9070f0c859" text:style-name="ListLabel_20_64" text:visited-style-name="ListLabel_20_64"><text:span text:style-name="T10">https://medium.com/@kamal.g.namdeo/false-sharing-the-silent-performance-killer-in-concurrent-go-de9070f0c859</text:span></text:a></text:p>
        </text:list-item>
        <text:list-item>
          <text:p text:style-name="P10"><text:span text:style-name="T9">Struct Field Alignment - Go Optimization Guide, </text:span><text:a xlink:type="simple" xlink:href="https://goperf.dev/01-common-patterns/fields-alignment/" text:style-name="ListLabel_20_64" text:visited-style-name="ListLabel_20_64"><text:span text:style-name="T10">https://goperf.dev/01-common-patterns/fields-alignment/</text:span></text:a></text:p>
        </text:list-item>
        <text:list-item>
          <text:p text:style-name="P10"><text:span text:style-name="T9">Struct Optimizations in Go - Mohamed Said, </text:span><text:a xlink:type="simple" xlink:href="https://themsaid.com/struct-optimizations-in-go" text:style-name="ListLabel_20_64" text:visited-style-name="ListLabel_20_64"><text:span text:style-name="T10">https://themsaid.com/struct-optimizations-in-go</text:span></text:a></text:p>
        </text:list-item>
        <text:list-item>
          <text:p text:style-name="P10"><text:span text:style-name="T9">False sharing example | Arm Learning Paths, </text:span><text:a xlink:type="simple" xlink:href="https://learn.arm.com/learning-paths/servers-and-cloud-computing/false-sharing-arm-spe/how-to-3/" text:style-name="ListLabel_20_64" text:visited-style-name="ListLabel_20_64"><text:span text:style-name="T10">https://learn.arm.com/learning-paths/servers-and-cloud-computing/false-sharing-arm-spe/how-to-3/</text:span></text:a></text:p>
        </text:list-item>
        <text:list-item>
          <text:p text:style-name="P10"><text:span text:style-name="T9">What is "false sharing"? How to reproduce / avoid it? - Stack Overflow, </text:span><text:a xlink:type="simple" xlink:href="https://stackoverflow.com/questions/22766191/what-is-false-sharing-how-to-reproduce-avoid-it" text:style-name="ListLabel_20_64" text:visited-style-name="ListLabel_20_64"><text:span text:style-name="T10">https://stackoverflow.com/questions/22766191/what-is-false-sharing-how-to-reproduce-avoid-it</text:span></text:a></text:p>
        </text:list-item>
        <text:list-item>
          <text:p text:style-name="P10"><text:span text:style-name="T9">False Sharing in Go — The Hidden Enemy in Your Concurrency - DEV Community, </text:span><text:a xlink:type="simple" xlink:href="https://dev.to/kelvinfloresta/false-sharing-in-go-the-hidden-enemy-in-your-concurrency-37ni" text:style-name="ListLabel_20_64" text:visited-style-name="ListLabel_20_64"><text:span text:style-name="T10">https://dev.to/kelvinfloresta/false-sharing-in-go-the-hidden-enemy-in-your-concurrency-37ni</text:span></text:a></text:p>
        </text:list-item>
        <text:list-item>
          <text:p text:style-name="P10"><text:span text:style-name="T9">A Guide to False Sharing and @Contended | Baeldung, </text:span><text:a xlink:type="simple" xlink:href="https://www.baeldung.com/java-false-sharing-contended" text:style-name="ListLabel_20_64" text:visited-style-name="ListLabel_20_64"><text:span text:style-name="T10">https://www.baeldung.com/java-false-sharing-contended</text:span></text:a></text:p>
        </text:list-item>
        <text:list-item>
          <text:p text:style-name="P10"><text:span text:style-name="T9">Understanding Go Struct Alignment and Its Performance Implications | Leapcell, </text:span><text:a xlink:type="simple" xlink:href="https://leapcell.io/blog/understanding-go-struct-alignment-and-its-performance-implications" text:style-name="ListLabel_20_64" text:visited-style-name="ListLabel_20_64"><text:span text:style-name="T10">https://leapcell.io/blog/understanding-go-struct-alignment-and-its-performance-implications</text:span></text:a></text:p>
        </text:list-item>
        <text:list-item>
          <text:p text:style-name="P10"><text:span text:style-name="T9">Optimizing Struct Layout and Padding in Practice - go struct padding viztruct performance caching - buarki, </text:span><text:a xlink:type="simple" xlink:href="https://www.buarki.com/blog/viztruct-struct-layout-and-padding" text:style-name="ListLabel_20_64" text:visited-style-name="ListLabel_20_64"><text:span text:style-name="T10">https://www.buarki.com/blog/viztruct-struct-layout-and-padding</text:span></text:a></text:p>
        </text:list-item>
        <text:list-item>
          <text:p text:style-name="P10"><text:span text:style-name="T9">Why Struct Field Order Matters in Go: Memory Alignment and Speed - Medium, </text:span><text:a xlink:type="simple" xlink:href="https://medium.com/@goldengrisha/why-struct-field-order-matters-in-go-memory-alignment-and-speed-33a88aef0b4f" text:style-name="ListLabel_20_64" text:visited-style-name="ListLabel_20_64"><text:span text:style-name="T10">https://medium.com/@goldengrisha/why-struct-field-order-matters-in-go-memory-alignment-and-speed-33a88aef0b4f</text:span></text:a></text:p>
        </text:list-item>
        <text:list-item>
          <text:p text:style-name="P10"><text:span text:style-name="T9">Accelerating Pointer Chasing in 3D-Stacked Memory: Challenges, Mechanisms, Evaluation - ETH Zürich, </text:span><text:a xlink:type="simple" xlink:href="https://people.inf.ethz.ch/omutlu/pub/in-memory-pointer-chasing-accelerator_iccd16.pdf" text:style-name="ListLabel_20_64" text:visited-style-name="ListLabel_20_64"><text:span text:style-name="T10">https://people.inf.ethz.ch/omutlu/pub/in-memory-pointer-chasing-accelerator_iccd16.pdf</text:span></text:a></text:p>
        </text:list-item>
        <text:list-item>
          <text:p text:style-name="P10"><text:span text:style-name="T9">Arrays in Go: The Untold Story of Memory, Copies, and Performance | by Sogol Hedayatmanesh | Medium, </text:span><text:a xlink:type="simple" xlink:href="https://medium.com/@sogol.hedayatmanesh/arrays-in-go-the-untold-story-of-memory-copies-and-performance-556f45a97726" text:style-name="ListLabel_20_64" text:visited-style-name="ListLabel_20_64"><text:span text:style-name="T10">https://medium.com/@sogol.hedayatmanesh/arrays-in-go-the-untold-story-of-memory-copies-and-performance-556f45a97726</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9" meta:paragraph-count="192" meta:word-count="5845" meta:character-count="43354" meta:non-whitespace-character-count="37778"/>
    <meta:generator>LibreOfficeDev/6.0.5.2$Linux_X86_64 LibreOffice_project/</meta:generator>
  </office:meta>
</office:document-meta>
</file>